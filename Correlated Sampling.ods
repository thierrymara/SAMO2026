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1">
      <style:table-properties table:display="true" style:writing-mode="lr-tb"/>
    </style:style>
    <style:style style:name="ta2" style:family="table" style:master-page-name="PageStyle_5f_Z12">
      <style:table-properties table:display="true" style:writing-mode="lr-tb"/>
    </style:style>
    <style:style style:name="ta3" style:family="table" style:master-page-name="PageStyle_5f_zc12">
      <style:table-properties table:display="true" style:writing-mode="lr-tb"/>
    </style:style>
    <style:style style:name="ta4" style:family="table" style:master-page-name="PageStyle_5f_zc21">
      <style:table-properties table:display="true" style:writing-mode="lr-tb"/>
    </style:style>
    <style:style style:name="ta5" style:family="table" style:master-page-name="PageStyle_5f_Z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140748384655849" calcext:value-type="float">
            <text:p>0.014074838465585</text:p>
          </table:table-cell>
          <table:table-cell table:style-name="ce2" table:formula="of:=RAND()" office:value-type="float" office:value="0.701870072848425" calcext:value-type="float">
            <text:p>0.70187007284842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688632567238814" calcext:value-type="float">
            <text:p>0.068863256723881</text:p>
          </table:table-cell>
          <table:table-cell table:style-name="ce2" table:formula="of:=RAND()" office:value-type="float" office:value="0.491785956274171" calcext:value-type="float">
            <text:p>0.49178595627417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90086543982014" calcext:value-type="float">
            <text:p>0.590086543982014</text:p>
          </table:table-cell>
          <table:table-cell table:style-name="ce2" table:formula="of:=RAND()" office:value-type="float" office:value="0.337763319918866" calcext:value-type="float">
            <text:p>0.33776331991886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36085918583605" calcext:value-type="float">
            <text:p>0.336085918583605</text:p>
          </table:table-cell>
          <table:table-cell table:style-name="ce2" table:formula="of:=RAND()" office:value-type="float" office:value="0.71290669258545" calcext:value-type="float">
            <text:p>0.7129066925854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41946503438582" calcext:value-type="float">
            <text:p>0.841946503438582</text:p>
          </table:table-cell>
          <table:table-cell table:style-name="ce2" table:formula="of:=RAND()" office:value-type="float" office:value="0.319938612868762" calcext:value-type="float">
            <text:p>0.31993861286876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73213452855883" calcext:value-type="float">
            <text:p>0.873213452855883</text:p>
          </table:table-cell>
          <table:table-cell table:style-name="ce2" table:formula="of:=RAND()" office:value-type="float" office:value="0.741113585766216" calcext:value-type="float">
            <text:p>0.74111358576621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11776893006716" calcext:value-type="float">
            <text:p>0.211776893006716</text:p>
          </table:table-cell>
          <table:table-cell table:style-name="ce2" table:formula="of:=RAND()" office:value-type="float" office:value="0.982056098680455" calcext:value-type="float">
            <text:p>0.98205609868045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131207189105752" calcext:value-type="float">
            <text:p>0.131207189105752</text:p>
          </table:table-cell>
          <table:table-cell table:style-name="ce2" table:formula="of:=RAND()" office:value-type="float" office:value="0.384554798978888" calcext:value-type="float">
            <text:p>0.38455479897888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156777821685863" calcext:value-type="float">
            <text:p>0.156777821685863</text:p>
          </table:table-cell>
          <table:table-cell table:style-name="ce2" table:formula="of:=RAND()" office:value-type="float" office:value="0.270251227566357" calcext:value-type="float">
            <text:p>0.27025122756635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69443706547647" calcext:value-type="float">
            <text:p>0.269443706547647</text:p>
          </table:table-cell>
          <table:table-cell table:style-name="ce2" table:formula="of:=RAND()" office:value-type="float" office:value="0.343110525359182" calcext:value-type="float">
            <text:p>0.34311052535918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70084397087751" calcext:value-type="float">
            <text:p>0.870084397087751</text:p>
          </table:table-cell>
          <table:table-cell table:style-name="ce2" table:formula="of:=RAND()" office:value-type="float" office:value="0.989264626537647" calcext:value-type="float">
            <text:p>0.98926462653764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48389928862166" calcext:value-type="float">
            <text:p>0.948389928862166</text:p>
          </table:table-cell>
          <table:table-cell table:style-name="ce2" table:formula="of:=RAND()" office:value-type="float" office:value="0.0585095213205636" calcext:value-type="float">
            <text:p>0.058509521320564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54879650043944" calcext:value-type="float">
            <text:p>0.254879650043944</text:p>
          </table:table-cell>
          <table:table-cell table:style-name="ce2" table:formula="of:=RAND()" office:value-type="float" office:value="0.263648158628161" calcext:value-type="float">
            <text:p>0.26364815862816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44004896128808" calcext:value-type="float">
            <text:p>0.344004896128808</text:p>
          </table:table-cell>
          <table:table-cell table:style-name="ce2" table:formula="of:=RAND()" office:value-type="float" office:value="0.543570337428592" calcext:value-type="float">
            <text:p>0.54357033742859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19747698095397" calcext:value-type="float">
            <text:p>0.919747698095397</text:p>
          </table:table-cell>
          <table:table-cell table:style-name="ce2" table:formula="of:=RAND()" office:value-type="float" office:value="0.373642106644786" calcext:value-type="float">
            <text:p>0.37364210664478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65980685798069" calcext:value-type="float">
            <text:p>0.565980685798069</text:p>
          </table:table-cell>
          <table:table-cell table:style-name="ce2" table:formula="of:=RAND()" office:value-type="float" office:value="0.750803370854844" calcext:value-type="float">
            <text:p>0.750803370854844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67934752667883" calcext:value-type="float">
            <text:p>0.867934752667883</text:p>
          </table:table-cell>
          <table:table-cell table:style-name="ce2" table:formula="of:=RAND()" office:value-type="float" office:value="0.611363739089935" calcext:value-type="float">
            <text:p>0.61136373908993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37186950211239" calcext:value-type="float">
            <text:p>0.037186950211239</text:p>
          </table:table-cell>
          <table:table-cell table:style-name="ce2" table:formula="of:=RAND()" office:value-type="float" office:value="0.0838473133825505" calcext:value-type="float">
            <text:p>0.08384731338255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65809343295258" calcext:value-type="float">
            <text:p>0.565809343295258</text:p>
          </table:table-cell>
          <table:table-cell table:style-name="ce2" table:formula="of:=RAND()" office:value-type="float" office:value="0.00202685679871899" calcext:value-type="float">
            <text:p>0.002026856798719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589023416540233" calcext:value-type="float">
            <text:p>0.058902341654023</text:p>
          </table:table-cell>
          <table:table-cell table:style-name="ce2" table:formula="of:=RAND()" office:value-type="float" office:value="0.382283400034901" calcext:value-type="float">
            <text:p>0.38228340003490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14710817942578" calcext:value-type="float">
            <text:p>0.614710817942578</text:p>
          </table:table-cell>
          <table:table-cell table:style-name="ce2" table:formula="of:=RAND()" office:value-type="float" office:value="0.450518058564913" calcext:value-type="float">
            <text:p>0.45051805856491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713823637281515" calcext:value-type="float">
            <text:p>0.713823637281515</text:p>
          </table:table-cell>
          <table:table-cell table:style-name="ce2" table:formula="of:=RAND()" office:value-type="float" office:value="0.340670313612472" calcext:value-type="float">
            <text:p>0.34067031361247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786124808662513" calcext:value-type="float">
            <text:p>0.786124808662513</text:p>
          </table:table-cell>
          <table:table-cell table:style-name="ce2" table:formula="of:=RAND()" office:value-type="float" office:value="0.0304785424821855" calcext:value-type="float">
            <text:p>0.03047854248218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80939744344158" calcext:value-type="float">
            <text:p>0.280939744344158</text:p>
          </table:table-cell>
          <table:table-cell table:style-name="ce2" table:formula="of:=RAND()" office:value-type="float" office:value="0.329342254019547" calcext:value-type="float">
            <text:p>0.32934225401954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0885119037675" calcext:value-type="float">
            <text:p>0.60885119037675</text:p>
          </table:table-cell>
          <table:table-cell table:style-name="ce2" table:formula="of:=RAND()" office:value-type="float" office:value="0.292417023161023" calcext:value-type="float">
            <text:p>0.29241702316102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99438824127196" calcext:value-type="float">
            <text:p>0.499438824127196</text:p>
          </table:table-cell>
          <table:table-cell table:style-name="ce2" table:formula="of:=RAND()" office:value-type="float" office:value="0.00543116378830884" calcext:value-type="float">
            <text:p>0.005431163788309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09706230653384" calcext:value-type="float">
            <text:p>0.909706230653384</text:p>
          </table:table-cell>
          <table:table-cell table:style-name="ce2" table:formula="of:=RAND()" office:value-type="float" office:value="0.0656670951906088" calcext:value-type="float">
            <text:p>0.065667095190609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53508458574034" calcext:value-type="float">
            <text:p>0.853508458574034</text:p>
          </table:table-cell>
          <table:table-cell table:style-name="ce2" table:formula="of:=RAND()" office:value-type="float" office:value="0.751771019246042" calcext:value-type="float">
            <text:p>0.75177101924604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82392585621742" calcext:value-type="float">
            <text:p>0.482392585621742</text:p>
          </table:table-cell>
          <table:table-cell table:style-name="ce2" table:formula="of:=RAND()" office:value-type="float" office:value="0.438226386894026" calcext:value-type="float">
            <text:p>0.43822638689402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07889194015808" calcext:value-type="float">
            <text:p>0.207889194015808</text:p>
          </table:table-cell>
          <table:table-cell table:style-name="ce2" table:formula="of:=RAND()" office:value-type="float" office:value="0.507649966929791" calcext:value-type="float">
            <text:p>0.50764996692979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60086854803481" calcext:value-type="float">
            <text:p>0.860086854803481</text:p>
          </table:table-cell>
          <table:table-cell table:style-name="ce2" table:formula="of:=RAND()" office:value-type="float" office:value="0.205178161483803" calcext:value-type="float">
            <text:p>0.20517816148380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835714586687148" calcext:value-type="float">
            <text:p>0.083571458668715</text:p>
          </table:table-cell>
          <table:table-cell table:style-name="ce2" table:formula="of:=RAND()" office:value-type="float" office:value="0.967277811213072" calcext:value-type="float">
            <text:p>0.96727781121307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727965985974021" calcext:value-type="float">
            <text:p>0.072796598597402</text:p>
          </table:table-cell>
          <table:table-cell table:style-name="ce2" table:formula="of:=RAND()" office:value-type="float" office:value="0.748711019544942" calcext:value-type="float">
            <text:p>0.74871101954494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459738735341588" calcext:value-type="float">
            <text:p>0.045973873534159</text:p>
          </table:table-cell>
          <table:table-cell table:style-name="ce2" table:formula="of:=RAND()" office:value-type="float" office:value="0.718290918125069" calcext:value-type="float">
            <text:p>0.718290918125069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60543908482512" calcext:value-type="float">
            <text:p>0.660543908482512</text:p>
          </table:table-cell>
          <table:table-cell table:style-name="ce2" table:formula="of:=RAND()" office:value-type="float" office:value="0.225216736589207" calcext:value-type="float">
            <text:p>0.22521673658920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952863800409138" calcext:value-type="float">
            <text:p>0.095286380040914</text:p>
          </table:table-cell>
          <table:table-cell table:style-name="ce2" table:formula="of:=RAND()" office:value-type="float" office:value="0.169700042636206" calcext:value-type="float">
            <text:p>0.16970004263620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18063350807974" calcext:value-type="float">
            <text:p>0.418063350807974</text:p>
          </table:table-cell>
          <table:table-cell table:style-name="ce2" table:formula="of:=RAND()" office:value-type="float" office:value="0.176447190174881" calcext:value-type="float">
            <text:p>0.17644719017488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89119617873662" calcext:value-type="float">
            <text:p>0.389119617873662</text:p>
          </table:table-cell>
          <table:table-cell table:style-name="ce2" table:formula="of:=RAND()" office:value-type="float" office:value="0.511952862068108" calcext:value-type="float">
            <text:p>0.51195286206810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02597600717809" calcext:value-type="float">
            <text:p>0.902597600717809</text:p>
          </table:table-cell>
          <table:table-cell table:style-name="ce2" table:formula="of:=RAND()" office:value-type="float" office:value="0.00458660722080063" calcext:value-type="float">
            <text:p>0.00458660722080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88075991665251" calcext:value-type="float">
            <text:p>0.988075991665251</text:p>
          </table:table-cell>
          <table:table-cell table:style-name="ce2" table:formula="of:=RAND()" office:value-type="float" office:value="0.685193520957159" calcext:value-type="float">
            <text:p>0.685193520957159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01873720132967" calcext:value-type="float">
            <text:p>0.401873720132967</text:p>
          </table:table-cell>
          <table:table-cell table:style-name="ce2" table:formula="of:=RAND()" office:value-type="float" office:value="0.850560014493775" calcext:value-type="float">
            <text:p>0.85056001449377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38296093366373" calcext:value-type="float">
            <text:p>0.638296093366373</text:p>
          </table:table-cell>
          <table:table-cell table:style-name="ce2" table:formula="of:=RAND()" office:value-type="float" office:value="0.040497459524181" calcext:value-type="float">
            <text:p>0.04049745952418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35934182643097" calcext:value-type="float">
            <text:p>0.535934182643097</text:p>
          </table:table-cell>
          <table:table-cell table:style-name="ce2" table:formula="of:=RAND()" office:value-type="float" office:value="0.305856573372503" calcext:value-type="float">
            <text:p>0.30585657337250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07677510488862" calcext:value-type="float">
            <text:p>0.207677510488862</text:p>
          </table:table-cell>
          <table:table-cell table:style-name="ce2" table:formula="of:=RAND()" office:value-type="float" office:value="0.67547104782958" calcext:value-type="float">
            <text:p>0.6754710478295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55134340002874" calcext:value-type="float">
            <text:p>0.555134340002874</text:p>
          </table:table-cell>
          <table:table-cell table:style-name="ce2" table:formula="of:=RAND()" office:value-type="float" office:value="0.201370257273695" calcext:value-type="float">
            <text:p>0.20137025727369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168644317258415" calcext:value-type="float">
            <text:p>0.016864431725842</text:p>
          </table:table-cell>
          <table:table-cell table:style-name="ce2" table:formula="of:=RAND()" office:value-type="float" office:value="0.787452224513471" calcext:value-type="float">
            <text:p>0.78745222451347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32847039734763" calcext:value-type="float">
            <text:p>0.632847039734763</text:p>
          </table:table-cell>
          <table:table-cell table:style-name="ce2" table:formula="of:=RAND()" office:value-type="float" office:value="0.863653532053843" calcext:value-type="float">
            <text:p>0.86365353205384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749935181725487" calcext:value-type="float">
            <text:p>0.749935181725487</text:p>
          </table:table-cell>
          <table:table-cell table:style-name="ce2" table:formula="of:=RAND()" office:value-type="float" office:value="0.875693051647891" calcext:value-type="float">
            <text:p>0.87569305164789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8670833570047" calcext:value-type="float">
            <text:p>0.38670833570047</text:p>
          </table:table-cell>
          <table:table-cell table:style-name="ce2" table:formula="of:=RAND()" office:value-type="float" office:value="0.381339514215078" calcext:value-type="float">
            <text:p>0.38133951421507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58530031700012" calcext:value-type="float">
            <text:p>0.358530031700012</text:p>
          </table:table-cell>
          <table:table-cell table:style-name="ce2" table:formula="of:=RAND()" office:value-type="float" office:value="0.980963086674071" calcext:value-type="float">
            <text:p>0.98096308667407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83552996017372" calcext:value-type="float">
            <text:p>0.383552996017372</text:p>
          </table:table-cell>
          <table:table-cell table:style-name="ce2" table:formula="of:=RAND()" office:value-type="float" office:value="0.497261448016243" calcext:value-type="float">
            <text:p>0.49726144801624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07280943749542" calcext:value-type="float">
            <text:p>0.507280943749542</text:p>
          </table:table-cell>
          <table:table-cell table:style-name="ce2" table:formula="of:=RAND()" office:value-type="float" office:value="0.368498551764907" calcext:value-type="float">
            <text:p>0.36849855176490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13017652885001" calcext:value-type="float">
            <text:p>0.913017652885001</text:p>
          </table:table-cell>
          <table:table-cell table:style-name="ce2" table:formula="of:=RAND()" office:value-type="float" office:value="0.645600348815165" calcext:value-type="float">
            <text:p>0.64560034881516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71177662319164" calcext:value-type="float">
            <text:p>0.571177662319164</text:p>
          </table:table-cell>
          <table:table-cell table:style-name="ce2" table:formula="of:=RAND()" office:value-type="float" office:value="0.88561405162798" calcext:value-type="float">
            <text:p>0.8856140516279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92051680564597" calcext:value-type="float">
            <text:p>0.992051680564597</text:p>
          </table:table-cell>
          <table:table-cell table:style-name="ce2" table:formula="of:=RAND()" office:value-type="float" office:value="0.592924171035405" calcext:value-type="float">
            <text:p>0.59292417103540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2491240265318" calcext:value-type="float">
            <text:p>0.32491240265318</text:p>
          </table:table-cell>
          <table:table-cell table:style-name="ce2" table:formula="of:=RAND()" office:value-type="float" office:value="0.911774658837455" calcext:value-type="float">
            <text:p>0.91177465883745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08656984580621" calcext:value-type="float">
            <text:p>0.808656984580621</text:p>
          </table:table-cell>
          <table:table-cell table:style-name="ce2" table:formula="of:=RAND()" office:value-type="float" office:value="0.165441681069435" calcext:value-type="float">
            <text:p>0.16544168106943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771941016024854" calcext:value-type="float">
            <text:p>0.771941016024854</text:p>
          </table:table-cell>
          <table:table-cell table:style-name="ce2" table:formula="of:=RAND()" office:value-type="float" office:value="0.923354066124218" calcext:value-type="float">
            <text:p>0.92335406612421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55785025203952" calcext:value-type="float">
            <text:p>0.455785025203952</text:p>
          </table:table-cell>
          <table:table-cell table:style-name="ce2" table:formula="of:=RAND()" office:value-type="float" office:value="0.74857374272494" calcext:value-type="float">
            <text:p>0.74857374272494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64697995052679" calcext:value-type="float">
            <text:p>0.464697995052679</text:p>
          </table:table-cell>
          <table:table-cell table:style-name="ce2" table:formula="of:=RAND()" office:value-type="float" office:value="0.389072520702616" calcext:value-type="float">
            <text:p>0.38907252070261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09962262025061" calcext:value-type="float">
            <text:p>0.209962262025061</text:p>
          </table:table-cell>
          <table:table-cell table:style-name="ce2" table:formula="of:=RAND()" office:value-type="float" office:value="0.0334311037039975" calcext:value-type="float">
            <text:p>0.03343110370399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01108281514701" calcext:value-type="float">
            <text:p>0.201108281514701</text:p>
          </table:table-cell>
          <table:table-cell table:style-name="ce2" table:formula="of:=RAND()" office:value-type="float" office:value="0.185586379963988" calcext:value-type="float">
            <text:p>0.18558637996398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03573315164258" calcext:value-type="float">
            <text:p>0.903573315164258</text:p>
          </table:table-cell>
          <table:table-cell table:style-name="ce2" table:formula="of:=RAND()" office:value-type="float" office:value="0.328132398653533" calcext:value-type="float">
            <text:p>0.32813239865353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72332286194239" calcext:value-type="float">
            <text:p>0.372332286194239</text:p>
          </table:table-cell>
          <table:table-cell table:style-name="ce2" table:formula="of:=RAND()" office:value-type="float" office:value="0.96964448612532" calcext:value-type="float">
            <text:p>0.9696444861253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296217612882487" calcext:value-type="float">
            <text:p>0.029621761288249</text:p>
          </table:table-cell>
          <table:table-cell table:style-name="ce2" table:formula="of:=RAND()" office:value-type="float" office:value="0.221880623574384" calcext:value-type="float">
            <text:p>0.221880623574384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743569327397667" calcext:value-type="float">
            <text:p>0.743569327397667</text:p>
          </table:table-cell>
          <table:table-cell table:style-name="ce2" table:formula="of:=RAND()" office:value-type="float" office:value="0.51262501920897" calcext:value-type="float">
            <text:p>0.5126250192089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02990184473435" calcext:value-type="float">
            <text:p>0.502990184473435</text:p>
          </table:table-cell>
          <table:table-cell table:style-name="ce2" table:formula="of:=RAND()" office:value-type="float" office:value="0.528845270460772" calcext:value-type="float">
            <text:p>0.52884527046077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36803487169317" calcext:value-type="float">
            <text:p>0.236803487169317</text:p>
          </table:table-cell>
          <table:table-cell table:style-name="ce2" table:formula="of:=RAND()" office:value-type="float" office:value="0.321748587146155" calcext:value-type="float">
            <text:p>0.321748587146155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132834422400713" calcext:value-type="float">
            <text:p>0.132834422400713</text:p>
          </table:table-cell>
          <table:table-cell table:style-name="ce2" table:formula="of:=RAND()" office:value-type="float" office:value="0.0316096857428621" calcext:value-type="float">
            <text:p>0.03160968574286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184797713288688" calcext:value-type="float">
            <text:p>0.184797713288688</text:p>
          </table:table-cell>
          <table:table-cell table:style-name="ce2" table:formula="of:=RAND()" office:value-type="float" office:value="0.236306599108341" calcext:value-type="float">
            <text:p>0.23630659910834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0431863627380595" calcext:value-type="float">
            <text:p>0.004318636273806</text:p>
          </table:table-cell>
          <table:table-cell table:style-name="ce2" table:formula="of:=RAND()" office:value-type="float" office:value="0.534276228355717" calcext:value-type="float">
            <text:p>0.53427622835571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709392333472391" calcext:value-type="float">
            <text:p>0.709392333472391</text:p>
          </table:table-cell>
          <table:table-cell table:style-name="ce2" table:formula="of:=RAND()" office:value-type="float" office:value="0.908082560396827" calcext:value-type="float">
            <text:p>0.90808256039682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63871381201343" calcext:value-type="float">
            <text:p>0.463871381201343</text:p>
          </table:table-cell>
          <table:table-cell table:style-name="ce2" table:formula="of:=RAND()" office:value-type="float" office:value="0.628521613367356" calcext:value-type="float">
            <text:p>0.62852161336735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197967897608133" calcext:value-type="float">
            <text:p>0.019796789760813</text:p>
          </table:table-cell>
          <table:table-cell table:style-name="ce2" table:formula="of:=RAND()" office:value-type="float" office:value="0.123171684755978" calcext:value-type="float">
            <text:p>0.12317168475597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84371683458393" calcext:value-type="float">
            <text:p>0.684371683458393</text:p>
          </table:table-cell>
          <table:table-cell table:style-name="ce2" table:formula="of:=RAND()" office:value-type="float" office:value="0.160707345265856" calcext:value-type="float">
            <text:p>0.16070734526585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56460428795951" calcext:value-type="float">
            <text:p>0.656460428795951</text:p>
          </table:table-cell>
          <table:table-cell table:style-name="ce2" table:formula="of:=RAND()" office:value-type="float" office:value="0.861900637269817" calcext:value-type="float">
            <text:p>0.86190063726981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76349026021878" calcext:value-type="float">
            <text:p>0.76349026021878</text:p>
          </table:table-cell>
          <table:table-cell table:style-name="ce2" table:formula="of:=RAND()" office:value-type="float" office:value="0.148778699704976" calcext:value-type="float">
            <text:p>0.14877869970497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0105115743169823" calcext:value-type="float">
            <text:p>0.001051157431698</text:p>
          </table:table-cell>
          <table:table-cell table:style-name="ce2" table:formula="of:=RAND()" office:value-type="float" office:value="0.050469980872628" calcext:value-type="float">
            <text:p>0.05046998087262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74958054107137" calcext:value-type="float">
            <text:p>0.674958054107137</text:p>
          </table:table-cell>
          <table:table-cell table:style-name="ce2" table:formula="of:=RAND()" office:value-type="float" office:value="0.218195730115404" calcext:value-type="float">
            <text:p>0.218195730115404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89893976328342" calcext:value-type="float">
            <text:p>0.989893976328342</text:p>
          </table:table-cell>
          <table:table-cell table:style-name="ce2" table:formula="of:=RAND()" office:value-type="float" office:value="0.626503113736326" calcext:value-type="float">
            <text:p>0.62650311373632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72490783913093" calcext:value-type="float">
            <text:p>0.672490783913093</text:p>
          </table:table-cell>
          <table:table-cell table:style-name="ce2" table:formula="of:=RAND()" office:value-type="float" office:value="0.457609493887322" calcext:value-type="float">
            <text:p>0.45760949388732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627999150526949" calcext:value-type="float">
            <text:p>0.627999150526949</text:p>
          </table:table-cell>
          <table:table-cell table:style-name="ce2" table:formula="of:=RAND()" office:value-type="float" office:value="0.104827999020794" calcext:value-type="float">
            <text:p>0.104827999020794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355494913084338" calcext:value-type="float">
            <text:p>0.035549491308434</text:p>
          </table:table-cell>
          <table:table-cell table:style-name="ce2" table:formula="of:=RAND()" office:value-type="float" office:value="0.667536743644264" calcext:value-type="float">
            <text:p>0.667536743644264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25896369609245" calcext:value-type="float">
            <text:p>0.825896369609245</text:p>
          </table:table-cell>
          <table:table-cell table:style-name="ce2" table:formula="of:=RAND()" office:value-type="float" office:value="0.527098757020539" calcext:value-type="float">
            <text:p>0.527098757020539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42563286519859" calcext:value-type="float">
            <text:p>0.842563286519859</text:p>
          </table:table-cell>
          <table:table-cell table:style-name="ce2" table:formula="of:=RAND()" office:value-type="float" office:value="0.718717819538128" calcext:value-type="float">
            <text:p>0.718717819538128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5429269121575" calcext:value-type="float">
            <text:p>0.55429269121575</text:p>
          </table:table-cell>
          <table:table-cell table:style-name="ce2" table:formula="of:=RAND()" office:value-type="float" office:value="0.537618652960282" calcext:value-type="float">
            <text:p>0.53761865296028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91660534043684" calcext:value-type="float">
            <text:p>0.991660534043684</text:p>
          </table:table-cell>
          <table:table-cell table:style-name="ce2" table:formula="of:=RAND()" office:value-type="float" office:value="0.610227182941812" calcext:value-type="float">
            <text:p>0.61022718294181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12612542418087" calcext:value-type="float">
            <text:p>0.512612542418087</text:p>
          </table:table-cell>
          <table:table-cell table:style-name="ce2" table:formula="of:=RAND()" office:value-type="float" office:value="0.698897525713659" calcext:value-type="float">
            <text:p>0.698897525713659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93791340432364" calcext:value-type="float">
            <text:p>0.393791340432364</text:p>
          </table:table-cell>
          <table:table-cell table:style-name="ce2" table:formula="of:=RAND()" office:value-type="float" office:value="0.0280644171028405" calcext:value-type="float">
            <text:p>0.02806441710284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0343718393243879" calcext:value-type="float">
            <text:p>0.034371839324388</text:p>
          </table:table-cell>
          <table:table-cell table:style-name="ce2" table:formula="of:=RAND()" office:value-type="float" office:value="0.391523725596046" calcext:value-type="float">
            <text:p>0.39152372559604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59152784194706" calcext:value-type="float">
            <text:p>0.59152784194706</text:p>
          </table:table-cell>
          <table:table-cell table:style-name="ce2" table:formula="of:=RAND()" office:value-type="float" office:value="0.691696559737722" calcext:value-type="float">
            <text:p>0.69169655973772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91409433813351" calcext:value-type="float">
            <text:p>0.891409433813351</text:p>
          </table:table-cell>
          <table:table-cell table:style-name="ce2" table:formula="of:=RAND()" office:value-type="float" office:value="0.574130123346732" calcext:value-type="float">
            <text:p>0.574130123346732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834296237085713" calcext:value-type="float">
            <text:p>0.834296237085713</text:p>
          </table:table-cell>
          <table:table-cell table:style-name="ce2" table:formula="of:=RAND()" office:value-type="float" office:value="0.811573939630581" calcext:value-type="float">
            <text:p>0.81157393963058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716569454375419" calcext:value-type="float">
            <text:p>0.716569454375419</text:p>
          </table:table-cell>
          <table:table-cell table:style-name="ce2" table:formula="of:=RAND()" office:value-type="float" office:value="0.832325861287986" calcext:value-type="float">
            <text:p>0.832325861287986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218910789768586" calcext:value-type="float">
            <text:p>0.218910789768586</text:p>
          </table:table-cell>
          <table:table-cell table:style-name="ce2" table:formula="of:=RAND()" office:value-type="float" office:value="0.0417925211954971" calcext:value-type="float">
            <text:p>0.04179252119549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81158367740395" calcext:value-type="float">
            <text:p>0.481158367740395</text:p>
          </table:table-cell>
          <table:table-cell table:style-name="ce2" table:formula="of:=RAND()" office:value-type="float" office:value="0.62926956107213" calcext:value-type="float">
            <text:p>0.6292695610721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353949560507511" calcext:value-type="float">
            <text:p>0.353949560507511</text:p>
          </table:table-cell>
          <table:table-cell table:style-name="ce2" table:formula="of:=RAND()" office:value-type="float" office:value="0.398827497528837" calcext:value-type="float">
            <text:p>0.398827497528837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422889371494427" calcext:value-type="float">
            <text:p>0.422889371494427</text:p>
          </table:table-cell>
          <table:table-cell table:style-name="ce2" table:formula="of:=RAND()" office:value-type="float" office:value="0.85517428624691" calcext:value-type="float">
            <text:p>0.85517428624691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06778913984055" calcext:value-type="float">
            <text:p>0.906778913984055</text:p>
          </table:table-cell>
          <table:table-cell table:style-name="ce2" table:formula="of:=RAND()" office:value-type="float" office:value="0.320273869398533" calcext:value-type="float">
            <text:p>0.320273869398533</text:p>
          </table:table-cell>
          <table:table-cell table:number-columns-repeated="1022"/>
        </table:table-row>
        <table:table-row table:style-name="ro1">
          <table:table-cell table:style-name="ce2" table:formula="of:=RAND()" office:value-type="float" office:value="0.952268409201085" calcext:value-type="float">
            <text:p>0.952268409201085</text:p>
          </table:table-cell>
          <table:table-cell table:style-name="ce2" table:formula="of:=RAND()" office:value-type="float" office:value="0.710943155913607" calcext:value-type="float">
            <text:p>0.710943155913607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1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z1</text:p>
          </table:table-cell>
          <table:table-cell table:style-name="ce1" office:value-type="string" calcext:value-type="string">
            <text:p>z2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variance</text:p>
          </table:table-cell>
          <table:table-cell table:number-columns-repeated="1019"/>
        </table:table-row>
        <table:table-row table:style-name="ro1">
          <table:table-cell table:style-name="ce2" table:formula="of:=NORMINV([$U1.A2];0;1)" office:value-type="float" office:value="-2.19519410548471" calcext:value-type="float">
            <text:p>-2.19519410548471</text:p>
          </table:table-cell>
          <table:table-cell table:style-name="ce2" table:formula="of:=NORMINV([$U1.B2];0;1)" office:value-type="float" office:value="0.529786661487699" calcext:value-type="float">
            <text:p>0.529786661487699</text:p>
          </table:table-cell>
          <table:table-cell/>
          <table:table-cell table:style-name="ce2" table:formula="of:=AVERAGE([.A2:.A101])" office:value-type="float" office:value="-0.0162178269034481" calcext:value-type="float">
            <text:p>-0.016217826903448</text:p>
          </table:table-cell>
          <table:table-cell table:style-name="ce2" table:formula="of:=VAR([.A2:.A101])" office:value-type="float" office:value="1.24677572759433" calcext:value-type="float">
            <text:p>1.24677572759433</text:p>
          </table:table-cell>
          <table:table-cell table:number-columns-repeated="1019"/>
        </table:table-row>
        <table:table-row table:style-name="ro1">
          <table:table-cell table:style-name="ce2" table:formula="of:=NORMINV([$U1.A3];0;1)" office:value-type="float" office:value="-1.48431069819948" calcext:value-type="float">
            <text:p>-1.48431069819948</text:p>
          </table:table-cell>
          <table:table-cell table:style-name="ce2" table:formula="of:=NORMINV([$U1.B3];0;1)" office:value-type="float" office:value="-0.0205910092221853" calcext:value-type="float">
            <text:p>-0.020591009222185</text:p>
          </table:table-cell>
          <table:table-cell/>
          <table:table-cell table:style-name="ce2" table:formula="of:=AVERAGE([.B2:.B10])" office:value-type="float" office:value="0.224892440510793" calcext:value-type="float">
            <text:p>0.224892440510793</text:p>
          </table:table-cell>
          <table:table-cell table:style-name="ce2" table:formula="of:=VAR([.B2:.B101])" office:value-type="float" office:value="1.08378399075888" calcext:value-type="float">
            <text:p>1.08378399075888</text:p>
          </table:table-cell>
          <table:table-cell>
            <draw:frame table:end-cell-address="Z12.M20" table:end-x="19.67pt" table:end-y="10.49pt" draw:z-index="0" draw:name="Chart 1" draw:style-name="gr1" draw:text-style-name="P1" svg:width="449.97pt" svg:height="278.22pt" svg:x="60.75pt" svg:y="0pt">
              <draw:object draw:notify-on-update-of-ranges="Z12.B1:Z12.B1 Z12.B2:Z12.B1000 Z12.A2:Z12.A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table:formula="of:=NORMINV([$U1.A4];0;1)" office:value-type="float" office:value="0.227767605255332" calcext:value-type="float">
            <text:p>0.227767605255332</text:p>
          </table:table-cell>
          <table:table-cell table:style-name="ce2" table:formula="of:=NORMINV([$U1.B4];0;1)" office:value-type="float" office:value="-0.41857516923489" calcext:value-type="float">
            <text:p>-0.41857516923489</text:p>
          </table:table-cell>
          <table:table-cell/>
          <table:table-cell table:style-name="ce3" office:value-type="string" calcext:value-type="string">
            <text:p>Correlation coefficient</text:p>
          </table:table-cell>
          <table:table-cell table:number-columns-repeated="1020"/>
        </table:table-row>
        <table:table-row table:style-name="ro1">
          <table:table-cell table:style-name="ce2" table:formula="of:=NORMINV([$U1.A5];0;1)" office:value-type="float" office:value="-0.423169172065499" calcext:value-type="float">
            <text:p>-0.423169172065499</text:p>
          </table:table-cell>
          <table:table-cell table:style-name="ce2" table:formula="of:=NORMINV([$U1.B5];0;1)" office:value-type="float" office:value="0.561896387938093" calcext:value-type="float">
            <text:p>0.561896387938093</text:p>
          </table:table-cell>
          <table:table-cell/>
          <table:table-cell table:style-name="ce2" table:formula="of:=CORREL([.A2:.A101];[.B2:.B101])" office:value-type="float" office:value="0.0621790586668587" calcext:value-type="float">
            <text:p>0.062179058666859</text:p>
          </table:table-cell>
          <table:table-cell table:number-columns-repeated="1020"/>
        </table:table-row>
        <table:table-row table:style-name="ro1">
          <table:table-cell table:style-name="ce2" table:formula="of:=NORMINV([$U1.A6];0;1)" office:value-type="float" office:value="1.00249000160152" calcext:value-type="float">
            <text:p>1.00249000160152</text:p>
          </table:table-cell>
          <table:table-cell table:style-name="ce2" table:formula="of:=NORMINV([$U1.B6];0;1)" office:value-type="float" office:value="-0.467870464987629" calcext:value-type="float">
            <text:p>-0.467870464987629</text:p>
          </table:table-cell>
          <table:table-cell/>
          <table:table-cell table:style-name="ce3" office:value-type="string" calcext:value-type="string">
            <text:p>Upper Cholesky</text:p>
          </table:table-cell>
          <table:table-cell table:number-columns-repeated="1020"/>
        </table:table-row>
        <table:table-row table:style-name="ro1">
          <table:table-cell table:style-name="ce2" table:formula="of:=NORMINV([$U1.A7];0;1)" office:value-type="float" office:value="1.14171357977346" calcext:value-type="float">
            <text:p>1.14171357977346</text:p>
          </table:table-cell>
          <table:table-cell table:style-name="ce2" table:formula="of:=NORMINV([$U1.B7];0;1)" office:value-type="float" office:value="0.646782332353752" calcext:value-type="float">
            <text:p>0.646782332353752</text:p>
          </table:table-cell>
          <table:table-cell/>
          <table:table-cell table:style-name="ce2" table:formula="of:=SQRT(2)" office:value-type="float" office:value="1.414213562" calcext:value-type="float">
            <text:p>1.414213562</text:p>
          </table:table-cell>
          <table:table-cell table:style-name="ce2" table:formula="of:=SQRT(2)/2" office:value-type="float" office:value="0.7071067812" calcext:value-type="float">
            <text:p>0.7071067812</text:p>
          </table:table-cell>
          <table:table-cell table:number-columns-repeated="1019"/>
        </table:table-row>
        <table:table-row table:style-name="ro1">
          <table:table-cell table:style-name="ce2" table:formula="of:=NORMINV([$U1.A8];0;1)" office:value-type="float" office:value="-0.80027102650401" calcext:value-type="float">
            <text:p>-0.80027102650401</text:p>
          </table:table-cell>
          <table:table-cell table:style-name="ce2" table:formula="of:=NORMINV([$U1.B8];0;1)" office:value-type="float" office:value="2.09819636455349" calcext:value-type="float">
            <text:p>2.09819636455349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SQRT(2)/2" office:value-type="float" office:value="0.7071067812" calcext:value-type="float">
            <text:p>0.7071067812</text:p>
          </table:table-cell>
          <table:table-cell table:number-columns-repeated="1019"/>
        </table:table-row>
        <table:table-row table:style-name="ro1">
          <table:table-cell table:style-name="ce2" table:formula="of:=NORMINV([$U1.A9];0;1)" office:value-type="float" office:value="-1.12070282758236" calcext:value-type="float">
            <text:p>-1.12070282758236</text:p>
          </table:table-cell>
          <table:table-cell table:style-name="ce2" table:formula="of:=NORMINV([$U1.B9];0;1)" office:value-type="float" office:value="-0.293539779887389" calcext:value-type="float">
            <text:p>-0.293539779887389</text:p>
          </table:table-cell>
          <table:table-cell table:number-columns-repeated="1022"/>
        </table:table-row>
        <table:table-row table:style-name="ro1">
          <table:table-cell table:style-name="ce2" table:formula="of:=NORMINV([$U1.A10];0;1)" office:value-type="float" office:value="-1.00778925907882" calcext:value-type="float">
            <text:p>-1.00778925907882</text:p>
          </table:table-cell>
          <table:table-cell table:style-name="ce2" table:formula="of:=NORMINV([$U1.B10];0;1)" office:value-type="float" office:value="-0.612053358403799" calcext:value-type="float">
            <text:p>-0.612053358403799</text:p>
          </table:table-cell>
          <table:table-cell table:number-columns-repeated="1022"/>
        </table:table-row>
        <table:table-row table:style-name="ro1">
          <table:table-cell table:style-name="ce2" table:formula="of:=NORMINV([$U1.A11];0;1)" office:value-type="float" office:value="-0.614496306395905" calcext:value-type="float">
            <text:p>-0.614496306395905</text:p>
          </table:table-cell>
          <table:table-cell table:style-name="ce2" table:formula="of:=NORMINV([$U1.B11];0;1)" office:value-type="float" office:value="-0.403988670095721" calcext:value-type="float">
            <text:p>-0.403988670095721</text:p>
          </table:table-cell>
          <table:table-cell table:number-columns-repeated="1022"/>
        </table:table-row>
        <table:table-row table:style-name="ro1">
          <table:table-cell table:style-name="ce2" table:formula="of:=NORMINV([$U1.A12];0;1)" office:value-type="float" office:value="1.12679017423146" calcext:value-type="float">
            <text:p>1.12679017423146</text:p>
          </table:table-cell>
          <table:table-cell table:style-name="ce2" table:formula="of:=NORMINV([$U1.B12];0;1)" office:value-type="float" office:value="2.29960256014627" calcext:value-type="float">
            <text:p>2.29960256014627</text:p>
          </table:table-cell>
          <table:table-cell table:number-columns-repeated="1022"/>
        </table:table-row>
        <table:table-row table:style-name="ro1">
          <table:table-cell table:style-name="ce2" table:formula="of:=NORMINV([$U1.A13];0;1)" office:value-type="float" office:value="1.62943888695306" calcext:value-type="float">
            <text:p>1.62943888695306</text:p>
          </table:table-cell>
          <table:table-cell table:style-name="ce2" table:formula="of:=NORMINV([$U1.B13];0;1)" office:value-type="float" office:value="-1.56740933813274" calcext:value-type="float">
            <text:p>-1.56740933813274</text:p>
          </table:table-cell>
          <table:table-cell table:number-columns-repeated="1022"/>
        </table:table-row>
        <table:table-row table:style-name="ro1">
          <table:table-cell table:style-name="ce2" table:formula="of:=NORMINV([$U1.A14];0;1)" office:value-type="float" office:value="-0.659212532780036" calcext:value-type="float">
            <text:p>-0.659212532780036</text:p>
          </table:table-cell>
          <table:table-cell table:style-name="ce2" table:formula="of:=NORMINV([$U1.B14];0;1)" office:value-type="float" office:value="-0.632138595470652" calcext:value-type="float">
            <text:p>-0.632138595470652</text:p>
          </table:table-cell>
          <table:table-cell table:number-columns-repeated="1022"/>
        </table:table-row>
        <table:table-row table:style-name="ro1">
          <table:table-cell table:style-name="ce2" table:formula="of:=NORMINV([$U1.A15];0;1)" office:value-type="float" office:value="-0.401557392355387" calcext:value-type="float">
            <text:p>-0.401557392355387</text:p>
          </table:table-cell>
          <table:table-cell table:style-name="ce2" table:formula="of:=NORMINV([$U1.B15];0;1)" office:value-type="float" office:value="0.109432666579692" calcext:value-type="float">
            <text:p>0.109432666579692</text:p>
          </table:table-cell>
          <table:table-cell table:number-columns-repeated="1022"/>
        </table:table-row>
        <table:table-row table:style-name="ro1">
          <table:table-cell table:style-name="ce2" table:formula="of:=NORMINV([$U1.A16];0;1)" office:value-type="float" office:value="1.40337647666158" calcext:value-type="float">
            <text:p>1.40337647666158</text:p>
          </table:table-cell>
          <table:table-cell table:style-name="ce2" table:formula="of:=NORMINV([$U1.B16];0;1)" office:value-type="float" office:value="-0.322222403541681" calcext:value-type="float">
            <text:p>-0.322222403541681</text:p>
          </table:table-cell>
          <table:table-cell table:number-columns-repeated="1022"/>
        </table:table-row>
        <table:table-row table:style-name="ro1">
          <table:table-cell table:style-name="ce2" table:formula="of:=NORMINV([$U1.A17];0;1)" office:value-type="float" office:value="0.166150353561868" calcext:value-type="float">
            <text:p>0.166150353561868</text:p>
          </table:table-cell>
          <table:table-cell table:style-name="ce2" table:formula="of:=NORMINV([$U1.B17];0;1)" office:value-type="float" office:value="0.677020010469493" calcext:value-type="float">
            <text:p>0.677020010469493</text:p>
          </table:table-cell>
          <table:table-cell table:number-columns-repeated="1022"/>
        </table:table-row>
        <table:table-row table:style-name="ro1">
          <table:table-cell table:style-name="ce2" table:formula="of:=NORMINV([$U1.A18];0;1)" office:value-type="float" office:value="1.11668158413287" calcext:value-type="float">
            <text:p>1.11668158413287</text:p>
          </table:table-cell>
          <table:table-cell table:style-name="ce2" table:formula="of:=NORMINV([$U1.B18];0;1)" office:value-type="float" office:value="0.28287517935983" calcext:value-type="float">
            <text:p>0.28287517935983</text:p>
          </table:table-cell>
          <table:table-cell table:number-columns-repeated="1022"/>
        </table:table-row>
        <table:table-row table:style-name="ro1">
          <table:table-cell table:style-name="ce2" table:formula="of:=NORMINV([$U1.A19];0;1)" office:value-type="float" office:value="-1.78430634111973" calcext:value-type="float">
            <text:p>-1.78430634111973</text:p>
          </table:table-cell>
          <table:table-cell table:style-name="ce2" table:formula="of:=NORMINV([$U1.B19];0;1)" office:value-type="float" office:value="-1.3796493763667" calcext:value-type="float">
            <text:p>-1.3796493763667</text:p>
          </table:table-cell>
          <table:table-cell table:number-columns-repeated="1022"/>
        </table:table-row>
        <table:table-row table:style-name="ro1">
          <table:table-cell table:style-name="ce2" table:formula="of:=NORMINV([$U1.A20];0;1)" office:value-type="float" office:value="0.165714907971024" calcext:value-type="float">
            <text:p>0.165714907971024</text:p>
          </table:table-cell>
          <table:table-cell table:style-name="ce2" table:formula="of:=NORMINV([$U1.B20];0;1)" office:value-type="float" office:value="-2.87395138163157" calcext:value-type="float">
            <text:p>-2.87395138163157</text:p>
          </table:table-cell>
          <table:table-cell table:number-columns-repeated="1022"/>
        </table:table-row>
        <table:table-row table:style-name="ro1">
          <table:table-cell table:style-name="ce2" table:formula="of:=NORMINV([$U1.A21];0;1)" office:value-type="float" office:value="-1.56405486934098" calcext:value-type="float">
            <text:p>-1.56405486934098</text:p>
          </table:table-cell>
          <table:table-cell table:style-name="ce2" table:formula="of:=NORMINV([$U1.B21];0;1)" office:value-type="float" office:value="-0.299489214657734" calcext:value-type="float">
            <text:p>-0.299489214657734</text:p>
          </table:table-cell>
          <table:table-cell table:number-columns-repeated="1022"/>
        </table:table-row>
        <table:table-row table:style-name="ro1">
          <table:table-cell table:style-name="ce2" table:formula="of:=NORMINV([$U1.A22];0;1)" office:value-type="float" office:value="0.291618454098968" calcext:value-type="float">
            <text:p>0.291618454098968</text:p>
          </table:table-cell>
          <table:table-cell table:style-name="ce2" table:formula="of:=NORMINV([$U1.B22];0;1)" office:value-type="float" office:value="-0.124352580486038" calcext:value-type="float">
            <text:p>-0.124352580486038</text:p>
          </table:table-cell>
          <table:table-cell table:number-columns-repeated="1022"/>
        </table:table-row>
        <table:table-row table:style-name="ro1">
          <table:table-cell table:style-name="ce2" table:formula="of:=NORMINV([$U1.A23];0;1)" office:value-type="float" office:value="0.564589916442278" calcext:value-type="float">
            <text:p>0.564589916442278</text:p>
          </table:table-cell>
          <table:table-cell table:style-name="ce2" table:formula="of:=NORMINV([$U1.B23];0;1)" office:value-type="float" office:value="-0.410634411310758" calcext:value-type="float">
            <text:p>-0.410634411310758</text:p>
          </table:table-cell>
          <table:table-cell table:number-columns-repeated="1022"/>
        </table:table-row>
        <table:table-row table:style-name="ro1">
          <table:table-cell table:style-name="ce2" table:formula="of:=NORMINV([$U1.A24];0;1)" office:value-type="float" office:value="0.793047098455084" calcext:value-type="float">
            <text:p>0.793047098455084</text:p>
          </table:table-cell>
          <table:table-cell table:style-name="ce2" table:formula="of:=NORMINV([$U1.B24];0;1)" office:value-type="float" office:value="-1.8738066103927" calcext:value-type="float">
            <text:p>-1.8738066103927</text:p>
          </table:table-cell>
          <table:table-cell table:number-columns-repeated="1022"/>
        </table:table-row>
        <table:table-row table:style-name="ro1">
          <table:table-cell table:style-name="ce2" table:formula="of:=NORMINV([$U1.A25];0;1)" office:value-type="float" office:value="-0.580052093311261" calcext:value-type="float">
            <text:p>-0.580052093311261</text:p>
          </table:table-cell>
          <table:table-cell table:style-name="ce2" table:formula="of:=NORMINV([$U1.B25];0;1)" office:value-type="float" office:value="-0.441730124329378" calcext:value-type="float">
            <text:p>-0.441730124329378</text:p>
          </table:table-cell>
          <table:table-cell table:number-columns-repeated="1022"/>
        </table:table-row>
        <table:table-row table:style-name="ro1">
          <table:table-cell table:style-name="ce2" table:formula="of:=NORMINV([$U1.A26];0;1)" office:value-type="float" office:value="0.276326089420024" calcext:value-type="float">
            <text:p>0.276326089420024</text:p>
          </table:table-cell>
          <table:table-cell table:style-name="ce2" table:formula="of:=NORMINV([$U1.B26];0;1)" office:value-type="float" office:value="-0.546337379503751" calcext:value-type="float">
            <text:p>-0.546337379503751</text:p>
          </table:table-cell>
          <table:table-cell table:number-columns-repeated="1022"/>
        </table:table-row>
        <table:table-row table:style-name="ro1">
          <table:table-cell table:style-name="ce2" table:formula="of:=NORMINV([$U1.A27];0;1)" office:value-type="float" office:value="-0.00140665977370313" calcext:value-type="float">
            <text:p>-0.001406659773703</text:p>
          </table:table-cell>
          <table:table-cell table:style-name="ce2" table:formula="of:=NORMINV([$U1.B27];0;1)" office:value-type="float" office:value="-2.54709686956697" calcext:value-type="float">
            <text:p>-2.54709686956697</text:p>
          </table:table-cell>
          <table:table-cell table:number-columns-repeated="1022"/>
        </table:table-row>
        <table:table-row table:style-name="ro1">
          <table:table-cell table:style-name="ce2" table:formula="of:=NORMINV([$U1.A28];0;1)" office:value-type="float" office:value="1.33894819408656" calcext:value-type="float">
            <text:p>1.33894819408656</text:p>
          </table:table-cell>
          <table:table-cell table:style-name="ce2" table:formula="of:=NORMINV([$U1.B28];0;1)" office:value-type="float" office:value="-1.50886146074106" calcext:value-type="float">
            <text:p>-1.50886146074106</text:p>
          </table:table-cell>
          <table:table-cell table:number-columns-repeated="1022"/>
        </table:table-row>
        <table:table-row table:style-name="ro1">
          <table:table-cell table:style-name="ce2" table:formula="of:=NORMINV([$U1.A29];0;1)" office:value-type="float" office:value="1.05160005433744" calcext:value-type="float">
            <text:p>1.05160005433744</text:p>
          </table:table-cell>
          <table:table-cell table:style-name="ce2" table:formula="of:=NORMINV([$U1.B29];0;1)" office:value-type="float" office:value="0.680073439043011" calcext:value-type="float">
            <text:p>0.680073439043011</text:p>
          </table:table-cell>
          <table:table-cell table:number-columns-repeated="1022"/>
        </table:table-row>
        <table:table-row table:style-name="ro1">
          <table:table-cell table:style-name="ce2" table:formula="of:=NORMINV([$U1.A30];0;1)" office:value-type="float" office:value="-0.0441495811518791" calcext:value-type="float">
            <text:p>-0.044149581151879</text:p>
          </table:table-cell>
          <table:table-cell table:style-name="ce2" table:formula="of:=NORMINV([$U1.B30];0;1)" office:value-type="float" office:value="-0.155467499798747" calcext:value-type="float">
            <text:p>-0.155467499798747</text:p>
          </table:table-cell>
          <table:table-cell table:number-columns-repeated="1022"/>
        </table:table-row>
        <table:table-row table:style-name="ro1">
          <table:table-cell table:style-name="ce2" table:formula="of:=NORMINV([$U1.A31];0;1)" office:value-type="float" office:value="-0.813767096425297" calcext:value-type="float">
            <text:p>-0.813767096425297</text:p>
          </table:table-cell>
          <table:table-cell table:style-name="ce2" table:formula="of:=NORMINV([$U1.B31];0;1)" office:value-type="float" office:value="0.0191767987180786" calcext:value-type="float">
            <text:p>0.019176798718079</text:p>
          </table:table-cell>
          <table:table-cell table:number-columns-repeated="1022"/>
        </table:table-row>
        <table:table-row table:style-name="ro1">
          <table:table-cell table:style-name="ce2" table:formula="of:=NORMINV([$U1.A32];0;1)" office:value-type="float" office:value="1.08070964723263" calcext:value-type="float">
            <text:p>1.08070964723263</text:p>
          </table:table-cell>
          <table:table-cell table:style-name="ce2" table:formula="of:=NORMINV([$U1.B32];0;1)" office:value-type="float" office:value="-0.823266740361076" calcext:value-type="float">
            <text:p>-0.823266740361076</text:p>
          </table:table-cell>
          <table:table-cell table:number-columns-repeated="1022"/>
        </table:table-row>
        <table:table-row table:style-name="ro1">
          <table:table-cell table:style-name="ce2" table:formula="of:=NORMINV([$U1.A33];0;1)" office:value-type="float" office:value="-1.38144259310721" calcext:value-type="float">
            <text:p>-1.38144259310721</text:p>
          </table:table-cell>
          <table:table-cell table:style-name="ce2" table:formula="of:=NORMINV([$U1.B33];0;1)" office:value-type="float" office:value="1.84221041507452" calcext:value-type="float">
            <text:p>1.84221041507452</text:p>
          </table:table-cell>
          <table:table-cell table:number-columns-repeated="1022"/>
        </table:table-row>
        <table:table-row table:style-name="ro1">
          <table:table-cell table:style-name="ce2" table:formula="of:=NORMINV([$U1.A34];0;1)" office:value-type="float" office:value="-1.45527481080128" calcext:value-type="float">
            <text:p>-1.45527481080128</text:p>
          </table:table-cell>
          <table:table-cell table:style-name="ce2" table:formula="of:=NORMINV([$U1.B34];0;1)" office:value-type="float" office:value="0.670439030181381" calcext:value-type="float">
            <text:p>0.670439030181381</text:p>
          </table:table-cell>
          <table:table-cell table:number-columns-repeated="1022"/>
        </table:table-row>
        <table:table-row table:style-name="ro1">
          <table:table-cell table:style-name="ce2" table:formula="of:=NORMINV([$U1.A35];0;1)" office:value-type="float" office:value="-1.68521163495909" calcext:value-type="float">
            <text:p>-1.68521163495909</text:p>
          </table:table-cell>
          <table:table-cell table:style-name="ce2" table:formula="of:=NORMINV([$U1.B35];0;1)" office:value-type="float" office:value="0.577771848687727" calcext:value-type="float">
            <text:p>0.577771848687727</text:p>
          </table:table-cell>
          <table:table-cell table:number-columns-repeated="1022"/>
        </table:table-row>
        <table:table-row table:style-name="ro1">
          <table:table-cell table:style-name="ce2" table:formula="of:=NORMINV([$U1.A36];0;1)" office:value-type="float" office:value="0.413948009133692" calcext:value-type="float">
            <text:p>0.413948009133692</text:p>
          </table:table-cell>
          <table:table-cell table:style-name="ce2" table:formula="of:=NORMINV([$U1.B36];0;1)" office:value-type="float" office:value="-0.754692557442852" calcext:value-type="float">
            <text:p>-0.754692557442852</text:p>
          </table:table-cell>
          <table:table-cell table:number-columns-repeated="1022"/>
        </table:table-row>
        <table:table-row table:style-name="ro1">
          <table:table-cell table:style-name="ce2" table:formula="of:=NORMINV([$U1.A37];0;1)" office:value-type="float" office:value="-1.30888661847202" calcext:value-type="float">
            <text:p>-1.30888661847202</text:p>
          </table:table-cell>
          <table:table-cell table:style-name="ce2" table:formula="of:=NORMINV([$U1.B37];0;1)" office:value-type="float" office:value="-0.955351275650066" calcext:value-type="float">
            <text:p>-0.955351275650066</text:p>
          </table:table-cell>
          <table:table-cell table:number-columns-repeated="1022"/>
        </table:table-row>
        <table:table-row table:style-name="ro1">
          <table:table-cell table:style-name="ce2" table:formula="of:=NORMINV([$U1.A38];0;1)" office:value-type="float" office:value="-0.206850389907284" calcext:value-type="float">
            <text:p>-0.206850389907284</text:p>
          </table:table-cell>
          <table:table-cell table:style-name="ce2" table:formula="of:=NORMINV([$U1.B38];0;1)" office:value-type="float" office:value="-0.928989784719164" calcext:value-type="float">
            <text:p>-0.928989784719164</text:p>
          </table:table-cell>
          <table:table-cell table:number-columns-repeated="1022"/>
        </table:table-row>
        <table:table-row table:style-name="ro1">
          <table:table-cell table:style-name="ce2" table:formula="of:=NORMINV([$U1.A39];0;1)" office:value-type="float" office:value="-0.281614349901659" calcext:value-type="float">
            <text:p>-0.281614349901659</text:p>
          </table:table-cell>
          <table:table-cell table:style-name="ce2" table:formula="of:=NORMINV([$U1.B39];0;1)" office:value-type="float" office:value="0.0299658660759004" calcext:value-type="float">
            <text:p>0.029965866075901</text:p>
          </table:table-cell>
          <table:table-cell table:number-columns-repeated="1022"/>
        </table:table-row>
        <table:table-row table:style-name="ro1">
          <table:table-cell table:style-name="ce2" table:formula="of:=NORMINV([$U1.A40];0;1)" office:value-type="float" office:value="1.2964955895386" calcext:value-type="float">
            <text:p>1.2964955895386</text:p>
          </table:table-cell>
          <table:table-cell table:style-name="ce2" table:formula="of:=NORMINV([$U1.B40];0;1)" office:value-type="float" office:value="-2.60553035673763" calcext:value-type="float">
            <text:p>-2.60553035673763</text:p>
          </table:table-cell>
          <table:table-cell table:number-columns-repeated="1022"/>
        </table:table-row>
        <table:table-row table:style-name="ro1">
          <table:table-cell table:style-name="ce2" table:formula="of:=NORMINV([$U1.A41];0;1)" office:value-type="float" office:value="2.25956894727331" calcext:value-type="float">
            <text:p>2.25956894727331</text:p>
          </table:table-cell>
          <table:table-cell table:style-name="ce2" table:formula="of:=NORMINV([$U1.B41];0;1)" office:value-type="float" office:value="0.482271686222309" calcext:value-type="float">
            <text:p>0.482271686222309</text:p>
          </table:table-cell>
          <table:table-cell table:number-columns-repeated="1022"/>
        </table:table-row>
        <table:table-row table:style-name="ro1">
          <table:table-cell table:style-name="ce2" table:formula="of:=NORMINV([$U1.A42];0;1)" office:value-type="float" office:value="-0.248500167796337" calcext:value-type="float">
            <text:p>-0.248500167796337</text:p>
          </table:table-cell>
          <table:table-cell table:style-name="ce2" table:formula="of:=NORMINV([$U1.B42];0;1)" office:value-type="float" office:value="1.03883824529934" calcext:value-type="float">
            <text:p>1.03883824529934</text:p>
          </table:table-cell>
          <table:table-cell table:number-columns-repeated="1022"/>
        </table:table-row>
        <table:table-row table:style-name="ro1">
          <table:table-cell table:style-name="ce2" table:formula="of:=NORMINV([$U1.A43];0;1)" office:value-type="float" office:value="0.35390802424335" calcext:value-type="float">
            <text:p>0.35390802424335</text:p>
          </table:table-cell>
          <table:table-cell table:style-name="ce2" table:formula="of:=NORMINV([$U1.B43];0;1)" office:value-type="float" office:value="-1.74494226667536" calcext:value-type="float">
            <text:p>-1.74494226667536</text:p>
          </table:table-cell>
          <table:table-cell table:number-columns-repeated="1022"/>
        </table:table-row>
        <table:table-row table:style-name="ro1">
          <table:table-cell table:style-name="ce2" table:formula="of:=NORMINV([$U1.A44];0;1)" office:value-type="float" office:value="0.0901957837987304" calcext:value-type="float">
            <text:p>0.09019578379873</text:p>
          </table:table-cell>
          <table:table-cell table:style-name="ce2" table:formula="of:=NORMINV([$U1.B44];0;1)" office:value-type="float" office:value="-0.507629573522094" calcext:value-type="float">
            <text:p>-0.507629573522094</text:p>
          </table:table-cell>
          <table:table-cell table:number-columns-repeated="1022"/>
        </table:table-row>
        <table:table-row table:style-name="ro1">
          <table:table-cell table:style-name="ce2" table:formula="of:=NORMINV([$U1.A45];0;1)" office:value-type="float" office:value="-0.814506201535906" calcext:value-type="float">
            <text:p>-0.814506201535906</text:p>
          </table:table-cell>
          <table:table-cell table:style-name="ce2" table:formula="of:=NORMINV([$U1.B45];0;1)" office:value-type="float" office:value="0.455071356114054" calcext:value-type="float">
            <text:p>0.455071356114054</text:p>
          </table:table-cell>
          <table:table-cell table:number-columns-repeated="1022"/>
        </table:table-row>
        <table:table-row table:style-name="ro1">
          <table:table-cell table:style-name="ce2" table:formula="of:=NORMINV([$U1.A46];0;1)" office:value-type="float" office:value="0.138644192455585" calcext:value-type="float">
            <text:p>0.138644192455585</text:p>
          </table:table-cell>
          <table:table-cell table:style-name="ce2" table:formula="of:=NORMINV([$U1.B46];0;1)" office:value-type="float" office:value="-0.836736825712085" calcext:value-type="float">
            <text:p>-0.836736825712085</text:p>
          </table:table-cell>
          <table:table-cell table:number-columns-repeated="1022"/>
        </table:table-row>
        <table:table-row table:style-name="ro1">
          <table:table-cell table:style-name="ce2" table:formula="of:=NORMINV([$U1.A47];0;1)" office:value-type="float" office:value="-2.12329829545224" calcext:value-type="float">
            <text:p>-2.12329829545224</text:p>
          </table:table-cell>
          <table:table-cell table:style-name="ce2" table:formula="of:=NORMINV([$U1.B47];0;1)" office:value-type="float" office:value="0.79761223111177" calcext:value-type="float">
            <text:p>0.79761223111177</text:p>
          </table:table-cell>
          <table:table-cell table:number-columns-repeated="1022"/>
        </table:table-row>
        <table:table-row table:style-name="ro1">
          <table:table-cell table:style-name="ce2" table:formula="of:=NORMINV([$U1.A48];0;1)" office:value-type="float" office:value="0.339403316469655" calcext:value-type="float">
            <text:p>0.339403316469655</text:p>
          </table:table-cell>
          <table:table-cell table:style-name="ce2" table:formula="of:=NORMINV([$U1.B48];0;1)" office:value-type="float" office:value="1.09688209691658" calcext:value-type="float">
            <text:p>1.09688209691658</text:p>
          </table:table-cell>
          <table:table-cell table:number-columns-repeated="1022"/>
        </table:table-row>
        <table:table-row table:style-name="ro1">
          <table:table-cell table:style-name="ce2" table:formula="of:=NORMINV([$U1.A49];0;1)" office:value-type="float" office:value="0.674285789859991" calcext:value-type="float">
            <text:p>0.674285789859991</text:p>
          </table:table-cell>
          <table:table-cell table:style-name="ce2" table:formula="of:=NORMINV([$U1.B49];0;1)" office:value-type="float" office:value="1.15372264535202" calcext:value-type="float">
            <text:p>1.15372264535202</text:p>
          </table:table-cell>
          <table:table-cell table:number-columns-repeated="1022"/>
        </table:table-row>
        <table:table-row table:style-name="ro1">
          <table:table-cell table:style-name="ce2" table:formula="of:=NORMINV([$U1.A50];0;1)" office:value-type="float" office:value="-0.287908642166371" calcext:value-type="float">
            <text:p>-0.287908642166371</text:p>
          </table:table-cell>
          <table:table-cell table:style-name="ce2" table:formula="of:=NORMINV([$U1.B50];0;1)" office:value-type="float" office:value="-0.301964627116587" calcext:value-type="float">
            <text:p>-0.301964627116587</text:p>
          </table:table-cell>
          <table:table-cell table:number-columns-repeated="1022"/>
        </table:table-row>
        <table:table-row table:style-name="ro1">
          <table:table-cell table:style-name="ce2" table:formula="of:=NORMINV([$U1.A51];0;1)" office:value-type="float" office:value="-0.362390733219099" calcext:value-type="float">
            <text:p>-0.362390733219099</text:p>
          </table:table-cell>
          <table:table-cell table:style-name="ce2" table:formula="of:=NORMINV([$U1.B51];0;1)" office:value-type="float" office:value="2.07405905465044" calcext:value-type="float">
            <text:p>2.07405905465044</text:p>
          </table:table-cell>
          <table:table-cell table:number-columns-repeated="1022"/>
        </table:table-row>
        <table:table-row table:style-name="ro1">
          <table:table-cell table:style-name="ce2" table:formula="of:=NORMINV([$U1.A52];0;1)" office:value-type="float" office:value="-0.296162491447338" calcext:value-type="float">
            <text:p>-0.296162491447338</text:p>
          </table:table-cell>
          <table:table-cell table:style-name="ce2" table:formula="of:=NORMINV([$U1.B52];0;1)" office:value-type="float" office:value="-0.00686458574643324" calcext:value-type="float">
            <text:p>-0.006864585746433</text:p>
          </table:table-cell>
          <table:table-cell table:number-columns-repeated="1022"/>
        </table:table-row>
        <table:table-row table:style-name="ro1">
          <table:table-cell table:style-name="ce2" table:formula="of:=NORMINV([$U1.A53];0;1)" office:value-type="float" office:value="0.0182516327550004" calcext:value-type="float">
            <text:p>0.018251632755</text:p>
          </table:table-cell>
          <table:table-cell table:style-name="ce2" table:formula="of:=NORMINV([$U1.B53];0;1)" office:value-type="float" office:value="-0.335832602239587" calcext:value-type="float">
            <text:p>-0.335832602239587</text:p>
          </table:table-cell>
          <table:table-cell table:number-columns-repeated="1022"/>
        </table:table-row>
        <table:table-row table:style-name="ro1">
          <table:table-cell table:style-name="ce2" table:formula="of:=NORMINV([$U1.A54];0;1)" office:value-type="float" office:value="1.35957424078381" calcext:value-type="float">
            <text:p>1.35957424078381</text:p>
          </table:table-cell>
          <table:table-cell table:style-name="ce2" table:formula="of:=NORMINV([$U1.B54];0;1)" office:value-type="float" office:value="0.373469149240188" calcext:value-type="float">
            <text:p>0.373469149240188</text:p>
          </table:table-cell>
          <table:table-cell table:number-columns-repeated="1022"/>
        </table:table-row>
        <table:table-row table:style-name="ro1">
          <table:table-cell table:style-name="ce2" table:formula="of:=NORMINV([$U1.A55];0;1)" office:value-type="float" office:value="0.179373197493044" calcext:value-type="float">
            <text:p>0.179373197493044</text:p>
          </table:table-cell>
          <table:table-cell table:style-name="ce2" table:formula="of:=NORMINV([$U1.B55];0;1)" office:value-type="float" office:value="1.20352842931974" calcext:value-type="float">
            <text:p>1.20352842931974</text:p>
          </table:table-cell>
          <table:table-cell table:number-columns-repeated="1022"/>
        </table:table-row>
        <table:table-row table:style-name="ro1">
          <table:table-cell table:style-name="ce2" table:formula="of:=NORMINV([$U1.A56];0;1)" office:value-type="float" office:value="2.41128000557076" calcext:value-type="float">
            <text:p>2.41128000557076</text:p>
          </table:table-cell>
          <table:table-cell table:style-name="ce2" table:formula="of:=NORMINV([$U1.B56];0;1)" office:value-type="float" office:value="0.235073536640675" calcext:value-type="float">
            <text:p>0.235073536640675</text:p>
          </table:table-cell>
          <table:table-cell table:number-columns-repeated="1022"/>
        </table:table-row>
        <table:table-row table:style-name="ro1">
          <table:table-cell table:style-name="ce2" table:formula="of:=NORMINV([$U1.A57];0;1)" office:value-type="float" office:value="-0.454005587335963" calcext:value-type="float">
            <text:p>-0.454005587335963</text:p>
          </table:table-cell>
          <table:table-cell table:style-name="ce2" table:formula="of:=NORMINV([$U1.B57];0;1)" office:value-type="float" office:value="1.35176444270165" calcext:value-type="float">
            <text:p>1.35176444270165</text:p>
          </table:table-cell>
          <table:table-cell table:number-columns-repeated="1022"/>
        </table:table-row>
        <table:table-row table:style-name="ro1">
          <table:table-cell table:style-name="ce2" table:formula="of:=NORMINV([$U1.A58];0;1)" office:value-type="float" office:value="0.87295788974574" calcext:value-type="float">
            <text:p>0.87295788974574</text:p>
          </table:table-cell>
          <table:table-cell table:style-name="ce2" table:formula="of:=NORMINV([$U1.B58];0;1)" office:value-type="float" office:value="-0.972336115952652" calcext:value-type="float">
            <text:p>-0.972336115952652</text:p>
          </table:table-cell>
          <table:table-cell table:number-columns-repeated="1022"/>
        </table:table-row>
        <table:table-row table:style-name="ro1">
          <table:table-cell table:style-name="ce2" table:formula="of:=NORMINV([$U1.A59];0;1)" office:value-type="float" office:value="0.745254357076652" calcext:value-type="float">
            <text:p>0.745254357076652</text:p>
          </table:table-cell>
          <table:table-cell table:style-name="ce2" table:formula="of:=NORMINV([$U1.B59];0;1)" office:value-type="float" office:value="1.42799996793149" calcext:value-type="float">
            <text:p>1.42799996793149</text:p>
          </table:table-cell>
          <table:table-cell table:number-columns-repeated="1022"/>
        </table:table-row>
        <table:table-row table:style-name="ro1">
          <table:table-cell table:style-name="ce2" table:formula="of:=NORMINV([$U1.A60];0;1)" office:value-type="float" office:value="-0.111058382586879" calcext:value-type="float">
            <text:p>-0.111058382586879</text:p>
          </table:table-cell>
          <table:table-cell table:style-name="ce2" table:formula="of:=NORMINV([$U1.B60];0;1)" office:value-type="float" office:value="0.670008275871385" calcext:value-type="float">
            <text:p>0.670008275871385</text:p>
          </table:table-cell>
          <table:table-cell table:number-columns-repeated="1022"/>
        </table:table-row>
        <table:table-row table:style-name="ro1">
          <table:table-cell table:style-name="ce2" table:formula="of:=NORMINV([$U1.A61];0;1)" office:value-type="float" office:value="-0.0886048039492638" calcext:value-type="float">
            <text:p>-0.088604803949264</text:p>
          </table:table-cell>
          <table:table-cell table:style-name="ce2" table:formula="of:=NORMINV([$U1.B61];0;1)" office:value-type="float" office:value="-0.281737182456962" calcext:value-type="float">
            <text:p>-0.281737182456962</text:p>
          </table:table-cell>
          <table:table-cell table:number-columns-repeated="1022"/>
        </table:table-row>
        <table:table-row table:style-name="ro1">
          <table:table-cell table:style-name="ce2" table:formula="of:=NORMINV([$U1.A62];0;1)" office:value-type="float" office:value="-0.806552197052181" calcext:value-type="float">
            <text:p>-0.806552197052181</text:p>
          </table:table-cell>
          <table:table-cell table:style-name="ce2" table:formula="of:=NORMINV([$U1.B62];0;1)" office:value-type="float" office:value="-1.83259913155897" calcext:value-type="float">
            <text:p>-1.83259913155897</text:p>
          </table:table-cell>
          <table:table-cell table:number-columns-repeated="1022"/>
        </table:table-row>
        <table:table-row table:style-name="ro1">
          <table:table-cell table:style-name="ce2" table:formula="of:=NORMINV([$U1.A63];0;1)" office:value-type="float" office:value="-0.837669116647158" calcext:value-type="float">
            <text:p>-0.837669116647158</text:p>
          </table:table-cell>
          <table:table-cell table:style-name="ce2" table:formula="of:=NORMINV([$U1.B63];0;1)" office:value-type="float" office:value="-0.894278762628125" calcext:value-type="float">
            <text:p>-0.894278762628125</text:p>
          </table:table-cell>
          <table:table-cell table:number-columns-repeated="1022"/>
        </table:table-row>
        <table:table-row table:style-name="ro1">
          <table:table-cell table:style-name="ce2" table:formula="of:=NORMINV([$U1.A64];0;1)" office:value-type="float" office:value="1.30218436195408" calcext:value-type="float">
            <text:p>1.30218436195408</text:p>
          </table:table-cell>
          <table:table-cell table:style-name="ce2" table:formula="of:=NORMINV([$U1.B64];0;1)" office:value-type="float" office:value="-0.445076048289432" calcext:value-type="float">
            <text:p>-0.445076048289432</text:p>
          </table:table-cell>
          <table:table-cell table:number-columns-repeated="1022"/>
        </table:table-row>
        <table:table-row table:style-name="ro1">
          <table:table-cell table:style-name="ce2" table:formula="of:=NORMINV([$U1.A65];0;1)" office:value-type="float" office:value="-0.325682517918048" calcext:value-type="float">
            <text:p>-0.325682517918048</text:p>
          </table:table-cell>
          <table:table-cell table:style-name="ce2" table:formula="of:=NORMINV([$U1.B65];0;1)" office:value-type="float" office:value="1.87559416868187" calcext:value-type="float">
            <text:p>1.87559416868187</text:p>
          </table:table-cell>
          <table:table-cell table:number-columns-repeated="1022"/>
        </table:table-row>
        <table:table-row table:style-name="ro1">
          <table:table-cell table:style-name="ce2" table:formula="of:=NORMINV([$U1.A66];0;1)" office:value-type="float" office:value="-1.88638180558547" calcext:value-type="float">
            <text:p>-1.88638180558547</text:p>
          </table:table-cell>
          <table:table-cell table:style-name="ce2" table:formula="of:=NORMINV([$U1.B66];0;1)" office:value-type="float" office:value="-0.765857246660505" calcext:value-type="float">
            <text:p>-0.765857246660505</text:p>
          </table:table-cell>
          <table:table-cell table:number-columns-repeated="1022"/>
        </table:table-row>
        <table:table-row table:style-name="ro1">
          <table:table-cell table:style-name="ce2" table:formula="of:=NORMINV([$U1.A67];0;1)" office:value-type="float" office:value="0.654388804784126" calcext:value-type="float">
            <text:p>0.654388804784126</text:p>
          </table:table-cell>
          <table:table-cell table:style-name="ce2" table:formula="of:=NORMINV([$U1.B67];0;1)" office:value-type="float" office:value="0.0316515141675018" calcext:value-type="float">
            <text:p>0.031651514167502</text:p>
          </table:table-cell>
          <table:table-cell table:number-columns-repeated="1022"/>
        </table:table-row>
        <table:table-row table:style-name="ro1">
          <table:table-cell table:style-name="ce2" table:formula="of:=NORMINV([$U1.A68];0;1)" office:value-type="float" office:value="0.0074953511287141" calcext:value-type="float">
            <text:p>0.007495351128714</text:p>
          </table:table-cell>
          <table:table-cell table:style-name="ce2" table:formula="of:=NORMINV([$U1.B68];0;1)" office:value-type="float" office:value="0.0723674863316979" calcext:value-type="float">
            <text:p>0.072367486331698</text:p>
          </table:table-cell>
          <table:table-cell table:number-columns-repeated="1022"/>
        </table:table-row>
        <table:table-row table:style-name="ro1">
          <table:table-cell table:style-name="ce2" table:formula="of:=NORMINV([$U1.A69];0;1)" office:value-type="float" office:value="-0.716622634610266" calcext:value-type="float">
            <text:p>-0.716622634610266</text:p>
          </table:table-cell>
          <table:table-cell table:style-name="ce2" table:formula="of:=NORMINV([$U1.B69];0;1)" office:value-type="float" office:value="-0.46281472682941" calcext:value-type="float">
            <text:p>-0.46281472682941</text:p>
          </table:table-cell>
          <table:table-cell table:number-columns-repeated="1022"/>
        </table:table-row>
        <table:table-row table:style-name="ro1">
          <table:table-cell table:style-name="ce2" table:formula="of:=NORMINV([$U1.A70];0;1)" office:value-type="float" office:value="-1.11309217320902" calcext:value-type="float">
            <text:p>-1.11309217320902</text:p>
          </table:table-cell>
          <table:table-cell table:style-name="ce2" table:formula="of:=NORMINV([$U1.B70];0;1)" office:value-type="float" office:value="-1.85764550820523" calcext:value-type="float">
            <text:p>-1.85764550820523</text:p>
          </table:table-cell>
          <table:table-cell table:number-columns-repeated="1022"/>
        </table:table-row>
        <table:table-row table:style-name="ro1">
          <table:table-cell table:style-name="ce2" table:formula="of:=NORMINV([$U1.A71];0;1)" office:value-type="float" office:value="-0.897231449908016" calcext:value-type="float">
            <text:p>-0.897231449908016</text:p>
          </table:table-cell>
          <table:table-cell table:style-name="ce2" table:formula="of:=NORMINV([$U1.B71];0;1)" office:value-type="float" office:value="-0.71823370640404" calcext:value-type="float">
            <text:p>-0.71823370640404</text:p>
          </table:table-cell>
          <table:table-cell table:number-columns-repeated="1022"/>
        </table:table-row>
        <table:table-row table:style-name="ro1">
          <table:table-cell table:style-name="ce2" table:formula="of:=NORMINV([$U1.A72];0;1)" office:value-type="float" office:value="-2.62608704890898" calcext:value-type="float">
            <text:p>-2.62608704890898</text:p>
          </table:table-cell>
          <table:table-cell table:style-name="ce2" table:formula="of:=NORMINV([$U1.B72];0;1)" office:value-type="float" office:value="0.0860237426364836" calcext:value-type="float">
            <text:p>0.086023742636484</text:p>
          </table:table-cell>
          <table:table-cell table:number-columns-repeated="1022"/>
        </table:table-row>
        <table:table-row table:style-name="ro1">
          <table:table-cell table:style-name="ce2" table:formula="of:=NORMINV([$U1.A73];0;1)" office:value-type="float" office:value="0.551610365632332" calcext:value-type="float">
            <text:p>0.551610365632332</text:p>
          </table:table-cell>
          <table:table-cell table:style-name="ce2" table:formula="of:=NORMINV([$U1.B73];0;1)" office:value-type="float" office:value="1.32903967963397" calcext:value-type="float">
            <text:p>1.32903967963397</text:p>
          </table:table-cell>
          <table:table-cell table:number-columns-repeated="1022"/>
        </table:table-row>
        <table:table-row table:style-name="ro1">
          <table:table-cell table:style-name="ce2" table:formula="of:=NORMINV([$U1.A74];0;1)" office:value-type="float" office:value="-0.0906851603040366" calcext:value-type="float">
            <text:p>-0.090685160304037</text:p>
          </table:table-cell>
          <table:table-cell table:style-name="ce2" table:formula="of:=NORMINV([$U1.B74];0;1)" office:value-type="float" office:value="0.327940338212043" calcext:value-type="float">
            <text:p>0.327940338212043</text:p>
          </table:table-cell>
          <table:table-cell table:number-columns-repeated="1022"/>
        </table:table-row>
        <table:table-row table:style-name="ro1">
          <table:table-cell table:style-name="ce2" table:formula="of:=NORMINV([$U1.A75];0;1)" office:value-type="float" office:value="-2.05796410185105" calcext:value-type="float">
            <text:p>-2.05796410185105</text:p>
          </table:table-cell>
          <table:table-cell table:style-name="ce2" table:formula="of:=NORMINV([$U1.B75];0;1)" office:value-type="float" office:value="-1.15927681414192" calcext:value-type="float">
            <text:p>-1.15927681414192</text:p>
          </table:table-cell>
          <table:table-cell table:number-columns-repeated="1022"/>
        </table:table-row>
        <table:table-row table:style-name="ro1">
          <table:table-cell table:style-name="ce2" table:formula="of:=NORMINV([$U1.A76];0;1)" office:value-type="float" office:value="0.479958878921248" calcext:value-type="float">
            <text:p>0.479958878921248</text:p>
          </table:table-cell>
          <table:table-cell table:style-name="ce2" table:formula="of:=NORMINV([$U1.B76];0;1)" office:value-type="float" office:value="-0.991554917088909" calcext:value-type="float">
            <text:p>-0.991554917088909</text:p>
          </table:table-cell>
          <table:table-cell table:number-columns-repeated="1022"/>
        </table:table-row>
        <table:table-row table:style-name="ro1">
          <table:table-cell table:style-name="ce2" table:formula="of:=NORMINV([$U1.A77];0;1)" office:value-type="float" office:value="0.402822045030665" calcext:value-type="float">
            <text:p>0.402822045030665</text:p>
          </table:table-cell>
          <table:table-cell table:style-name="ce2" table:formula="of:=NORMINV([$U1.B77];0;1)" office:value-type="float" office:value="1.08889832391837" calcext:value-type="float">
            <text:p>1.08889832391837</text:p>
          </table:table-cell>
          <table:table-cell table:number-columns-repeated="1022"/>
        </table:table-row>
        <table:table-row table:style-name="ro1">
          <table:table-cell table:style-name="ce2" table:formula="of:=NORMINV([$U1.A78];0;1)" office:value-type="float" office:value="0.717574833587463" calcext:value-type="float">
            <text:p>0.717574833587463</text:p>
          </table:table-cell>
          <table:table-cell table:style-name="ce2" table:formula="of:=NORMINV([$U1.B78];0;1)" office:value-type="float" office:value="-1.04168574656279" calcext:value-type="float">
            <text:p>-1.04168574656279</text:p>
          </table:table-cell>
          <table:table-cell table:number-columns-repeated="1022"/>
        </table:table-row>
        <table:table-row table:style-name="ro1">
          <table:table-cell table:style-name="ce2" table:formula="of:=NORMINV([$U1.A79];0;1)" office:value-type="float" office:value="-3.07538428779434" calcext:value-type="float">
            <text:p>-3.07538428779434</text:p>
          </table:table-cell>
          <table:table-cell table:style-name="ce2" table:formula="of:=NORMINV([$U1.B79];0;1)" office:value-type="float" office:value="-1.64031368454431" calcext:value-type="float">
            <text:p>-1.64031368454431</text:p>
          </table:table-cell>
          <table:table-cell table:number-columns-repeated="1022"/>
        </table:table-row>
        <table:table-row table:style-name="ro1">
          <table:table-cell table:style-name="ce2" table:formula="of:=NORMINV([$U1.A80];0;1)" office:value-type="float" office:value="0.453645649223814" calcext:value-type="float">
            <text:p>0.453645649223814</text:p>
          </table:table-cell>
          <table:table-cell table:style-name="ce2" table:formula="of:=NORMINV([$U1.B80];0;1)" office:value-type="float" office:value="-0.778301213585709" calcext:value-type="float">
            <text:p>-0.778301213585709</text:p>
          </table:table-cell>
          <table:table-cell table:number-columns-repeated="1022"/>
        </table:table-row>
        <table:table-row table:style-name="ro1">
          <table:table-cell table:style-name="ce2" table:formula="of:=NORMINV([$U1.A81];0;1)" office:value-type="float" office:value="2.32238810366234" calcext:value-type="float">
            <text:p>2.32238810366234</text:p>
          </table:table-cell>
          <table:table-cell table:style-name="ce2" table:formula="of:=NORMINV([$U1.B81];0;1)" office:value-type="float" office:value="0.32260583712857" calcext:value-type="float">
            <text:p>0.32260583712857</text:p>
          </table:table-cell>
          <table:table-cell table:number-columns-repeated="1022"/>
        </table:table-row>
        <table:table-row table:style-name="ro1">
          <table:table-cell table:style-name="ce2" table:formula="of:=NORMINV([$U1.A82];0;1)" office:value-type="float" office:value="0.446801439054583" calcext:value-type="float">
            <text:p>0.446801439054583</text:p>
          </table:table-cell>
          <table:table-cell table:style-name="ce2" table:formula="of:=NORMINV([$U1.B82];0;1)" office:value-type="float" office:value="-0.106457986580207" calcext:value-type="float">
            <text:p>-0.106457986580207</text:p>
          </table:table-cell>
          <table:table-cell table:number-columns-repeated="1022"/>
        </table:table-row>
        <table:table-row table:style-name="ro1">
          <table:table-cell table:style-name="ce2" table:formula="of:=NORMINV([$U1.A83];0;1)" office:value-type="float" office:value="0.326558681481395" calcext:value-type="float">
            <text:p>0.326558681481395</text:p>
          </table:table-cell>
          <table:table-cell table:style-name="ce2" table:formula="of:=NORMINV([$U1.B83];0;1)" office:value-type="float" office:value="-1.25451191406226" calcext:value-type="float">
            <text:p>-1.25451191406226</text:p>
          </table:table-cell>
          <table:table-cell table:number-columns-repeated="1022"/>
        </table:table-row>
        <table:table-row table:style-name="ro1">
          <table:table-cell table:style-name="ce2" table:formula="of:=NORMINV([$U1.A84];0;1)" office:value-type="float" office:value="-1.80484473022368" calcext:value-type="float">
            <text:p>-1.80484473022368</text:p>
          </table:table-cell>
          <table:table-cell table:style-name="ce2" table:formula="of:=NORMINV([$U1.B84];0;1)" office:value-type="float" office:value="0.433121488117779" calcext:value-type="float">
            <text:p>0.433121488117779</text:p>
          </table:table-cell>
          <table:table-cell table:number-columns-repeated="1022"/>
        </table:table-row>
        <table:table-row table:style-name="ro1">
          <table:table-cell table:style-name="ce2" table:formula="of:=NORMINV([$U1.A85];0;1)" office:value-type="float" office:value="0.938072290510216" calcext:value-type="float">
            <text:p>0.938072290510216</text:p>
          </table:table-cell>
          <table:table-cell table:style-name="ce2" table:formula="of:=NORMINV([$U1.B85];0;1)" office:value-type="float" office:value="0.0679788306883186" calcext:value-type="float">
            <text:p>0.067978830688319</text:p>
          </table:table-cell>
          <table:table-cell table:number-columns-repeated="1022"/>
        </table:table-row>
        <table:table-row table:style-name="ro1">
          <table:table-cell table:style-name="ce2" table:formula="of:=NORMINV([$U1.A86];0;1)" office:value-type="float" office:value="1.0050486446819" calcext:value-type="float">
            <text:p>1.0050486446819</text:p>
          </table:table-cell>
          <table:table-cell table:style-name="ce2" table:formula="of:=NORMINV([$U1.B86];0;1)" office:value-type="float" office:value="0.579036772857768" calcext:value-type="float">
            <text:p>0.579036772857768</text:p>
          </table:table-cell>
          <table:table-cell table:number-columns-repeated="1022"/>
        </table:table-row>
        <table:table-row table:style-name="ro1">
          <table:table-cell table:style-name="ce2" table:formula="of:=NORMINV([$U1.A87];0;1)" office:value-type="float" office:value="0.136514430356531" calcext:value-type="float">
            <text:p>0.136514430356531</text:p>
          </table:table-cell>
          <table:table-cell table:style-name="ce2" table:formula="of:=NORMINV([$U1.B87];0;1)" office:value-type="float" office:value="0.0944361581588776" calcext:value-type="float">
            <text:p>0.094436158158878</text:p>
          </table:table-cell>
          <table:table-cell table:number-columns-repeated="1022"/>
        </table:table-row>
        <table:table-row table:style-name="ro1">
          <table:table-cell table:style-name="ce2" table:formula="of:=NORMINV([$U1.A88];0;1)" office:value-type="float" office:value="2.39370996560907" calcext:value-type="float">
            <text:p>2.39370996560907</text:p>
          </table:table-cell>
          <table:table-cell table:style-name="ce2" table:formula="of:=NORMINV([$U1.B88];0;1)" office:value-type="float" office:value="0.279911200125655" calcext:value-type="float">
            <text:p>0.279911200125655</text:p>
          </table:table-cell>
          <table:table-cell table:number-columns-repeated="1022"/>
        </table:table-row>
        <table:table-row table:style-name="ro1">
          <table:table-cell table:style-name="ce2" table:formula="of:=NORMINV([$U1.A89];0;1)" office:value-type="float" office:value="0.0316202238364907" calcext:value-type="float">
            <text:p>0.031620223836491</text:p>
          </table:table-cell>
          <table:table-cell table:style-name="ce2" table:formula="of:=NORMINV([$U1.B89];0;1)" office:value-type="float" office:value="0.521232310366898" calcext:value-type="float">
            <text:p>0.521232310366898</text:p>
          </table:table-cell>
          <table:table-cell table:number-columns-repeated="1022"/>
        </table:table-row>
        <table:table-row table:style-name="ro1">
          <table:table-cell table:style-name="ce2" table:formula="of:=NORMINV([$U1.A90];0;1)" office:value-type="float" office:value="-0.269450952725064" calcext:value-type="float">
            <text:p>-0.269450952725064</text:p>
          </table:table-cell>
          <table:table-cell table:style-name="ce2" table:formula="of:=NORMINV([$U1.B90];0;1)" office:value-type="float" office:value="-1.91003401223198" calcext:value-type="float">
            <text:p>-1.91003401223198</text:p>
          </table:table-cell>
          <table:table-cell table:number-columns-repeated="1022"/>
        </table:table-row>
        <table:table-row table:style-name="ro1">
          <table:table-cell table:style-name="ce2" table:formula="of:=NORMINV([$U1.A91];0;1)" office:value-type="float" office:value="-1.8201006500383" calcext:value-type="float">
            <text:p>-1.8201006500383</text:p>
          </table:table-cell>
          <table:table-cell table:style-name="ce2" table:formula="of:=NORMINV([$U1.B91];0;1)" office:value-type="float" office:value="-0.275349873497326" calcext:value-type="float">
            <text:p>-0.275349873497326</text:p>
          </table:table-cell>
          <table:table-cell table:number-columns-repeated="1022"/>
        </table:table-row>
        <table:table-row table:style-name="ro1">
          <table:table-cell table:style-name="ce2" table:formula="of:=NORMINV([$U1.A92];0;1)" office:value-type="float" office:value="0.231476916977906" calcext:value-type="float">
            <text:p>0.231476916977906</text:p>
          </table:table-cell>
          <table:table-cell table:style-name="ce2" table:formula="of:=NORMINV([$U1.B92];0;1)" office:value-type="float" office:value="0.500665039657456" calcext:value-type="float">
            <text:p>0.500665039657456</text:p>
          </table:table-cell>
          <table:table-cell table:number-columns-repeated="1022"/>
        </table:table-row>
        <table:table-row table:style-name="ro1">
          <table:table-cell table:style-name="ce2" table:formula="of:=NORMINV([$U1.A93];0;1)" office:value-type="float" office:value="1.23405842969065" calcext:value-type="float">
            <text:p>1.23405842969065</text:p>
          </table:table-cell>
          <table:table-cell table:style-name="ce2" table:formula="of:=NORMINV([$U1.B93];0;1)" office:value-type="float" office:value="0.18689908922884" calcext:value-type="float">
            <text:p>0.18689908922884</text:p>
          </table:table-cell>
          <table:table-cell table:number-columns-repeated="1022"/>
        </table:table-row>
        <table:table-row table:style-name="ro1">
          <table:table-cell table:style-name="ce2" table:formula="of:=NORMINV([$U1.A94];0;1)" office:value-type="float" office:value="0.971282690853091" calcext:value-type="float">
            <text:p>0.971282690853091</text:p>
          </table:table-cell>
          <table:table-cell table:style-name="ce2" table:formula="of:=NORMINV([$U1.B94];0;1)" office:value-type="float" office:value="0.883711222299363" calcext:value-type="float">
            <text:p>0.883711222299363</text:p>
          </table:table-cell>
          <table:table-cell table:number-columns-repeated="1022"/>
        </table:table-row>
        <table:table-row table:style-name="ro1">
          <table:table-cell table:style-name="ce2" table:formula="of:=NORMINV([$U1.A95];0;1)" office:value-type="float" office:value="0.572680428752068" calcext:value-type="float">
            <text:p>0.572680428752068</text:p>
          </table:table-cell>
          <table:table-cell table:style-name="ce2" table:formula="of:=NORMINV([$U1.B95];0;1)" office:value-type="float" office:value="0.963397107307819" calcext:value-type="float">
            <text:p>0.963397107307819</text:p>
          </table:table-cell>
          <table:table-cell table:number-columns-repeated="1022"/>
        </table:table-row>
        <table:table-row table:style-name="ro1">
          <table:table-cell table:style-name="ce2" table:formula="of:=NORMINV([$U1.A96];0;1)" office:value-type="float" office:value="-0.775877058406225" calcext:value-type="float">
            <text:p>-0.775877058406225</text:p>
          </table:table-cell>
          <table:table-cell table:style-name="ce2" table:formula="of:=NORMINV([$U1.B96];0;1)" office:value-type="float" office:value="-1.73025322633251" calcext:value-type="float">
            <text:p>-1.73025322633251</text:p>
          </table:table-cell>
          <table:table-cell table:number-columns-repeated="1022"/>
        </table:table-row>
        <table:table-row table:style-name="ro1">
          <table:table-cell table:style-name="ce2" table:formula="of:=NORMINV([$U1.A97];0;1)" office:value-type="float" office:value="-0.0472465398455632" calcext:value-type="float">
            <text:p>-0.047246539845563</text:p>
          </table:table-cell>
          <table:table-cell table:style-name="ce2" table:formula="of:=NORMINV([$U1.B97];0;1)" office:value-type="float" office:value="0.329919382189334" calcext:value-type="float">
            <text:p>0.329919382189334</text:p>
          </table:table-cell>
          <table:table-cell table:number-columns-repeated="1022"/>
        </table:table-row>
        <table:table-row table:style-name="ro1">
          <table:table-cell table:style-name="ce2" table:formula="of:=NORMINV([$U1.A98];0;1)" office:value-type="float" office:value="-0.374679122311016" calcext:value-type="float">
            <text:p>-0.374679122311016</text:p>
          </table:table-cell>
          <table:table-cell table:style-name="ce2" table:formula="of:=NORMINV([$U1.B98];0;1)" office:value-type="float" office:value="-0.256383153164943" calcext:value-type="float">
            <text:p>-0.256383153164943</text:p>
          </table:table-cell>
          <table:table-cell table:number-columns-repeated="1022"/>
        </table:table-row>
        <table:table-row table:style-name="ro1">
          <table:table-cell table:style-name="ce2" table:formula="of:=NORMINV([$U1.A99];0;1)" office:value-type="float" office:value="-0.194507219944465" calcext:value-type="float">
            <text:p>-0.194507219944465</text:p>
          </table:table-cell>
          <table:table-cell table:style-name="ce2" table:formula="of:=NORMINV([$U1.B99];0;1)" office:value-type="float" office:value="1.05888660025483" calcext:value-type="float">
            <text:p>1.05888660025483</text:p>
          </table:table-cell>
          <table:table-cell table:number-columns-repeated="1022"/>
        </table:table-row>
        <table:table-row table:style-name="ro1">
          <table:table-cell table:style-name="ce2" table:formula="of:=NORMINV([$U1.A100];0;1)" office:value-type="float" office:value="1.32117754403852" calcext:value-type="float">
            <text:p>1.32117754403852</text:p>
          </table:table-cell>
          <table:table-cell table:style-name="ce2" table:formula="of:=NORMINV([$U1.B100];0;1)" office:value-type="float" office:value="-0.466933105585484" calcext:value-type="float">
            <text:p>-0.466933105585484</text:p>
          </table:table-cell>
          <table:table-cell table:number-columns-repeated="1022"/>
        </table:table-row>
        <table:table-row table:style-name="ro1">
          <table:table-cell table:style-name="ce2" table:formula="of:=NORMINV([$U1.A101];0;1)" office:value-type="float" office:value="1.66725766096478" calcext:value-type="float">
            <text:p>1.66725766096478</text:p>
          </table:table-cell>
          <table:table-cell table:style-name="ce2" table:formula="of:=NORMINV([$U1.B101];0;1)" office:value-type="float" office:value="0.556142141906265" calcext:value-type="float">
            <text:p>0.556142141906265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c12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zc1</text:p>
          </table:table-cell>
          <table:table-cell table:style-name="ce1" office:value-type="string" calcext:value-type="string">
            <text:p>zc2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variance</text:p>
          </table:table-cell>
          <table:table-cell/>
          <table:table-cell>
            <draw:frame table:end-cell-address="zc12.M19" table:end-x="66.59pt" table:end-y="1.47pt" draw:z-index="0" draw:name="Chart 2" draw:style-name="gr1" draw:text-style-name="P1" svg:width="449.97pt" svg:height="278.22pt" svg:x="37.5pt" svg:y="6.75pt">
              <draw:object draw:notify-on-update-of-ranges="zc12.B1:zc12.B1 zc12.B2:zc12.B1000 zc12.A2:zc12.A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4" table:number-matrix-columns-spanned="2" table:number-matrix-rows-spanned="100" table:formula="of:=MMULT([$Z12.A2:.B101];[$Z12.D7:.E8])" office:value-type="float" office:value="-3.10447327519894" calcext:value-type="float">
            <text:p>-3.10447327519894</text:p>
          </table:table-cell>
          <table:table-cell table:style-name="ce5" office:value-type="float" office:value="-1.17762089711125" calcext:value-type="float">
            <text:p>-1.17762089711125</text:p>
          </table:table-cell>
          <table:table-cell/>
          <table:table-cell table:style-name="ce2" table:formula="of:=AVERAGE([.A2:.A101])" office:value-type="float" office:value="-0.0229354707530248" calcext:value-type="float">
            <text:p>-0.022935470753025</text:p>
          </table:table-cell>
          <table:table-cell table:style-name="ce2" table:formula="of:=VAR([.A2:.A101])" office:value-type="float" office:value="2.49355145387298" calcext:value-type="float">
            <text:p>2.49355145387298</text:p>
          </table:table-cell>
          <table:table-cell table:number-columns-repeated="1019"/>
        </table:table-row>
        <table:table-row table:style-name="ro1">
          <table:table-cell table:style-name="ce2" office:value-type="float" office:value="-2.09913231961539" calcext:value-type="float">
            <text:p>-2.09913231961539</text:p>
          </table:table-cell>
          <table:table-cell table:style-name="ce2" office:value-type="float" office:value="-1.06412620235732" calcext:value-type="float">
            <text:p>-1.06412620235732</text:p>
          </table:table-cell>
          <table:table-cell/>
          <table:table-cell table:style-name="ce2" table:formula="of:=AVERAGE([.B2:.B10])" office:value-type="float" office:value="-0.207059245415933" calcext:value-type="float">
            <text:p>-0.207059245415933</text:p>
          </table:table-cell>
          <table:table-cell table:style-name="ce2" table:formula="of:=VAR([.B2:.B101])" office:value-type="float" office:value="1.23755845026547" calcext:value-type="float">
            <text:p>1.23755845026547</text:p>
          </table:table-cell>
          <table:table-cell table:number-columns-repeated="1019"/>
        </table:table-row>
        <table:table-row table:style-name="ro1">
          <table:table-cell table:style-name="ce2" office:value-type="float" office:value="0.322112036336353" calcext:value-type="float">
            <text:p>0.322112036336353</text:p>
          </table:table-cell>
          <table:table-cell table:style-name="ce2" office:value-type="float" office:value="-0.134921322394199" calcext:value-type="float">
            <text:p>-0.134921322394199</text:p>
          </table:table-cell>
          <table:table-cell/>
          <table:table-cell table:style-name="ce3" office:value-type="string" calcext:value-type="string">
            <text:p>Correlation Coefficient</text:p>
          </table:table-cell>
          <table:table-cell table:number-columns-repeated="1020"/>
        </table:table-row>
        <table:table-row table:style-name="ro1">
          <table:table-cell table:style-name="ce2" office:value-type="float" office:value="-0.59845158215534" calcext:value-type="float">
            <text:p>-0.59845158215534</text:p>
          </table:table-cell>
          <table:table-cell table:style-name="ce2" office:value-type="float" office:value="0.098094955080508" calcext:value-type="float">
            <text:p>0.098094955080508</text:p>
          </table:table-cell>
          <table:table-cell/>
          <table:table-cell table:style-name="ce2" table:formula="of:=CORREL([.A2:.A101];[.B2:.B101])" office:value-type="float" office:value="0.750880200726144" calcext:value-type="float">
            <text:p>0.750880200726144</text:p>
          </table:table-cell>
          <table:table-cell table:number-columns-repeated="1020"/>
        </table:table-row>
        <table:table-row table:style-name="ro1">
          <table:table-cell table:style-name="ce2" office:value-type="float" office:value="1.41773495603427" calcext:value-type="float">
            <text:p>1.41773495603427</text:p>
          </table:table-cell>
          <table:table-cell table:style-name="ce2" office:value-type="float" office:value="0.378033099701684" calcext:value-type="float">
            <text:p>0.378033099701684</text:p>
          </table:table-cell>
          <table:table-cell table:number-columns-repeated="1022"/>
        </table:table-row>
        <table:table-row table:style-name="ro1">
          <table:table-cell table:style-name="ce2" office:value-type="float" office:value="1.6146268284352" calcext:value-type="float">
            <text:p>1.6146268284352</text:p>
          </table:table-cell>
          <table:table-cell table:style-name="ce2" office:value-type="float" office:value="1.26465758761363" calcext:value-type="float">
            <text:p>1.26465758761363</text:p>
          </table:table-cell>
          <table:table-cell table:number-columns-repeated="1022"/>
        </table:table-row>
        <table:table-row table:style-name="ro1">
          <table:table-cell table:style-name="ce2" office:value-type="float" office:value="-1.13175413895763" calcext:value-type="float">
            <text:p>-1.13175413895763</text:p>
          </table:table-cell>
          <table:table-cell table:style-name="ce2" office:value-type="float" office:value="0.917771808026088" calcext:value-type="float">
            <text:p>0.917771808026088</text:p>
          </table:table-cell>
          <table:table-cell table:number-columns-repeated="1022"/>
        </table:table-row>
        <table:table-row table:style-name="ro1">
          <table:table-cell table:style-name="ce2" office:value-type="float" office:value="-1.58491313773872" calcext:value-type="float">
            <text:p>-1.58491313773872</text:p>
          </table:table-cell>
          <table:table-cell table:style-name="ce2" office:value-type="float" office:value="-1.00002053800383" calcext:value-type="float">
            <text:p>-1.00002053800383</text:p>
          </table:table-cell>
          <table:table-cell table:number-columns-repeated="1022"/>
        </table:table-row>
        <table:table-row table:style-name="ro1">
          <table:table-cell table:style-name="ce2" office:value-type="float" office:value="-1.4252292378272" calcext:value-type="float">
            <text:p>-1.4252292378272</text:p>
          </table:table-cell>
          <table:table-cell table:style-name="ce2" office:value-type="float" office:value="-1.14540169929872" calcext:value-type="float">
            <text:p>-1.14540169929872</text:p>
          </table:table-cell>
          <table:table-cell table:number-columns-repeated="1022"/>
        </table:table-row>
        <table:table-row table:style-name="ro1">
          <table:table-cell table:style-name="ce2" office:value-type="float" office:value="-0.869029010303996" calcext:value-type="float">
            <text:p>-0.869029010303996</text:p>
          </table:table-cell>
          <table:table-cell table:style-name="ce2" office:value-type="float" office:value="-0.720177633427551" calcext:value-type="float">
            <text:p>-0.720177633427551</text:p>
          </table:table-cell>
          <table:table-cell table:number-columns-repeated="1022"/>
        </table:table-row>
        <table:table-row table:style-name="ro1">
          <table:table-cell table:style-name="ce2" office:value-type="float" office:value="1.59352194592647" calcext:value-type="float">
            <text:p>1.59352194592647</text:p>
          </table:table-cell>
          <table:table-cell table:style-name="ce2" office:value-type="float" office:value="2.4228255375329" calcext:value-type="float">
            <text:p>2.4228255375329</text:p>
          </table:table-cell>
          <table:table-cell table:number-columns-repeated="1022"/>
        </table:table-row>
        <table:table-row table:style-name="ro1">
          <table:table-cell table:style-name="ce2" office:value-type="float" office:value="2.3043745723792" calcext:value-type="float">
            <text:p>2.3043745723792</text:p>
          </table:table-cell>
          <table:table-cell table:style-name="ce2" office:value-type="float" office:value="0.0438615146056269" calcext:value-type="float">
            <text:p>0.043861514605627</text:p>
          </table:table-cell>
          <table:table-cell table:number-columns-repeated="1022"/>
        </table:table-row>
        <table:table-row table:style-name="ro1">
          <table:table-cell table:style-name="ce2" office:value-type="float" office:value="-0.932267304097896" calcext:value-type="float">
            <text:p>-0.932267304097896</text:p>
          </table:table-cell>
          <table:table-cell table:style-name="ce2" office:value-type="float" office:value="-0.913123139696332" calcext:value-type="float">
            <text:p>-0.913123139696332</text:p>
          </table:table-cell>
          <table:table-cell table:number-columns-repeated="1022"/>
        </table:table-row>
        <table:table-row table:style-name="ro1">
          <table:table-cell table:style-name="ce2" office:value-type="float" office:value="-0.567887910190343" calcext:value-type="float">
            <text:p>-0.567887910190343</text:p>
          </table:table-cell>
          <table:table-cell table:style-name="ce2" office:value-type="float" office:value="-0.206563374552184" calcext:value-type="float">
            <text:p>-0.206563374552184</text:p>
          </table:table-cell>
          <table:table-cell table:number-columns-repeated="1022"/>
        </table:table-row>
        <table:table-row table:style-name="ro1">
          <table:table-cell table:style-name="ce2" office:value-type="float" office:value="1.98467404588658" calcext:value-type="float">
            <text:p>1.98467404588658</text:p>
          </table:table-cell>
          <table:table-cell table:style-name="ce2" office:value-type="float" office:value="0.764491376625081" calcext:value-type="float">
            <text:p>0.764491376625081</text:p>
          </table:table-cell>
          <table:table-cell table:number-columns-repeated="1022"/>
        </table:table-row>
        <table:table-row table:style-name="ro1">
          <table:table-cell table:style-name="ce2" office:value-type="float" office:value="0.234972083338288" calcext:value-type="float">
            <text:p>0.234972083338288</text:p>
          </table:table-cell>
          <table:table-cell table:style-name="ce2" office:value-type="float" office:value="0.596211482113448" calcext:value-type="float">
            <text:p>0.596211482113448</text:p>
          </table:table-cell>
          <table:table-cell table:number-columns-repeated="1022"/>
        </table:table-row>
        <table:table-row table:style-name="ro1">
          <table:table-cell table:style-name="ce2" office:value-type="float" office:value="1.57922624071635" calcext:value-type="float">
            <text:p>1.57922624071635</text:p>
          </table:table-cell>
          <table:table-cell table:style-name="ce2" office:value-type="float" office:value="0.989636078140016" calcext:value-type="float">
            <text:p>0.989636078140016</text:p>
          </table:table-cell>
          <table:table-cell table:number-columns-repeated="1022"/>
        </table:table-row>
        <table:table-row table:style-name="ro1">
          <table:table-cell table:style-name="ce2" office:value-type="float" office:value="-2.52339022637412" calcext:value-type="float">
            <text:p>-2.52339022637412</text:p>
          </table:table-cell>
          <table:table-cell table:style-name="ce2" office:value-type="float" office:value="-2.23725454325117" calcext:value-type="float">
            <text:p>-2.23725454325117</text:p>
          </table:table-cell>
          <table:table-cell table:number-columns-repeated="1022"/>
        </table:table-row>
        <table:table-row table:style-name="ro1">
          <table:table-cell table:style-name="ce2" office:value-type="float" office:value="0.234356270278204" calcext:value-type="float">
            <text:p>0.234356270278204</text:p>
          </table:table-cell>
          <table:table-cell table:style-name="ce2" office:value-type="float" office:value="-1.91501237561855" calcext:value-type="float">
            <text:p>-1.91501237561855</text:p>
          </table:table-cell>
          <table:table-cell table:number-columns-repeated="1022"/>
        </table:table-row>
        <table:table-row table:style-name="ro1">
          <table:table-cell table:style-name="ce2" office:value-type="float" office:value="-2.21190760793416" calcext:value-type="float">
            <text:p>-2.21190760793416</text:p>
          </table:table-cell>
          <table:table-cell table:style-name="ce2" office:value-type="float" office:value="-1.31772465886064" calcext:value-type="float">
            <text:p>-1.31772465886064</text:p>
          </table:table-cell>
          <table:table-cell table:number-columns-repeated="1022"/>
        </table:table-row>
        <table:table-row table:style-name="ro1">
          <table:table-cell table:style-name="ce2" office:value-type="float" office:value="0.412410772716235" calcext:value-type="float">
            <text:p>0.412410772716235</text:p>
          </table:table-cell>
          <table:table-cell table:style-name="ce2" office:value-type="float" office:value="0.118274833495045" calcext:value-type="float">
            <text:p>0.118274833495045</text:p>
          </table:table-cell>
          <table:table-cell table:number-columns-repeated="1022"/>
        </table:table-row>
        <table:table-row table:style-name="ro1">
          <table:table-cell table:style-name="ce2" office:value-type="float" office:value="0.798450716801117" calcext:value-type="float">
            <text:p>0.798450716801117</text:p>
          </table:table-cell>
          <table:table-cell table:style-name="ce2" office:value-type="float" office:value="0.10886298168157" calcext:value-type="float">
            <text:p>0.10886298168157</text:p>
          </table:table-cell>
          <table:table-cell table:number-columns-repeated="1022"/>
        </table:table-row>
        <table:table-row table:style-name="ro1">
          <table:table-cell table:style-name="ce2" office:value-type="float" office:value="1.12153796193993" calcext:value-type="float">
            <text:p>1.12153796193993</text:p>
          </table:table-cell>
          <table:table-cell table:style-name="ce2" office:value-type="float" office:value="-0.764212379737492" calcext:value-type="float">
            <text:p>-0.764212379737492</text:p>
          </table:table-cell>
          <table:table-cell table:number-columns-repeated="1022"/>
        </table:table-row>
        <table:table-row table:style-name="ro1">
          <table:table-cell table:style-name="ce2" office:value-type="float" office:value="-0.820317537027275" calcext:value-type="float">
            <text:p>-0.820317537027275</text:p>
          </table:table-cell>
          <table:table-cell table:style-name="ce2" office:value-type="float" office:value="-0.72250913500327" calcext:value-type="float">
            <text:p>-0.72250913500327</text:p>
          </table:table-cell>
          <table:table-cell table:number-columns-repeated="1022"/>
        </table:table-row>
        <table:table-row table:style-name="ro1">
          <table:table-cell table:style-name="ce2" office:value-type="float" office:value="0.390784103192222" calcext:value-type="float">
            <text:p>0.390784103192222</text:p>
          </table:table-cell>
          <table:table-cell table:style-name="ce2" office:value-type="float" office:value="-0.190926814218764" calcext:value-type="float">
            <text:p>-0.190926814218764</text:p>
          </table:table-cell>
          <table:table-cell table:number-columns-repeated="1022"/>
        </table:table-row>
        <table:table-row table:style-name="ro1">
          <table:table-cell table:style-name="ce2" office:value-type="float" office:value="-0.00198931732909082" calcext:value-type="float">
            <text:p>-0.001989317329091</text:p>
          </table:table-cell>
          <table:table-cell table:style-name="ce2" office:value-type="float" office:value="-1.80206412750893" calcext:value-type="float">
            <text:p>-1.80206412750893</text:p>
          </table:table-cell>
          <table:table-cell table:number-columns-repeated="1022"/>
        </table:table-row>
        <table:table-row table:style-name="ro1">
          <table:table-cell table:style-name="ce2" office:value-type="float" office:value="1.89355869489262" calcext:value-type="float">
            <text:p>1.89355869489262</text:p>
          </table:table-cell>
          <table:table-cell table:style-name="ce2" office:value-type="float" office:value="-0.12014682306724" calcext:value-type="float">
            <text:p>-0.12014682306724</text:p>
          </table:table-cell>
          <table:table-cell table:number-columns-repeated="1022"/>
        </table:table-row>
        <table:table-row table:style-name="ro1">
          <table:table-cell table:style-name="ce2" office:value-type="float" office:value="1.48718705864394" calcext:value-type="float">
            <text:p>1.48718705864394</text:p>
          </table:table-cell>
          <table:table-cell table:style-name="ce2" office:value-type="float" office:value="1.22447806999361" calcext:value-type="float">
            <text:p>1.22447806999361</text:p>
          </table:table-cell>
          <table:table-cell table:number-columns-repeated="1022"/>
        </table:table-row>
        <table:table-row table:style-name="ro1">
          <table:table-cell table:style-name="ce2" office:value-type="float" office:value="-0.062436936421607" calcext:value-type="float">
            <text:p>-0.062436936421607</text:p>
          </table:table-cell>
          <table:table-cell table:style-name="ce2" office:value-type="float" office:value="-0.141150591583537" calcext:value-type="float">
            <text:p>-0.141150591583537</text:p>
          </table:table-cell>
          <table:table-cell table:number-columns-repeated="1022"/>
        </table:table-row>
        <table:table-row table:style-name="ro1">
          <table:table-cell table:style-name="ce2" office:value-type="float" office:value="-1.15084046407402" calcext:value-type="float">
            <text:p>-1.15084046407402</text:p>
          </table:table-cell>
          <table:table-cell table:style-name="ce2" office:value-type="float" office:value="-0.561860187784501" calcext:value-type="float">
            <text:p>-0.561860187784501</text:p>
          </table:table-cell>
          <table:table-cell table:number-columns-repeated="1022"/>
        </table:table-row>
        <table:table-row table:style-name="ro1">
          <table:table-cell table:style-name="ce2" office:value-type="float" office:value="1.52835423970062" calcext:value-type="float">
            <text:p>1.52835423970062</text:p>
          </table:table-cell>
          <table:table-cell table:style-name="ce2" office:value-type="float" office:value="0.182039625220717" calcext:value-type="float">
            <text:p>0.182039625220717</text:p>
          </table:table-cell>
          <table:table-cell table:number-columns-repeated="1022"/>
        </table:table-row>
        <table:table-row table:style-name="ro1">
          <table:table-cell table:style-name="ce2" office:value-type="float" office:value="-1.95365485029667" calcext:value-type="float">
            <text:p>-1.95365485029667</text:p>
          </table:table-cell>
          <table:table-cell table:style-name="ce2" office:value-type="float" office:value="0.325812051471838" calcext:value-type="float">
            <text:p>0.325812051471838</text:p>
          </table:table-cell>
          <table:table-cell table:number-columns-repeated="1022"/>
        </table:table-row>
        <table:table-row table:style-name="ro1">
          <table:table-cell table:style-name="ce2" office:value-type="float" office:value="-2.05806937387216" calcext:value-type="float">
            <text:p>-2.05806937387216</text:p>
          </table:table-cell>
          <table:table-cell table:style-name="ce2" office:value-type="float" office:value="-0.554962702604728" calcext:value-type="float">
            <text:p>-0.554962702604728</text:p>
          </table:table-cell>
          <table:table-cell table:number-columns-repeated="1022"/>
        </table:table-row>
        <table:table-row table:style-name="ro1">
          <table:table-cell table:style-name="ce2" office:value-type="float" office:value="-2.38324914899934" calcext:value-type="float">
            <text:p>-2.38324914899934</text:p>
          </table:table-cell>
          <table:table-cell table:style-name="ce2" office:value-type="float" office:value="-0.783078182643158" calcext:value-type="float">
            <text:p>-0.783078182643158</text:p>
          </table:table-cell>
          <table:table-cell table:number-columns-repeated="1022"/>
        </table:table-row>
        <table:table-row table:style-name="ro1">
          <table:table-cell table:style-name="ce2" office:value-type="float" office:value="0.585410888479767" calcext:value-type="float">
            <text:p>0.585410888479767</text:p>
          </table:table-cell>
          <table:table-cell table:style-name="ce2" office:value-type="float" office:value="-0.240942780766338" calcext:value-type="float">
            <text:p>-0.240942780766338</text:p>
          </table:table-cell>
          <table:table-cell table:number-columns-repeated="1022"/>
        </table:table-row>
        <table:table-row table:style-name="ro1">
          <table:table-cell table:style-name="ce2" office:value-type="float" office:value="-1.85104520696344" calcext:value-type="float">
            <text:p>-1.85104520696344</text:p>
          </table:table-cell>
          <table:table-cell table:style-name="ce2" office:value-type="float" office:value="-1.60105796918373" calcext:value-type="float">
            <text:p>-1.60105796918373</text:p>
          </table:table-cell>
          <table:table-cell table:number-columns-repeated="1022"/>
        </table:table-row>
        <table:table-row table:style-name="ro1">
          <table:table-cell table:style-name="ce2" office:value-type="float" office:value="-0.292530626711869" calcext:value-type="float">
            <text:p>-0.292530626711869</text:p>
          </table:table-cell>
          <table:table-cell table:style-name="ce2" office:value-type="float" office:value="-0.803160289837753" calcext:value-type="float">
            <text:p>-0.803160289837753</text:p>
          </table:table-cell>
          <table:table-cell table:number-columns-repeated="1022"/>
        </table:table-row>
        <table:table-row table:style-name="ro1">
          <table:table-cell table:style-name="ce2" office:value-type="float" office:value="-0.39826283288474" calcext:value-type="float">
            <text:p>-0.39826283288474</text:p>
          </table:table-cell>
          <table:table-cell table:style-name="ce2" office:value-type="float" office:value="-0.177942349391892" calcext:value-type="float">
            <text:p>-0.177942349391892</text:p>
          </table:table-cell>
          <table:table-cell table:number-columns-repeated="1022"/>
        </table:table-row>
        <table:table-row table:style-name="ro1">
          <table:table-cell table:style-name="ce2" office:value-type="float" office:value="1.83352164579867" calcext:value-type="float">
            <text:p>1.83352164579867</text:p>
          </table:table-cell>
          <table:table-cell table:style-name="ce2" office:value-type="float" office:value="-0.925627360712994" calcext:value-type="float">
            <text:p>-0.925627360712994</text:p>
          </table:table-cell>
          <table:table-cell table:number-columns-repeated="1022"/>
        </table:table-row>
        <table:table-row table:style-name="ro1">
          <table:table-cell table:style-name="ce2" office:value-type="float" office:value="3.19551304950797" calcext:value-type="float">
            <text:p>3.19551304950797</text:p>
          </table:table-cell>
          <table:table-cell table:style-name="ce2" office:value-type="float" office:value="1.93877410491445" calcext:value-type="float">
            <text:p>1.93877410491445</text:p>
          </table:table-cell>
          <table:table-cell table:number-columns-repeated="1022"/>
        </table:table-row>
        <table:table-row table:style-name="ro1">
          <table:table-cell table:style-name="ce2" office:value-type="float" office:value="-0.351432307456855" calcext:value-type="float">
            <text:p>-0.351432307456855</text:p>
          </table:table-cell>
          <table:table-cell table:style-name="ce2" office:value-type="float" office:value="0.558853414042948" calcext:value-type="float">
            <text:p>0.558853414042948</text:p>
          </table:table-cell>
          <table:table-cell table:number-columns-repeated="1022"/>
        </table:table-row>
        <table:table-row table:style-name="ro1">
          <table:table-cell table:style-name="ce2" office:value-type="float" office:value="0.50050152758557" calcext:value-type="float">
            <text:p>0.50050152758557</text:p>
          </table:table-cell>
          <table:table-cell table:style-name="ce2" office:value-type="float" office:value="-0.983609745705076" calcext:value-type="float">
            <text:p>-0.983609745705076</text:p>
          </table:table-cell>
          <table:table-cell table:number-columns-repeated="1022"/>
        </table:table-row>
        <table:table-row table:style-name="ro1">
          <table:table-cell table:style-name="ce2" office:value-type="float" office:value="0.127556100683384" calcext:value-type="float">
            <text:p>0.127556100683384</text:p>
          </table:table-cell>
          <table:table-cell table:style-name="ce2" office:value-type="float" office:value="-0.295170263415405" calcext:value-type="float">
            <text:p>-0.295170263415405</text:p>
          </table:table-cell>
          <table:table-cell table:number-columns-repeated="1022"/>
        </table:table-row>
        <table:table-row table:style-name="ro1">
          <table:table-cell table:style-name="ce2" office:value-type="float" office:value="-1.15188571654518" calcext:value-type="float">
            <text:p>-1.15188571654518</text:p>
          </table:table-cell>
          <table:table-cell table:style-name="ce2" office:value-type="float" office:value="-0.254158816597365" calcext:value-type="float">
            <text:p>-0.254158816597365</text:p>
          </table:table-cell>
          <table:table-cell table:number-columns-repeated="1022"/>
        </table:table-row>
        <table:table-row table:style-name="ro1">
          <table:table-cell table:style-name="ce2" office:value-type="float" office:value="0.196072497263227" calcext:value-type="float">
            <text:p>0.196072497263227</text:p>
          </table:table-cell>
          <table:table-cell table:style-name="ce2" office:value-type="float" office:value="-0.493626034881435" calcext:value-type="float">
            <text:p>-0.493626034881435</text:p>
          </table:table-cell>
          <table:table-cell table:number-columns-repeated="1022"/>
        </table:table-row>
        <table:table-row table:style-name="ro1">
          <table:table-cell table:style-name="ce2" office:value-type="float" office:value="-3.00279724560003" calcext:value-type="float">
            <text:p>-3.00279724560003</text:p>
          </table:table-cell>
          <table:table-cell table:style-name="ce2" office:value-type="float" office:value="-0.937401605837482" calcext:value-type="float">
            <text:p>-0.937401605837482</text:p>
          </table:table-cell>
          <table:table-cell table:number-columns-repeated="1022"/>
        </table:table-row>
        <table:table-row table:style-name="ro1">
          <table:table-cell table:style-name="ce2" office:value-type="float" office:value="0.479988773139164" calcext:value-type="float">
            <text:p>0.479988773139164</text:p>
          </table:table-cell>
          <table:table-cell table:style-name="ce2" office:value-type="float" office:value="1.01560715554405" calcext:value-type="float">
            <text:p>1.01560715554405</text:p>
          </table:table-cell>
          <table:table-cell table:number-columns-repeated="1022"/>
        </table:table-row>
        <table:table-row table:style-name="ro1">
          <table:table-cell table:style-name="ce2" office:value-type="float" office:value="0.953584108683881" calcext:value-type="float">
            <text:p>0.953584108683881</text:p>
          </table:table-cell>
          <table:table-cell table:style-name="ce2" office:value-type="float" office:value="1.29259716062921" calcext:value-type="float">
            <text:p>1.29259716062921</text:p>
          </table:table-cell>
          <table:table-cell table:number-columns-repeated="1022"/>
        </table:table-row>
        <table:table-row table:style-name="ro1">
          <table:table-cell table:style-name="ce2" office:value-type="float" office:value="-0.407164306368686" calcext:value-type="float">
            <text:p>-0.407164306368686</text:p>
          </table:table-cell>
          <table:table-cell table:style-name="ce2" office:value-type="float" office:value="-0.417103388758593" calcext:value-type="float">
            <text:p>-0.417103388758593</text:p>
          </table:table-cell>
          <table:table-cell table:number-columns-repeated="1022"/>
        </table:table-row>
        <table:table-row table:style-name="ro1">
          <table:table-cell table:style-name="ce2" office:value-type="float" office:value="-0.512497889661574" calcext:value-type="float">
            <text:p>-0.512497889661574</text:p>
          </table:table-cell>
          <table:table-cell table:style-name="ce2" office:value-type="float" office:value="1.21033227724932" calcext:value-type="float">
            <text:p>1.21033227724932</text:p>
          </table:table-cell>
          <table:table-cell table:number-columns-repeated="1022"/>
        </table:table-row>
        <table:table-row table:style-name="ro1">
          <table:table-cell table:style-name="ce2" office:value-type="float" office:value="-0.418837011960534" calcext:value-type="float">
            <text:p>-0.418837011960534</text:p>
          </table:table-cell>
          <table:table-cell table:style-name="ce2" office:value-type="float" office:value="-0.214272501170931" calcext:value-type="float">
            <text:p>-0.214272501170931</text:p>
          </table:table-cell>
          <table:table-cell table:number-columns-repeated="1022"/>
        </table:table-row>
        <table:table-row table:style-name="ro1">
          <table:table-cell table:style-name="ce2" office:value-type="float" office:value="0.025811706570765" calcext:value-type="float">
            <text:p>0.025811706570765</text:p>
          </table:table-cell>
          <table:table-cell table:style-name="ce2" office:value-type="float" office:value="-0.224563657102622" calcext:value-type="float">
            <text:p>-0.224563657102622</text:p>
          </table:table-cell>
          <table:table-cell table:number-columns-repeated="1022"/>
        </table:table-row>
        <table:table-row table:style-name="ro1">
          <table:table-cell table:style-name="ce2" office:value-type="float" office:value="1.92272832986231" calcext:value-type="float">
            <text:p>1.92272832986231</text:p>
          </table:table-cell>
          <table:table-cell table:style-name="ce2" office:value-type="float" office:value="1.2254467331998" calcext:value-type="float">
            <text:p>1.2254467331998</text:p>
          </table:table-cell>
          <table:table-cell table:number-columns-repeated="1022"/>
        </table:table-row>
        <table:table-row table:style-name="ro1">
          <table:table-cell table:style-name="ce2" office:value-type="float" office:value="0.253672008553967" calcext:value-type="float">
            <text:p>0.253672008553967</text:p>
          </table:table-cell>
          <table:table-cell table:style-name="ce2" office:value-type="float" office:value="0.977859118051835" calcext:value-type="float">
            <text:p>0.977859118051835</text:p>
          </table:table-cell>
          <table:table-cell table:number-columns-repeated="1022"/>
        </table:table-row>
        <table:table-row table:style-name="ro1">
          <table:table-cell table:style-name="ce2" office:value-type="float" office:value="3.41006488565761" calcext:value-type="float">
            <text:p>3.41006488565761</text:p>
          </table:table-cell>
          <table:table-cell table:style-name="ce2" office:value-type="float" office:value="1.87125453515035" calcext:value-type="float">
            <text:p>1.87125453515035</text:p>
          </table:table-cell>
          <table:table-cell table:number-columns-repeated="1022"/>
        </table:table-row>
        <table:table-row table:style-name="ro1">
          <table:table-cell table:style-name="ce2" office:value-type="float" office:value="-0.642060858834295" calcext:value-type="float">
            <text:p>-0.642060858834295</text:p>
          </table:table-cell>
          <table:table-cell table:style-name="ce2" office:value-type="float" office:value="0.634811374511426" calcext:value-type="float">
            <text:p>0.634811374511426</text:p>
          </table:table-cell>
          <table:table-cell table:number-columns-repeated="1022"/>
        </table:table-row>
        <table:table-row table:style-name="ro1">
          <table:table-cell table:style-name="ce2" office:value-type="float" office:value="1.23454888673333" calcext:value-type="float">
            <text:p>1.23454888673333</text:p>
          </table:table-cell>
          <table:table-cell table:style-name="ce2" office:value-type="float" office:value="-0.0702710176545355" calcext:value-type="float">
            <text:p>-0.070271017654536</text:p>
          </table:table-cell>
          <table:table-cell table:number-columns-repeated="1022"/>
        </table:table-row>
        <table:table-row table:style-name="ro1">
          <table:table-cell table:style-name="ce2" office:value-type="float" office:value="1.05394881891739" calcext:value-type="float">
            <text:p>1.05394881891739</text:p>
          </table:table-cell>
          <table:table-cell table:style-name="ce2" office:value-type="float" office:value="1.53672287048549" calcext:value-type="float">
            <text:p>1.53672287048549</text:p>
          </table:table-cell>
          <table:table-cell table:number-columns-repeated="1022"/>
        </table:table-row>
        <table:table-row table:style-name="ro1">
          <table:table-cell table:style-name="ce2" office:value-type="float" office:value="-0.157060270828149" calcext:value-type="float">
            <text:p>-0.157060270828149</text:p>
          </table:table-cell>
          <table:table-cell table:style-name="ce2" office:value-type="float" office:value="0.39523725989249" calcext:value-type="float">
            <text:p>0.39523725989249</text:p>
          </table:table-cell>
          <table:table-cell table:number-columns-repeated="1022"/>
        </table:table-row>
        <table:table-row table:style-name="ro1">
          <table:table-cell table:style-name="ce2" office:value-type="float" office:value="-0.1253061154034" calcext:value-type="float">
            <text:p>-0.1253061154034</text:p>
          </table:table-cell>
          <table:table-cell table:style-name="ce2" office:value-type="float" office:value="-0.26187132995092" calcext:value-type="float">
            <text:p>-0.26187132995092</text:p>
          </table:table-cell>
          <table:table-cell table:number-columns-repeated="1022"/>
        </table:table-row>
        <table:table-row table:style-name="ro1">
          <table:table-cell table:style-name="ce2" office:value-type="float" office:value="-1.14063705553209" calcext:value-type="float">
            <text:p>-1.14063705553209</text:p>
          </table:table-cell>
          <table:table-cell table:style-name="ce2" office:value-type="float" office:value="-1.86616180107394" calcext:value-type="float">
            <text:p>-1.86616180107394</text:p>
          </table:table-cell>
          <table:table-cell table:number-columns-repeated="1022"/>
        </table:table-row>
        <table:table-row table:style-name="ro1">
          <table:table-cell table:style-name="ce2" office:value-type="float" office:value="-1.18464302523097" calcext:value-type="float">
            <text:p>-1.18464302523097</text:p>
          </table:table-cell>
          <table:table-cell table:style-name="ce2" office:value-type="float" office:value="-1.22467209012051" calcext:value-type="float">
            <text:p>-1.22467209012051</text:p>
          </table:table-cell>
          <table:table-cell table:number-columns-repeated="1022"/>
        </table:table-row>
        <table:table-row table:style-name="ro1">
          <table:table-cell table:style-name="ce2" office:value-type="float" office:value="1.84156678489977" calcext:value-type="float">
            <text:p>1.84156678489977</text:p>
          </table:table-cell>
          <table:table-cell table:style-name="ce2" office:value-type="float" office:value="0.606067100815168" calcext:value-type="float">
            <text:p>0.606067100815168</text:p>
          </table:table-cell>
          <table:table-cell table:number-columns-repeated="1022"/>
        </table:table-row>
        <table:table-row table:style-name="ro1">
          <table:table-cell table:style-name="ce2" office:value-type="float" office:value="-0.460584633746011" calcext:value-type="float">
            <text:p>-0.460584633746011</text:p>
          </table:table-cell>
          <table:table-cell table:style-name="ce2" office:value-type="float" office:value="1.09595303851598" calcext:value-type="float">
            <text:p>1.09595303851598</text:p>
          </table:table-cell>
          <table:table-cell table:number-columns-repeated="1022"/>
        </table:table-row>
        <table:table-row table:style-name="ro1">
          <table:table-cell table:style-name="ce2" office:value-type="float" office:value="-2.66774673256902" calcext:value-type="float">
            <text:p>-2.66774673256902</text:p>
          </table:table-cell>
          <table:table-cell table:style-name="ce2" office:value-type="float" office:value="-1.87541621920659" calcext:value-type="float">
            <text:p>-1.87541621920659</text:p>
          </table:table-cell>
          <table:table-cell table:number-columns-repeated="1022"/>
        </table:table-row>
        <table:table-row table:style-name="ro1">
          <table:table-cell table:style-name="ce2" office:value-type="float" office:value="0.925445522546682" calcext:value-type="float">
            <text:p>0.925445522546682</text:p>
          </table:table-cell>
          <table:table-cell table:style-name="ce2" office:value-type="float" office:value="0.485103761707307" calcext:value-type="float">
            <text:p>0.485103761707307</text:p>
          </table:table-cell>
          <table:table-cell table:number-columns-repeated="1022"/>
        </table:table-row>
        <table:table-row table:style-name="ro1">
          <table:table-cell table:style-name="ce2" office:value-type="float" office:value="0.0106000272181795" calcext:value-type="float">
            <text:p>0.01060002721818</text:p>
          </table:table-cell>
          <table:table-cell table:style-name="ce2" office:value-type="float" office:value="0.0564715539341307" calcext:value-type="float">
            <text:p>0.056471553934131</text:p>
          </table:table-cell>
          <table:table-cell table:number-columns-repeated="1022"/>
        </table:table-row>
        <table:table-row table:style-name="ro1">
          <table:table-cell table:style-name="ce2" office:value-type="float" office:value="-1.01345744870201" calcext:value-type="float">
            <text:p>-1.01345744870201</text:p>
          </table:table-cell>
          <table:table-cell table:style-name="ce2" office:value-type="float" office:value="-0.83398815627463" calcext:value-type="float">
            <text:p>-0.83398815627463</text:p>
          </table:table-cell>
          <table:table-cell table:number-columns-repeated="1022"/>
        </table:table-row>
        <table:table-row table:style-name="ro1">
          <table:table-cell table:style-name="ce2" office:value-type="float" office:value="-1.57415004710825" calcext:value-type="float">
            <text:p>-1.57415004710825</text:p>
          </table:table-cell>
          <table:table-cell table:style-name="ce2" office:value-type="float" office:value="-2.10062875969439" calcext:value-type="float">
            <text:p>-2.10062875969439</text:p>
          </table:table-cell>
          <table:table-cell table:number-columns-repeated="1022"/>
        </table:table-row>
        <table:table-row table:style-name="ro1">
          <table:table-cell table:style-name="ce2" office:value-type="float" office:value="-1.26887688471284" calcext:value-type="float">
            <text:p>-1.26887688471284</text:p>
          </table:table-cell>
          <table:table-cell table:style-name="ce2" office:value-type="float" office:value="-1.14230636682057" calcext:value-type="float">
            <text:p>-1.14230636682057</text:p>
          </table:table-cell>
          <table:table-cell table:number-columns-repeated="1022"/>
        </table:table-row>
        <table:table-row table:style-name="ro1">
          <table:table-cell table:style-name="ce2" office:value-type="float" office:value="-3.71384791955964" calcext:value-type="float">
            <text:p>-3.71384791955964</text:p>
          </table:table-cell>
          <table:table-cell table:style-name="ce2" office:value-type="float" office:value="-1.79609598854257" calcext:value-type="float">
            <text:p>-1.79609598854257</text:p>
          </table:table-cell>
          <table:table-cell table:number-columns-repeated="1022"/>
        </table:table-row>
        <table:table-row table:style-name="ro1">
          <table:table-cell table:style-name="ce2" office:value-type="float" office:value="0.780094860017022" calcext:value-type="float">
            <text:p>0.780094860017022</text:p>
          </table:table-cell>
          <table:table-cell table:style-name="ce2" office:value-type="float" office:value="1.32982040007189" calcext:value-type="float">
            <text:p>1.32982040007189</text:p>
          </table:table-cell>
          <table:table-cell table:number-columns-repeated="1022"/>
        </table:table-row>
        <table:table-row table:style-name="ro1">
          <table:table-cell table:style-name="ce2" office:value-type="float" office:value="-0.128248183574113" calcext:value-type="float">
            <text:p>-0.128248183574113</text:p>
          </table:table-cell>
          <table:table-cell table:style-name="ce2" office:value-type="float" office:value="0.167764745173564" calcext:value-type="float">
            <text:p>0.167764745173564</text:p>
          </table:table-cell>
          <table:table-cell table:number-columns-repeated="1022"/>
        </table:table-row>
        <table:table-row table:style-name="ro1">
          <table:table-cell table:style-name="ce2" office:value-type="float" office:value="-2.9104007429469" calcext:value-type="float">
            <text:p>-2.9104007429469</text:p>
          </table:table-cell>
          <table:table-cell table:style-name="ce2" office:value-type="float" office:value="-2.27493286845273" calcext:value-type="float">
            <text:p>-2.27493286845273</text:p>
          </table:table-cell>
          <table:table-cell table:number-columns-repeated="1022"/>
        </table:table-row>
        <table:table-row table:style-name="ro1">
          <table:table-cell table:style-name="ce2" office:value-type="float" office:value="0.678764355772745" calcext:value-type="float">
            <text:p>0.678764355772745</text:p>
          </table:table-cell>
          <table:table-cell table:style-name="ce2" office:value-type="float" office:value="-0.361753027823407" calcext:value-type="float">
            <text:p>-0.361753027823407</text:p>
          </table:table-cell>
          <table:table-cell table:number-columns-repeated="1022"/>
        </table:table-row>
        <table:table-row table:style-name="ro1">
          <table:table-cell table:style-name="ce2" office:value-type="float" office:value="0.569676399154941" calcext:value-type="float">
            <text:p>0.569676399154941</text:p>
          </table:table-cell>
          <table:table-cell table:style-name="ce2" office:value-type="float" office:value="1.05480558853803" calcext:value-type="float">
            <text:p>1.05480558853803</text:p>
          </table:table-cell>
          <table:table-cell table:number-columns-repeated="1022"/>
        </table:table-row>
        <table:table-row table:style-name="ro1">
          <table:table-cell table:style-name="ce2" office:value-type="float" office:value="1.01480406140928" calcext:value-type="float">
            <text:p>1.01480406140928</text:p>
          </table:table-cell>
          <table:table-cell table:style-name="ce2" office:value-type="float" office:value="-0.229181024425775" calcext:value-type="float">
            <text:p>-0.229181024425775</text:p>
          </table:table-cell>
          <table:table-cell table:number-columns-repeated="1022"/>
        </table:table-row>
        <table:table-row table:style-name="ro1">
          <table:table-cell table:style-name="ce2" office:value-type="float" office:value="-4.34925016816047" calcext:value-type="float">
            <text:p>-4.34925016816047</text:p>
          </table:table-cell>
          <table:table-cell table:style-name="ce2" office:value-type="float" office:value="-3.33450201433175" calcext:value-type="float">
            <text:p>-3.33450201433175</text:p>
          </table:table-cell>
          <table:table-cell table:number-columns-repeated="1022"/>
        </table:table-row>
        <table:table-row table:style-name="ro1">
          <table:table-cell table:style-name="ce2" office:value-type="float" office:value="0.641551829474613" calcext:value-type="float">
            <text:p>0.641551829474613</text:p>
          </table:table-cell>
          <table:table-cell table:style-name="ce2" office:value-type="float" office:value="-0.229566151114609" calcext:value-type="float">
            <text:p>-0.229566151114609</text:p>
          </table:table-cell>
          <table:table-cell table:number-columns-repeated="1022"/>
        </table:table-row>
        <table:table-row table:style-name="ro1">
          <table:table-cell table:style-name="ce2" office:value-type="float" office:value="3.28435275242675" calcext:value-type="float">
            <text:p>3.28435275242675</text:p>
          </table:table-cell>
          <table:table-cell table:style-name="ce2" office:value-type="float" office:value="1.87029315176617" calcext:value-type="float">
            <text:p>1.87029315176617</text:p>
          </table:table-cell>
          <table:table-cell table:number-columns-repeated="1022"/>
        </table:table-row>
        <table:table-row table:style-name="ro1">
          <table:table-cell table:style-name="ce2" office:value-type="float" office:value="0.631872654632107" calcext:value-type="float">
            <text:p>0.631872654632107</text:p>
          </table:table-cell>
          <table:table-cell table:style-name="ce2" office:value-type="float" office:value="0.240659163181651" calcext:value-type="float">
            <text:p>0.240659163181651</text:p>
          </table:table-cell>
          <table:table-cell table:number-columns-repeated="1022"/>
        </table:table-row>
        <table:table-row table:style-name="ro1">
          <table:table-cell table:style-name="ce2" office:value-type="float" office:value="0.461823716139827" calcext:value-type="float">
            <text:p>0.461823716139827</text:p>
          </table:table-cell>
          <table:table-cell table:style-name="ce2" office:value-type="float" office:value="-0.656162023394387" calcext:value-type="float">
            <text:p>-0.656162023394387</text:p>
          </table:table-cell>
          <table:table-cell table:number-columns-repeated="1022"/>
        </table:table-row>
        <table:table-row table:style-name="ro1">
          <table:table-cell table:style-name="ce2" office:value-type="float" office:value="-2.55243589478655" calcext:value-type="float">
            <text:p>-2.55243589478655</text:p>
          </table:table-cell>
          <table:table-cell table:style-name="ce2" office:value-type="float" office:value="-0.96995480642273" calcext:value-type="float">
            <text:p>-0.96995480642273</text:p>
          </table:table-cell>
          <table:table-cell table:number-columns-repeated="1022"/>
        </table:table-row>
        <table:table-row table:style-name="ro1">
          <table:table-cell table:style-name="ce2" office:value-type="float" office:value="1.32663455537595" calcext:value-type="float">
            <text:p>1.32663455537595</text:p>
          </table:table-cell>
          <table:table-cell table:style-name="ce2" office:value-type="float" office:value="0.711385570033347" calcext:value-type="float">
            <text:p>0.711385570033347</text:p>
          </table:table-cell>
          <table:table-cell table:number-columns-repeated="1022"/>
        </table:table-row>
        <table:table-row table:style-name="ro1">
          <table:table-cell table:style-name="ce2" office:value-type="float" office:value="1.42135342377886" calcext:value-type="float">
            <text:p>1.42135342377886</text:p>
          </table:table-cell>
          <table:table-cell table:style-name="ce2" office:value-type="float" office:value="1.12011754074233" calcext:value-type="float">
            <text:p>1.12011754074233</text:p>
          </table:table-cell>
          <table:table-cell table:number-columns-repeated="1022"/>
        </table:table-row>
        <table:table-row table:style-name="ro1">
          <table:table-cell table:style-name="ce2" office:value-type="float" office:value="0.193060558818911" calcext:value-type="float">
            <text:p>0.193060558818911</text:p>
          </table:table-cell>
          <table:table-cell table:style-name="ce2" office:value-type="float" office:value="0.163306727261377" calcext:value-type="float">
            <text:p>0.163306727261377</text:p>
          </table:table-cell>
          <table:table-cell table:number-columns-repeated="1022"/>
        </table:table-row>
        <table:table-row table:style-name="ro1">
          <table:table-cell table:style-name="ce2" office:value-type="float" office:value="3.3852170968589" calcext:value-type="float">
            <text:p>3.3852170968589</text:p>
          </table:table-cell>
          <table:table-cell table:style-name="ce2" office:value-type="float" office:value="1.89053565665088" calcext:value-type="float">
            <text:p>1.89053565665088</text:p>
          </table:table-cell>
          <table:table-cell table:number-columns-repeated="1022"/>
        </table:table-row>
        <table:table-row table:style-name="ro1">
          <table:table-cell table:style-name="ce2" office:value-type="float" office:value="0.0447177493830408" calcext:value-type="float">
            <text:p>0.044717749383041</text:p>
          </table:table-cell>
          <table:table-cell table:style-name="ce2" office:value-type="float" office:value="0.390925775938821" calcext:value-type="float">
            <text:p>0.390925775938821</text:p>
          </table:table-cell>
          <table:table-cell table:number-columns-repeated="1022"/>
        </table:table-row>
        <table:table-row table:style-name="ro1">
          <table:table-cell table:style-name="ce2" office:value-type="float" office:value="-0.381061191637607" calcext:value-type="float">
            <text:p>-0.381061191637607</text:p>
          </table:table-cell>
          <table:table-cell table:style-name="ce2" office:value-type="float" office:value="-1.54112859824457" calcext:value-type="float">
            <text:p>-1.54112859824457</text:p>
          </table:table-cell>
          <table:table-cell table:number-columns-repeated="1022"/>
        </table:table-row>
        <table:table-row table:style-name="ro1">
          <table:table-cell table:style-name="ce2" office:value-type="float" office:value="-2.57401102348917" calcext:value-type="float">
            <text:p>-2.57401102348917</text:p>
          </table:table-cell>
          <table:table-cell table:style-name="ce2" office:value-type="float" office:value="-1.48170727486113" calcext:value-type="float">
            <text:p>-1.48170727486113</text:p>
          </table:table-cell>
          <table:table-cell table:number-columns-repeated="1022"/>
        </table:table-row>
        <table:table-row table:style-name="ro1">
          <table:table-cell table:style-name="ce2" office:value-type="float" office:value="0.327357795280103" calcext:value-type="float">
            <text:p>0.327357795280103</text:p>
          </table:table-cell>
          <table:table-cell table:style-name="ce2" office:value-type="float" office:value="0.517702542337901" calcext:value-type="float">
            <text:p>0.517702542337901</text:p>
          </table:table-cell>
          <table:table-cell table:number-columns-repeated="1022"/>
        </table:table-row>
        <table:table-row table:style-name="ro1">
          <table:table-cell table:style-name="ce2" office:value-type="float" office:value="1.74522216756894" calcext:value-type="float">
            <text:p>1.74522216756894</text:p>
          </table:table-cell>
          <table:table-cell table:style-name="ce2" office:value-type="float" office:value="1.0047686974251" calcext:value-type="float">
            <text:p>1.0047686974251</text:p>
          </table:table-cell>
          <table:table-cell table:number-columns-repeated="1022"/>
        </table:table-row>
        <table:table-row table:style-name="ro1">
          <table:table-cell table:style-name="ce2" office:value-type="float" office:value="1.37360115394029" calcext:value-type="float">
            <text:p>1.37360115394029</text:p>
          </table:table-cell>
          <table:table-cell table:style-name="ce2" office:value-type="float" office:value="1.31167877507482" calcext:value-type="float">
            <text:p>1.31167877507482</text:p>
          </table:table-cell>
          <table:table-cell table:number-columns-repeated="1022"/>
        </table:table-row>
        <table:table-row table:style-name="ro1">
          <table:table-cell table:style-name="ce2" office:value-type="float" office:value="0.80989242903315" calcext:value-type="float">
            <text:p>0.80989242903315</text:p>
          </table:table-cell>
          <table:table-cell table:style-name="ce2" office:value-type="float" office:value="1.08617084219693" calcext:value-type="float">
            <text:p>1.08617084219693</text:p>
          </table:table-cell>
          <table:table-cell table:number-columns-repeated="1022"/>
        </table:table-row>
        <table:table-row table:style-name="ro1">
          <table:table-cell table:style-name="ce2" office:value-type="float" office:value="-1.09725585844275" calcext:value-type="float">
            <text:p>-1.09725585844275</text:p>
          </table:table-cell>
          <table:table-cell table:style-name="ce2" office:value-type="float" office:value="-1.77210171890944" calcext:value-type="float">
            <text:p>-1.77210171890944</text:p>
          </table:table-cell>
          <table:table-cell table:number-columns-repeated="1022"/>
        </table:table-row>
        <table:table-row table:style-name="ro1">
          <table:table-cell table:style-name="ce2" office:value-type="float" office:value="-0.0668166974071688" calcext:value-type="float">
            <text:p>-0.066816697407169</text:p>
          </table:table-cell>
          <table:table-cell table:style-name="ce2" office:value-type="float" office:value="0.199879883682359" calcext:value-type="float">
            <text:p>0.199879883682359</text:p>
          </table:table-cell>
          <table:table-cell table:number-columns-repeated="1022"/>
        </table:table-row>
        <table:table-row table:style-name="ro1">
          <table:table-cell table:style-name="ce2" office:value-type="float" office:value="-0.529876296170495" calcext:value-type="float">
            <text:p>-0.529876296170495</text:p>
          </table:table-cell>
          <table:table-cell table:style-name="ce2" office:value-type="float" office:value="-0.446228414348553" calcext:value-type="float">
            <text:p>-0.446228414348553</text:p>
          </table:table-cell>
          <table:table-cell table:number-columns-repeated="1022"/>
        </table:table-row>
        <table:table-row table:style-name="ro1">
          <table:table-cell table:style-name="ce2" office:value-type="float" office:value="-0.27507474835238" calcext:value-type="float">
            <text:p>-0.27507474835238</text:p>
          </table:table-cell>
          <table:table-cell table:style-name="ce2" office:value-type="float" office:value="0.611208521346915" calcext:value-type="float">
            <text:p>0.611208521346915</text:p>
          </table:table-cell>
          <table:table-cell table:number-columns-repeated="1022"/>
        </table:table-row>
        <table:table-row table:style-name="ro1">
          <table:table-cell table:style-name="ce2" office:value-type="float" office:value="1.86842720058913" calcext:value-type="float">
            <text:p>1.86842720058913</text:p>
          </table:table-cell>
          <table:table-cell table:style-name="ce2" office:value-type="float" office:value="0.60404203523253" calcext:value-type="float">
            <text:p>0.60404203523253</text:p>
          </table:table-cell>
          <table:table-cell table:number-columns-repeated="1022"/>
        </table:table-row>
        <table:table-row table:style-name="ro1">
          <table:table-cell table:style-name="ce2" office:value-type="float" office:value="2.35785839548479" calcext:value-type="float">
            <text:p>2.35785839548479</text:p>
          </table:table-cell>
          <table:table-cell table:style-name="ce2" office:value-type="float" office:value="1.57218107792886" calcext:value-type="float">
            <text:p>1.57218107792886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c21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zc2</text:p>
          </table:table-cell>
          <table:table-cell table:style-name="ce1" office:value-type="string" calcext:value-type="string">
            <text:p>zc1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variance</text:p>
          </table:table-cell>
          <table:table-cell table:number-columns-repeated="1019"/>
        </table:table-row>
        <table:table-row table:style-name="ro1">
          <table:table-cell table:style-name="ce5" table:formula="of:=[$zc12.B2]" office:value-type="float" office:value="-1.17762089711125" calcext:value-type="float">
            <text:p>-1.17762089711125</text:p>
          </table:table-cell>
          <table:table-cell table:style-name="ce4" table:formula="of:=[$zc12.A2]" office:value-type="float" office:value="-3.10447327519894" calcext:value-type="float">
            <text:p>-3.10447327519894</text:p>
          </table:table-cell>
          <table:table-cell/>
          <table:table-cell table:style-name="ce2" table:formula="of:=AVERAGE([.A2:.A101])" office:value-type="float" office:value="-0.0932673458922351" calcext:value-type="float">
            <text:p>-0.093267345892235</text:p>
          </table:table-cell>
          <table:table-cell table:style-name="ce2" table:formula="of:=VAR([.A2:.A101])" office:value-type="float" office:value="1.23755845026547" calcext:value-type="float">
            <text:p>1.23755845026547</text:p>
          </table:table-cell>
          <table:table-cell table:number-columns-repeated="1019"/>
        </table:table-row>
        <table:table-row table:style-name="ro1">
          <table:table-cell table:style-name="ce2" table:formula="of:=[$zc12.B3]" office:value-type="float" office:value="-1.06412620235732" calcext:value-type="float">
            <text:p>-1.06412620235732</text:p>
          </table:table-cell>
          <table:table-cell table:style-name="ce2" table:formula="of:=[$zc12.A3]" office:value-type="float" office:value="-2.09913231961539" calcext:value-type="float">
            <text:p>-2.09913231961539</text:p>
          </table:table-cell>
          <table:table-cell/>
          <table:table-cell table:style-name="ce2" table:formula="of:=AVERAGE([.B2:.B10])" office:value-type="float" office:value="-0.732164430076378" calcext:value-type="float">
            <text:p>-0.732164430076378</text:p>
          </table:table-cell>
          <table:table-cell table:style-name="ce2" table:formula="of:=VAR([.B2:.B101])" office:value-type="float" office:value="2.49355145387298" calcext:value-type="float">
            <text:p>2.49355145387298</text:p>
          </table:table-cell>
          <table:table-cell table:number-columns-repeated="1019"/>
        </table:table-row>
        <table:table-row table:style-name="ro1">
          <table:table-cell table:style-name="ce2" table:formula="of:=[$zc12.B4]" office:value-type="float" office:value="-0.134921322394199" calcext:value-type="float">
            <text:p>-0.134921322394199</text:p>
          </table:table-cell>
          <table:table-cell table:style-name="ce2" table:formula="of:=[$zc12.A4]" office:value-type="float" office:value="0.322112036336353" calcext:value-type="float">
            <text:p>0.322112036336353</text:p>
          </table:table-cell>
          <table:table-cell/>
          <table:table-cell table:style-name="ce3" office:value-type="string" calcext:value-type="string">
            <text:p>Correlation coefficient</text:p>
          </table:table-cell>
          <table:table-cell table:number-columns-repeated="1020"/>
        </table:table-row>
        <table:table-row table:style-name="ro1">
          <table:table-cell table:style-name="ce2" table:formula="of:=[$zc12.B5]" office:value-type="float" office:value="0.098094955080508" calcext:value-type="float">
            <text:p>0.098094955080508</text:p>
          </table:table-cell>
          <table:table-cell table:style-name="ce2" table:formula="of:=[$zc12.A5]" office:value-type="float" office:value="-0.59845158215534" calcext:value-type="float">
            <text:p>-0.59845158215534</text:p>
          </table:table-cell>
          <table:table-cell/>
          <table:table-cell table:style-name="ce2" table:formula="of:=CORREL([.A2:.A101];[.B2:.B101])" office:value-type="float" office:value="0.750880200726144" calcext:value-type="float">
            <text:p>0.750880200726144</text:p>
          </table:table-cell>
          <table:table-cell table:number-columns-repeated="1020"/>
        </table:table-row>
        <table:table-row table:style-name="ro1">
          <table:table-cell table:style-name="ce2" table:formula="of:=[$zc12.B6]" office:value-type="float" office:value="0.378033099701684" calcext:value-type="float">
            <text:p>0.378033099701684</text:p>
          </table:table-cell>
          <table:table-cell table:style-name="ce2" table:formula="of:=[$zc12.A6]" office:value-type="float" office:value="1.41773495603427" calcext:value-type="float">
            <text:p>1.41773495603427</text:p>
          </table:table-cell>
          <table:table-cell/>
          <table:table-cell table:style-name="ce3" office:value-type="string" calcext:value-type="string">
            <text:p>Upper Cholesky</text:p>
          </table:table-cell>
          <table:table-cell table:number-columns-repeated="1020"/>
        </table:table-row>
        <table:table-row table:style-name="ro1">
          <table:table-cell table:style-name="ce2" table:formula="of:=[$zc12.B7]" office:value-type="float" office:value="1.26465758761363" calcext:value-type="float">
            <text:p>1.26465758761363</text:p>
          </table:table-cell>
          <table:table-cell table:style-name="ce2" table:formula="of:=[$zc12.A7]" office:value-type="float" office:value="1.6146268284352" calcext:value-type="float">
            <text:p>1.614626828435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table:formula="of:=[$zc12.B8]" office:value-type="float" office:value="0.917771808026088" calcext:value-type="float">
            <text:p>0.917771808026088</text:p>
          </table:table-cell>
          <table:table-cell table:style-name="ce2" table:formula="of:=[$zc12.A8]" office:value-type="float" office:value="-1.13175413895763" calcext:value-type="float">
            <text:p>-1.1317541389576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table:formula="of:=[$zc12.B9]" office:value-type="float" office:value="-1.00002053800383" calcext:value-type="float">
            <text:p>-1.00002053800383</text:p>
          </table:table-cell>
          <table:table-cell table:style-name="ce2" table:formula="of:=[$zc12.A9]" office:value-type="float" office:value="-1.58491313773872" calcext:value-type="float">
            <text:p>-1.58491313773872</text:p>
          </table:table-cell>
          <table:table-cell table:number-columns-repeated="1022"/>
        </table:table-row>
        <table:table-row table:style-name="ro1">
          <table:table-cell table:style-name="ce2" table:formula="of:=[$zc12.B10]" office:value-type="float" office:value="-1.14540169929872" calcext:value-type="float">
            <text:p>-1.14540169929872</text:p>
          </table:table-cell>
          <table:table-cell table:style-name="ce2" table:formula="of:=[$zc12.A10]" office:value-type="float" office:value="-1.4252292378272" calcext:value-type="float">
            <text:p>-1.4252292378272</text:p>
          </table:table-cell>
          <table:table-cell table:number-columns-repeated="1022"/>
        </table:table-row>
        <table:table-row table:style-name="ro1">
          <table:table-cell table:style-name="ce2" table:formula="of:=[$zc12.B11]" office:value-type="float" office:value="-0.720177633427551" calcext:value-type="float">
            <text:p>-0.720177633427551</text:p>
          </table:table-cell>
          <table:table-cell table:style-name="ce2" table:formula="of:=[$zc12.A11]" office:value-type="float" office:value="-0.869029010303996" calcext:value-type="float">
            <text:p>-0.869029010303996</text:p>
          </table:table-cell>
          <table:table-cell table:number-columns-repeated="1022"/>
        </table:table-row>
        <table:table-row table:style-name="ro1">
          <table:table-cell table:style-name="ce2" table:formula="of:=[$zc12.B12]" office:value-type="float" office:value="2.4228255375329" calcext:value-type="float">
            <text:p>2.4228255375329</text:p>
          </table:table-cell>
          <table:table-cell table:style-name="ce2" table:formula="of:=[$zc12.A12]" office:value-type="float" office:value="1.59352194592647" calcext:value-type="float">
            <text:p>1.59352194592647</text:p>
          </table:table-cell>
          <table:table-cell table:number-columns-repeated="1022"/>
        </table:table-row>
        <table:table-row table:style-name="ro1">
          <table:table-cell table:style-name="ce2" table:formula="of:=[$zc12.B13]" office:value-type="float" office:value="0.0438615146056269" calcext:value-type="float">
            <text:p>0.043861514605627</text:p>
          </table:table-cell>
          <table:table-cell table:style-name="ce2" table:formula="of:=[$zc12.A13]" office:value-type="float" office:value="2.3043745723792" calcext:value-type="float">
            <text:p>2.3043745723792</text:p>
          </table:table-cell>
          <table:table-cell table:number-columns-repeated="1022"/>
        </table:table-row>
        <table:table-row table:style-name="ro1">
          <table:table-cell table:style-name="ce2" table:formula="of:=[$zc12.B14]" office:value-type="float" office:value="-0.913123139696332" calcext:value-type="float">
            <text:p>-0.913123139696332</text:p>
          </table:table-cell>
          <table:table-cell table:style-name="ce2" table:formula="of:=[$zc12.A14]" office:value-type="float" office:value="-0.932267304097896" calcext:value-type="float">
            <text:p>-0.932267304097896</text:p>
          </table:table-cell>
          <table:table-cell table:number-columns-repeated="1022"/>
        </table:table-row>
        <table:table-row table:style-name="ro1">
          <table:table-cell table:style-name="ce2" table:formula="of:=[$zc12.B15]" office:value-type="float" office:value="-0.206563374552184" calcext:value-type="float">
            <text:p>-0.206563374552184</text:p>
          </table:table-cell>
          <table:table-cell table:style-name="ce2" table:formula="of:=[$zc12.A15]" office:value-type="float" office:value="-0.567887910190343" calcext:value-type="float">
            <text:p>-0.567887910190343</text:p>
          </table:table-cell>
          <table:table-cell table:number-columns-repeated="1022"/>
        </table:table-row>
        <table:table-row table:style-name="ro1">
          <table:table-cell table:style-name="ce2" table:formula="of:=[$zc12.B16]" office:value-type="float" office:value="0.764491376625081" calcext:value-type="float">
            <text:p>0.764491376625081</text:p>
          </table:table-cell>
          <table:table-cell table:style-name="ce2" table:formula="of:=[$zc12.A16]" office:value-type="float" office:value="1.98467404588658" calcext:value-type="float">
            <text:p>1.98467404588658</text:p>
          </table:table-cell>
          <table:table-cell table:number-columns-repeated="1022"/>
        </table:table-row>
        <table:table-row table:style-name="ro1">
          <table:table-cell table:style-name="ce2" table:formula="of:=[$zc12.B17]" office:value-type="float" office:value="0.596211482113448" calcext:value-type="float">
            <text:p>0.596211482113448</text:p>
          </table:table-cell>
          <table:table-cell table:style-name="ce2" table:formula="of:=[$zc12.A17]" office:value-type="float" office:value="0.234972083338288" calcext:value-type="float">
            <text:p>0.234972083338288</text:p>
          </table:table-cell>
          <table:table-cell table:number-columns-repeated="1022"/>
        </table:table-row>
        <table:table-row table:style-name="ro1">
          <table:table-cell table:style-name="ce2" table:formula="of:=[$zc12.B18]" office:value-type="float" office:value="0.989636078140016" calcext:value-type="float">
            <text:p>0.989636078140016</text:p>
          </table:table-cell>
          <table:table-cell table:style-name="ce2" table:formula="of:=[$zc12.A18]" office:value-type="float" office:value="1.57922624071635" calcext:value-type="float">
            <text:p>1.57922624071635</text:p>
          </table:table-cell>
          <table:table-cell table:number-columns-repeated="1022"/>
        </table:table-row>
        <table:table-row table:style-name="ro1">
          <table:table-cell table:style-name="ce2" table:formula="of:=[$zc12.B19]" office:value-type="float" office:value="-2.23725454325117" calcext:value-type="float">
            <text:p>-2.23725454325117</text:p>
          </table:table-cell>
          <table:table-cell table:style-name="ce2" table:formula="of:=[$zc12.A19]" office:value-type="float" office:value="-2.52339022637412" calcext:value-type="float">
            <text:p>-2.52339022637412</text:p>
          </table:table-cell>
          <table:table-cell table:number-columns-repeated="1022"/>
        </table:table-row>
        <table:table-row table:style-name="ro1">
          <table:table-cell table:style-name="ce2" table:formula="of:=[$zc12.B20]" office:value-type="float" office:value="-1.91501237561855" calcext:value-type="float">
            <text:p>-1.91501237561855</text:p>
          </table:table-cell>
          <table:table-cell table:style-name="ce2" table:formula="of:=[$zc12.A20]" office:value-type="float" office:value="0.234356270278204" calcext:value-type="float">
            <text:p>0.234356270278204</text:p>
          </table:table-cell>
          <table:table-cell table:number-columns-repeated="1022"/>
        </table:table-row>
        <table:table-row table:style-name="ro1">
          <table:table-cell table:style-name="ce2" table:formula="of:=[$zc12.B21]" office:value-type="float" office:value="-1.31772465886064" calcext:value-type="float">
            <text:p>-1.31772465886064</text:p>
          </table:table-cell>
          <table:table-cell table:style-name="ce2" table:formula="of:=[$zc12.A21]" office:value-type="float" office:value="-2.21190760793416" calcext:value-type="float">
            <text:p>-2.21190760793416</text:p>
          </table:table-cell>
          <table:table-cell table:number-columns-repeated="1022"/>
        </table:table-row>
        <table:table-row table:style-name="ro1">
          <table:table-cell table:style-name="ce2" table:formula="of:=[$zc12.B22]" office:value-type="float" office:value="0.118274833495045" calcext:value-type="float">
            <text:p>0.118274833495045</text:p>
          </table:table-cell>
          <table:table-cell table:style-name="ce2" table:formula="of:=[$zc12.A22]" office:value-type="float" office:value="0.412410772716235" calcext:value-type="float">
            <text:p>0.412410772716235</text:p>
          </table:table-cell>
          <table:table-cell table:number-columns-repeated="1022"/>
        </table:table-row>
        <table:table-row table:style-name="ro1">
          <table:table-cell table:style-name="ce2" table:formula="of:=[$zc12.B23]" office:value-type="float" office:value="0.10886298168157" calcext:value-type="float">
            <text:p>0.10886298168157</text:p>
          </table:table-cell>
          <table:table-cell table:style-name="ce2" table:formula="of:=[$zc12.A23]" office:value-type="float" office:value="0.798450716801117" calcext:value-type="float">
            <text:p>0.798450716801117</text:p>
          </table:table-cell>
          <table:table-cell table:number-columns-repeated="1022"/>
        </table:table-row>
        <table:table-row table:style-name="ro1">
          <table:table-cell table:style-name="ce2" table:formula="of:=[$zc12.B24]" office:value-type="float" office:value="-0.764212379737492" calcext:value-type="float">
            <text:p>-0.764212379737492</text:p>
          </table:table-cell>
          <table:table-cell table:style-name="ce2" table:formula="of:=[$zc12.A24]" office:value-type="float" office:value="1.12153796193993" calcext:value-type="float">
            <text:p>1.12153796193993</text:p>
          </table:table-cell>
          <table:table-cell table:number-columns-repeated="1022"/>
        </table:table-row>
        <table:table-row table:style-name="ro1">
          <table:table-cell table:style-name="ce2" table:formula="of:=[$zc12.B25]" office:value-type="float" office:value="-0.72250913500327" calcext:value-type="float">
            <text:p>-0.72250913500327</text:p>
          </table:table-cell>
          <table:table-cell table:style-name="ce2" table:formula="of:=[$zc12.A25]" office:value-type="float" office:value="-0.820317537027275" calcext:value-type="float">
            <text:p>-0.820317537027275</text:p>
          </table:table-cell>
          <table:table-cell table:number-columns-repeated="1022"/>
        </table:table-row>
        <table:table-row table:style-name="ro1">
          <table:table-cell table:style-name="ce2" table:formula="of:=[$zc12.B26]" office:value-type="float" office:value="-0.190926814218764" calcext:value-type="float">
            <text:p>-0.190926814218764</text:p>
          </table:table-cell>
          <table:table-cell table:style-name="ce2" table:formula="of:=[$zc12.A26]" office:value-type="float" office:value="0.390784103192222" calcext:value-type="float">
            <text:p>0.390784103192222</text:p>
          </table:table-cell>
          <table:table-cell table:number-columns-repeated="1022"/>
        </table:table-row>
        <table:table-row table:style-name="ro1">
          <table:table-cell table:style-name="ce2" table:formula="of:=[$zc12.B27]" office:value-type="float" office:value="-1.80206412750893" calcext:value-type="float">
            <text:p>-1.80206412750893</text:p>
          </table:table-cell>
          <table:table-cell table:style-name="ce2" table:formula="of:=[$zc12.A27]" office:value-type="float" office:value="-0.00198931732909082" calcext:value-type="float">
            <text:p>-0.001989317329091</text:p>
          </table:table-cell>
          <table:table-cell table:number-columns-repeated="1022"/>
        </table:table-row>
        <table:table-row table:style-name="ro1">
          <table:table-cell table:style-name="ce2" table:formula="of:=[$zc12.B28]" office:value-type="float" office:value="-0.12014682306724" calcext:value-type="float">
            <text:p>-0.12014682306724</text:p>
          </table:table-cell>
          <table:table-cell table:style-name="ce2" table:formula="of:=[$zc12.A28]" office:value-type="float" office:value="1.89355869489262" calcext:value-type="float">
            <text:p>1.89355869489262</text:p>
          </table:table-cell>
          <table:table-cell table:number-columns-repeated="1022"/>
        </table:table-row>
        <table:table-row table:style-name="ro1">
          <table:table-cell table:style-name="ce2" table:formula="of:=[$zc12.B29]" office:value-type="float" office:value="1.22447806999361" calcext:value-type="float">
            <text:p>1.22447806999361</text:p>
          </table:table-cell>
          <table:table-cell table:style-name="ce2" table:formula="of:=[$zc12.A29]" office:value-type="float" office:value="1.48718705864394" calcext:value-type="float">
            <text:p>1.48718705864394</text:p>
          </table:table-cell>
          <table:table-cell table:number-columns-repeated="1022"/>
        </table:table-row>
        <table:table-row table:style-name="ro1">
          <table:table-cell table:style-name="ce2" table:formula="of:=[$zc12.B30]" office:value-type="float" office:value="-0.141150591583537" calcext:value-type="float">
            <text:p>-0.141150591583537</text:p>
          </table:table-cell>
          <table:table-cell table:style-name="ce2" table:formula="of:=[$zc12.A30]" office:value-type="float" office:value="-0.062436936421607" calcext:value-type="float">
            <text:p>-0.062436936421607</text:p>
          </table:table-cell>
          <table:table-cell table:number-columns-repeated="1022"/>
        </table:table-row>
        <table:table-row table:style-name="ro1">
          <table:table-cell table:style-name="ce2" table:formula="of:=[$zc12.B31]" office:value-type="float" office:value="-0.561860187784501" calcext:value-type="float">
            <text:p>-0.561860187784501</text:p>
          </table:table-cell>
          <table:table-cell table:style-name="ce2" table:formula="of:=[$zc12.A31]" office:value-type="float" office:value="-1.15084046407402" calcext:value-type="float">
            <text:p>-1.15084046407402</text:p>
          </table:table-cell>
          <table:table-cell table:number-columns-repeated="1022"/>
        </table:table-row>
        <table:table-row table:style-name="ro1">
          <table:table-cell table:style-name="ce2" table:formula="of:=[$zc12.B32]" office:value-type="float" office:value="0.182039625220717" calcext:value-type="float">
            <text:p>0.182039625220717</text:p>
          </table:table-cell>
          <table:table-cell table:style-name="ce2" table:formula="of:=[$zc12.A32]" office:value-type="float" office:value="1.52835423970062" calcext:value-type="float">
            <text:p>1.52835423970062</text:p>
          </table:table-cell>
          <table:table-cell table:number-columns-repeated="1022"/>
        </table:table-row>
        <table:table-row table:style-name="ro1">
          <table:table-cell table:style-name="ce2" table:formula="of:=[$zc12.B33]" office:value-type="float" office:value="0.325812051471838" calcext:value-type="float">
            <text:p>0.325812051471838</text:p>
          </table:table-cell>
          <table:table-cell table:style-name="ce2" table:formula="of:=[$zc12.A33]" office:value-type="float" office:value="-1.95365485029667" calcext:value-type="float">
            <text:p>-1.95365485029667</text:p>
          </table:table-cell>
          <table:table-cell table:number-columns-repeated="1022"/>
        </table:table-row>
        <table:table-row table:style-name="ro1">
          <table:table-cell table:style-name="ce2" table:formula="of:=[$zc12.B34]" office:value-type="float" office:value="-0.554962702604728" calcext:value-type="float">
            <text:p>-0.554962702604728</text:p>
          </table:table-cell>
          <table:table-cell table:style-name="ce2" table:formula="of:=[$zc12.A34]" office:value-type="float" office:value="-2.05806937387216" calcext:value-type="float">
            <text:p>-2.05806937387216</text:p>
          </table:table-cell>
          <table:table-cell table:number-columns-repeated="1022"/>
        </table:table-row>
        <table:table-row table:style-name="ro1">
          <table:table-cell table:style-name="ce2" table:formula="of:=[$zc12.B35]" office:value-type="float" office:value="-0.783078182643158" calcext:value-type="float">
            <text:p>-0.783078182643158</text:p>
          </table:table-cell>
          <table:table-cell table:style-name="ce2" table:formula="of:=[$zc12.A35]" office:value-type="float" office:value="-2.38324914899934" calcext:value-type="float">
            <text:p>-2.38324914899934</text:p>
          </table:table-cell>
          <table:table-cell table:number-columns-repeated="1022"/>
        </table:table-row>
        <table:table-row table:style-name="ro1">
          <table:table-cell table:style-name="ce2" table:formula="of:=[$zc12.B36]" office:value-type="float" office:value="-0.240942780766338" calcext:value-type="float">
            <text:p>-0.240942780766338</text:p>
          </table:table-cell>
          <table:table-cell table:style-name="ce2" table:formula="of:=[$zc12.A36]" office:value-type="float" office:value="0.585410888479767" calcext:value-type="float">
            <text:p>0.585410888479767</text:p>
          </table:table-cell>
          <table:table-cell table:number-columns-repeated="1022"/>
        </table:table-row>
        <table:table-row table:style-name="ro1">
          <table:table-cell table:style-name="ce2" table:formula="of:=[$zc12.B37]" office:value-type="float" office:value="-1.60105796918373" calcext:value-type="float">
            <text:p>-1.60105796918373</text:p>
          </table:table-cell>
          <table:table-cell table:style-name="ce2" table:formula="of:=[$zc12.A37]" office:value-type="float" office:value="-1.85104520696344" calcext:value-type="float">
            <text:p>-1.85104520696344</text:p>
          </table:table-cell>
          <table:table-cell table:number-columns-repeated="1022"/>
        </table:table-row>
        <table:table-row table:style-name="ro1">
          <table:table-cell table:style-name="ce2" table:formula="of:=[$zc12.B38]" office:value-type="float" office:value="-0.803160289837753" calcext:value-type="float">
            <text:p>-0.803160289837753</text:p>
          </table:table-cell>
          <table:table-cell table:style-name="ce2" table:formula="of:=[$zc12.A38]" office:value-type="float" office:value="-0.292530626711869" calcext:value-type="float">
            <text:p>-0.292530626711869</text:p>
          </table:table-cell>
          <table:table-cell table:number-columns-repeated="1022"/>
        </table:table-row>
        <table:table-row table:style-name="ro1">
          <table:table-cell table:style-name="ce2" table:formula="of:=[$zc12.B39]" office:value-type="float" office:value="-0.177942349391892" calcext:value-type="float">
            <text:p>-0.177942349391892</text:p>
          </table:table-cell>
          <table:table-cell table:style-name="ce2" table:formula="of:=[$zc12.A39]" office:value-type="float" office:value="-0.39826283288474" calcext:value-type="float">
            <text:p>-0.39826283288474</text:p>
          </table:table-cell>
          <table:table-cell table:number-columns-repeated="1022"/>
        </table:table-row>
        <table:table-row table:style-name="ro1">
          <table:table-cell table:style-name="ce2" table:formula="of:=[$zc12.B40]" office:value-type="float" office:value="-0.925627360712994" calcext:value-type="float">
            <text:p>-0.925627360712994</text:p>
          </table:table-cell>
          <table:table-cell table:style-name="ce2" table:formula="of:=[$zc12.A40]" office:value-type="float" office:value="1.83352164579867" calcext:value-type="float">
            <text:p>1.83352164579867</text:p>
          </table:table-cell>
          <table:table-cell table:number-columns-repeated="1022"/>
        </table:table-row>
        <table:table-row table:style-name="ro1">
          <table:table-cell table:style-name="ce2" table:formula="of:=[$zc12.B41]" office:value-type="float" office:value="1.93877410491445" calcext:value-type="float">
            <text:p>1.93877410491445</text:p>
          </table:table-cell>
          <table:table-cell table:style-name="ce2" table:formula="of:=[$zc12.A41]" office:value-type="float" office:value="3.19551304950797" calcext:value-type="float">
            <text:p>3.19551304950797</text:p>
          </table:table-cell>
          <table:table-cell table:number-columns-repeated="1022"/>
        </table:table-row>
        <table:table-row table:style-name="ro1">
          <table:table-cell table:style-name="ce2" table:formula="of:=[$zc12.B42]" office:value-type="float" office:value="0.558853414042948" calcext:value-type="float">
            <text:p>0.558853414042948</text:p>
          </table:table-cell>
          <table:table-cell table:style-name="ce2" table:formula="of:=[$zc12.A42]" office:value-type="float" office:value="-0.351432307456855" calcext:value-type="float">
            <text:p>-0.351432307456855</text:p>
          </table:table-cell>
          <table:table-cell table:number-columns-repeated="1022"/>
        </table:table-row>
        <table:table-row table:style-name="ro1">
          <table:table-cell table:style-name="ce2" table:formula="of:=[$zc12.B43]" office:value-type="float" office:value="-0.983609745705076" calcext:value-type="float">
            <text:p>-0.983609745705076</text:p>
          </table:table-cell>
          <table:table-cell table:style-name="ce2" table:formula="of:=[$zc12.A43]" office:value-type="float" office:value="0.50050152758557" calcext:value-type="float">
            <text:p>0.50050152758557</text:p>
          </table:table-cell>
          <table:table-cell table:number-columns-repeated="1022"/>
        </table:table-row>
        <table:table-row table:style-name="ro1">
          <table:table-cell table:style-name="ce2" table:formula="of:=[$zc12.B44]" office:value-type="float" office:value="-0.295170263415405" calcext:value-type="float">
            <text:p>-0.295170263415405</text:p>
          </table:table-cell>
          <table:table-cell table:style-name="ce2" table:formula="of:=[$zc12.A44]" office:value-type="float" office:value="0.127556100683384" calcext:value-type="float">
            <text:p>0.127556100683384</text:p>
          </table:table-cell>
          <table:table-cell table:number-columns-repeated="1022"/>
        </table:table-row>
        <table:table-row table:style-name="ro1">
          <table:table-cell table:style-name="ce2" table:formula="of:=[$zc12.B45]" office:value-type="float" office:value="-0.254158816597365" calcext:value-type="float">
            <text:p>-0.254158816597365</text:p>
          </table:table-cell>
          <table:table-cell table:style-name="ce2" table:formula="of:=[$zc12.A45]" office:value-type="float" office:value="-1.15188571654518" calcext:value-type="float">
            <text:p>-1.15188571654518</text:p>
          </table:table-cell>
          <table:table-cell table:number-columns-repeated="1022"/>
        </table:table-row>
        <table:table-row table:style-name="ro1">
          <table:table-cell table:style-name="ce2" table:formula="of:=[$zc12.B46]" office:value-type="float" office:value="-0.493626034881435" calcext:value-type="float">
            <text:p>-0.493626034881435</text:p>
          </table:table-cell>
          <table:table-cell table:style-name="ce2" table:formula="of:=[$zc12.A46]" office:value-type="float" office:value="0.196072497263227" calcext:value-type="float">
            <text:p>0.196072497263227</text:p>
          </table:table-cell>
          <table:table-cell table:number-columns-repeated="1022"/>
        </table:table-row>
        <table:table-row table:style-name="ro1">
          <table:table-cell table:style-name="ce2" table:formula="of:=[$zc12.B47]" office:value-type="float" office:value="-0.937401605837482" calcext:value-type="float">
            <text:p>-0.937401605837482</text:p>
          </table:table-cell>
          <table:table-cell table:style-name="ce2" table:formula="of:=[$zc12.A47]" office:value-type="float" office:value="-3.00279724560003" calcext:value-type="float">
            <text:p>-3.00279724560003</text:p>
          </table:table-cell>
          <table:table-cell table:number-columns-repeated="1022"/>
        </table:table-row>
        <table:table-row table:style-name="ro1">
          <table:table-cell table:style-name="ce2" table:formula="of:=[$zc12.B48]" office:value-type="float" office:value="1.01560715554405" calcext:value-type="float">
            <text:p>1.01560715554405</text:p>
          </table:table-cell>
          <table:table-cell table:style-name="ce2" table:formula="of:=[$zc12.A48]" office:value-type="float" office:value="0.479988773139164" calcext:value-type="float">
            <text:p>0.479988773139164</text:p>
          </table:table-cell>
          <table:table-cell table:number-columns-repeated="1022"/>
        </table:table-row>
        <table:table-row table:style-name="ro1">
          <table:table-cell table:style-name="ce2" table:formula="of:=[$zc12.B49]" office:value-type="float" office:value="1.29259716062921" calcext:value-type="float">
            <text:p>1.29259716062921</text:p>
          </table:table-cell>
          <table:table-cell table:style-name="ce2" table:formula="of:=[$zc12.A49]" office:value-type="float" office:value="0.953584108683881" calcext:value-type="float">
            <text:p>0.953584108683881</text:p>
          </table:table-cell>
          <table:table-cell table:number-columns-repeated="1022"/>
        </table:table-row>
        <table:table-row table:style-name="ro1">
          <table:table-cell table:style-name="ce2" table:formula="of:=[$zc12.B50]" office:value-type="float" office:value="-0.417103388758593" calcext:value-type="float">
            <text:p>-0.417103388758593</text:p>
          </table:table-cell>
          <table:table-cell table:style-name="ce2" table:formula="of:=[$zc12.A50]" office:value-type="float" office:value="-0.407164306368686" calcext:value-type="float">
            <text:p>-0.407164306368686</text:p>
          </table:table-cell>
          <table:table-cell table:number-columns-repeated="1022"/>
        </table:table-row>
        <table:table-row table:style-name="ro1">
          <table:table-cell table:style-name="ce2" table:formula="of:=[$zc12.B51]" office:value-type="float" office:value="1.21033227724932" calcext:value-type="float">
            <text:p>1.21033227724932</text:p>
          </table:table-cell>
          <table:table-cell table:style-name="ce2" table:formula="of:=[$zc12.A51]" office:value-type="float" office:value="-0.512497889661574" calcext:value-type="float">
            <text:p>-0.512497889661574</text:p>
          </table:table-cell>
          <table:table-cell table:number-columns-repeated="1022"/>
        </table:table-row>
        <table:table-row table:style-name="ro1">
          <table:table-cell table:style-name="ce2" table:formula="of:=[$zc12.B52]" office:value-type="float" office:value="-0.214272501170931" calcext:value-type="float">
            <text:p>-0.214272501170931</text:p>
          </table:table-cell>
          <table:table-cell table:style-name="ce2" table:formula="of:=[$zc12.A52]" office:value-type="float" office:value="-0.418837011960534" calcext:value-type="float">
            <text:p>-0.418837011960534</text:p>
          </table:table-cell>
          <table:table-cell table:number-columns-repeated="1022"/>
        </table:table-row>
        <table:table-row table:style-name="ro1">
          <table:table-cell table:style-name="ce2" table:formula="of:=[$zc12.B53]" office:value-type="float" office:value="-0.224563657102622" calcext:value-type="float">
            <text:p>-0.224563657102622</text:p>
          </table:table-cell>
          <table:table-cell table:style-name="ce2" table:formula="of:=[$zc12.A53]" office:value-type="float" office:value="0.025811706570765" calcext:value-type="float">
            <text:p>0.025811706570765</text:p>
          </table:table-cell>
          <table:table-cell table:number-columns-repeated="1022"/>
        </table:table-row>
        <table:table-row table:style-name="ro1">
          <table:table-cell table:style-name="ce2" table:formula="of:=[$zc12.B54]" office:value-type="float" office:value="1.2254467331998" calcext:value-type="float">
            <text:p>1.2254467331998</text:p>
          </table:table-cell>
          <table:table-cell table:style-name="ce2" table:formula="of:=[$zc12.A54]" office:value-type="float" office:value="1.92272832986231" calcext:value-type="float">
            <text:p>1.92272832986231</text:p>
          </table:table-cell>
          <table:table-cell table:number-columns-repeated="1022"/>
        </table:table-row>
        <table:table-row table:style-name="ro1">
          <table:table-cell table:style-name="ce2" table:formula="of:=[$zc12.B55]" office:value-type="float" office:value="0.977859118051835" calcext:value-type="float">
            <text:p>0.977859118051835</text:p>
          </table:table-cell>
          <table:table-cell table:style-name="ce2" table:formula="of:=[$zc12.A55]" office:value-type="float" office:value="0.253672008553967" calcext:value-type="float">
            <text:p>0.253672008553967</text:p>
          </table:table-cell>
          <table:table-cell table:number-columns-repeated="1022"/>
        </table:table-row>
        <table:table-row table:style-name="ro1">
          <table:table-cell table:style-name="ce2" table:formula="of:=[$zc12.B56]" office:value-type="float" office:value="1.87125453515035" calcext:value-type="float">
            <text:p>1.87125453515035</text:p>
          </table:table-cell>
          <table:table-cell table:style-name="ce2" table:formula="of:=[$zc12.A56]" office:value-type="float" office:value="3.41006488565761" calcext:value-type="float">
            <text:p>3.41006488565761</text:p>
          </table:table-cell>
          <table:table-cell table:number-columns-repeated="1022"/>
        </table:table-row>
        <table:table-row table:style-name="ro1">
          <table:table-cell table:style-name="ce2" table:formula="of:=[$zc12.B57]" office:value-type="float" office:value="0.634811374511426" calcext:value-type="float">
            <text:p>0.634811374511426</text:p>
          </table:table-cell>
          <table:table-cell table:style-name="ce2" table:formula="of:=[$zc12.A57]" office:value-type="float" office:value="-0.642060858834295" calcext:value-type="float">
            <text:p>-0.642060858834295</text:p>
          </table:table-cell>
          <table:table-cell table:number-columns-repeated="1022"/>
        </table:table-row>
        <table:table-row table:style-name="ro1">
          <table:table-cell table:style-name="ce2" table:formula="of:=[$zc12.B58]" office:value-type="float" office:value="-0.0702710176545355" calcext:value-type="float">
            <text:p>-0.070271017654536</text:p>
          </table:table-cell>
          <table:table-cell table:style-name="ce2" table:formula="of:=[$zc12.A58]" office:value-type="float" office:value="1.23454888673333" calcext:value-type="float">
            <text:p>1.23454888673333</text:p>
          </table:table-cell>
          <table:table-cell table:number-columns-repeated="1022"/>
        </table:table-row>
        <table:table-row table:style-name="ro1">
          <table:table-cell table:style-name="ce2" table:formula="of:=[$zc12.B59]" office:value-type="float" office:value="1.53672287048549" calcext:value-type="float">
            <text:p>1.53672287048549</text:p>
          </table:table-cell>
          <table:table-cell table:style-name="ce2" table:formula="of:=[$zc12.A59]" office:value-type="float" office:value="1.05394881891739" calcext:value-type="float">
            <text:p>1.05394881891739</text:p>
          </table:table-cell>
          <table:table-cell table:number-columns-repeated="1022"/>
        </table:table-row>
        <table:table-row table:style-name="ro1">
          <table:table-cell table:style-name="ce2" table:formula="of:=[$zc12.B60]" office:value-type="float" office:value="0.39523725989249" calcext:value-type="float">
            <text:p>0.39523725989249</text:p>
          </table:table-cell>
          <table:table-cell table:style-name="ce2" table:formula="of:=[$zc12.A60]" office:value-type="float" office:value="-0.157060270828149" calcext:value-type="float">
            <text:p>-0.157060270828149</text:p>
          </table:table-cell>
          <table:table-cell table:number-columns-repeated="1022"/>
        </table:table-row>
        <table:table-row table:style-name="ro1">
          <table:table-cell table:style-name="ce2" table:formula="of:=[$zc12.B61]" office:value-type="float" office:value="-0.26187132995092" calcext:value-type="float">
            <text:p>-0.26187132995092</text:p>
          </table:table-cell>
          <table:table-cell table:style-name="ce2" table:formula="of:=[$zc12.A61]" office:value-type="float" office:value="-0.1253061154034" calcext:value-type="float">
            <text:p>-0.1253061154034</text:p>
          </table:table-cell>
          <table:table-cell table:number-columns-repeated="1022"/>
        </table:table-row>
        <table:table-row table:style-name="ro1">
          <table:table-cell table:style-name="ce2" table:formula="of:=[$zc12.B62]" office:value-type="float" office:value="-1.86616180107394" calcext:value-type="float">
            <text:p>-1.86616180107394</text:p>
          </table:table-cell>
          <table:table-cell table:style-name="ce2" table:formula="of:=[$zc12.A62]" office:value-type="float" office:value="-1.14063705553209" calcext:value-type="float">
            <text:p>-1.14063705553209</text:p>
          </table:table-cell>
          <table:table-cell table:number-columns-repeated="1022"/>
        </table:table-row>
        <table:table-row table:style-name="ro1">
          <table:table-cell table:style-name="ce2" table:formula="of:=[$zc12.B63]" office:value-type="float" office:value="-1.22467209012051" calcext:value-type="float">
            <text:p>-1.22467209012051</text:p>
          </table:table-cell>
          <table:table-cell table:style-name="ce2" table:formula="of:=[$zc12.A63]" office:value-type="float" office:value="-1.18464302523097" calcext:value-type="float">
            <text:p>-1.18464302523097</text:p>
          </table:table-cell>
          <table:table-cell table:number-columns-repeated="1022"/>
        </table:table-row>
        <table:table-row table:style-name="ro1">
          <table:table-cell table:style-name="ce2" table:formula="of:=[$zc12.B64]" office:value-type="float" office:value="0.606067100815168" calcext:value-type="float">
            <text:p>0.606067100815168</text:p>
          </table:table-cell>
          <table:table-cell table:style-name="ce2" table:formula="of:=[$zc12.A64]" office:value-type="float" office:value="1.84156678489977" calcext:value-type="float">
            <text:p>1.84156678489977</text:p>
          </table:table-cell>
          <table:table-cell table:number-columns-repeated="1022"/>
        </table:table-row>
        <table:table-row table:style-name="ro1">
          <table:table-cell table:style-name="ce2" table:formula="of:=[$zc12.B65]" office:value-type="float" office:value="1.09595303851598" calcext:value-type="float">
            <text:p>1.09595303851598</text:p>
          </table:table-cell>
          <table:table-cell table:style-name="ce2" table:formula="of:=[$zc12.A65]" office:value-type="float" office:value="-0.460584633746011" calcext:value-type="float">
            <text:p>-0.460584633746011</text:p>
          </table:table-cell>
          <table:table-cell table:number-columns-repeated="1022"/>
        </table:table-row>
        <table:table-row table:style-name="ro1">
          <table:table-cell table:style-name="ce2" table:formula="of:=[$zc12.B66]" office:value-type="float" office:value="-1.87541621920659" calcext:value-type="float">
            <text:p>-1.87541621920659</text:p>
          </table:table-cell>
          <table:table-cell table:style-name="ce2" table:formula="of:=[$zc12.A66]" office:value-type="float" office:value="-2.66774673256902" calcext:value-type="float">
            <text:p>-2.66774673256902</text:p>
          </table:table-cell>
          <table:table-cell table:number-columns-repeated="1022"/>
        </table:table-row>
        <table:table-row table:style-name="ro1">
          <table:table-cell table:style-name="ce2" table:formula="of:=[$zc12.B67]" office:value-type="float" office:value="0.485103761707307" calcext:value-type="float">
            <text:p>0.485103761707307</text:p>
          </table:table-cell>
          <table:table-cell table:style-name="ce2" table:formula="of:=[$zc12.A67]" office:value-type="float" office:value="0.925445522546682" calcext:value-type="float">
            <text:p>0.925445522546682</text:p>
          </table:table-cell>
          <table:table-cell table:number-columns-repeated="1022"/>
        </table:table-row>
        <table:table-row table:style-name="ro1">
          <table:table-cell table:style-name="ce2" table:formula="of:=[$zc12.B68]" office:value-type="float" office:value="0.0564715539341307" calcext:value-type="float">
            <text:p>0.056471553934131</text:p>
          </table:table-cell>
          <table:table-cell table:style-name="ce2" table:formula="of:=[$zc12.A68]" office:value-type="float" office:value="0.0106000272181795" calcext:value-type="float">
            <text:p>0.01060002721818</text:p>
          </table:table-cell>
          <table:table-cell table:number-columns-repeated="1022"/>
        </table:table-row>
        <table:table-row table:style-name="ro1">
          <table:table-cell table:style-name="ce2" table:formula="of:=[$zc12.B69]" office:value-type="float" office:value="-0.83398815627463" calcext:value-type="float">
            <text:p>-0.83398815627463</text:p>
          </table:table-cell>
          <table:table-cell table:style-name="ce2" table:formula="of:=[$zc12.A69]" office:value-type="float" office:value="-1.01345744870201" calcext:value-type="float">
            <text:p>-1.01345744870201</text:p>
          </table:table-cell>
          <table:table-cell table:number-columns-repeated="1022"/>
        </table:table-row>
        <table:table-row table:style-name="ro1">
          <table:table-cell table:style-name="ce2" table:formula="of:=[$zc12.B70]" office:value-type="float" office:value="-2.10062875969439" calcext:value-type="float">
            <text:p>-2.10062875969439</text:p>
          </table:table-cell>
          <table:table-cell table:style-name="ce2" table:formula="of:=[$zc12.A70]" office:value-type="float" office:value="-1.57415004710825" calcext:value-type="float">
            <text:p>-1.57415004710825</text:p>
          </table:table-cell>
          <table:table-cell table:number-columns-repeated="1022"/>
        </table:table-row>
        <table:table-row table:style-name="ro1">
          <table:table-cell table:style-name="ce2" table:formula="of:=[$zc12.B71]" office:value-type="float" office:value="-1.14230636682057" calcext:value-type="float">
            <text:p>-1.14230636682057</text:p>
          </table:table-cell>
          <table:table-cell table:style-name="ce2" table:formula="of:=[$zc12.A71]" office:value-type="float" office:value="-1.26887688471284" calcext:value-type="float">
            <text:p>-1.26887688471284</text:p>
          </table:table-cell>
          <table:table-cell table:number-columns-repeated="1022"/>
        </table:table-row>
        <table:table-row table:style-name="ro1">
          <table:table-cell table:style-name="ce2" table:formula="of:=[$zc12.B72]" office:value-type="float" office:value="-1.79609598854257" calcext:value-type="float">
            <text:p>-1.79609598854257</text:p>
          </table:table-cell>
          <table:table-cell table:style-name="ce2" table:formula="of:=[$zc12.A72]" office:value-type="float" office:value="-3.71384791955964" calcext:value-type="float">
            <text:p>-3.71384791955964</text:p>
          </table:table-cell>
          <table:table-cell table:number-columns-repeated="1022"/>
        </table:table-row>
        <table:table-row table:style-name="ro1">
          <table:table-cell table:style-name="ce2" table:formula="of:=[$zc12.B73]" office:value-type="float" office:value="1.32982040007189" calcext:value-type="float">
            <text:p>1.32982040007189</text:p>
          </table:table-cell>
          <table:table-cell table:style-name="ce2" table:formula="of:=[$zc12.A73]" office:value-type="float" office:value="0.780094860017022" calcext:value-type="float">
            <text:p>0.780094860017022</text:p>
          </table:table-cell>
          <table:table-cell table:number-columns-repeated="1022"/>
        </table:table-row>
        <table:table-row table:style-name="ro1">
          <table:table-cell table:style-name="ce2" table:formula="of:=[$zc12.B74]" office:value-type="float" office:value="0.167764745173564" calcext:value-type="float">
            <text:p>0.167764745173564</text:p>
          </table:table-cell>
          <table:table-cell table:style-name="ce2" table:formula="of:=[$zc12.A74]" office:value-type="float" office:value="-0.128248183574113" calcext:value-type="float">
            <text:p>-0.128248183574113</text:p>
          </table:table-cell>
          <table:table-cell table:number-columns-repeated="1022"/>
        </table:table-row>
        <table:table-row table:style-name="ro1">
          <table:table-cell table:style-name="ce2" table:formula="of:=[$zc12.B75]" office:value-type="float" office:value="-2.27493286845273" calcext:value-type="float">
            <text:p>-2.27493286845273</text:p>
          </table:table-cell>
          <table:table-cell table:style-name="ce2" table:formula="of:=[$zc12.A75]" office:value-type="float" office:value="-2.9104007429469" calcext:value-type="float">
            <text:p>-2.9104007429469</text:p>
          </table:table-cell>
          <table:table-cell table:number-columns-repeated="1022"/>
        </table:table-row>
        <table:table-row table:style-name="ro1">
          <table:table-cell table:style-name="ce2" table:formula="of:=[$zc12.B76]" office:value-type="float" office:value="-0.361753027823407" calcext:value-type="float">
            <text:p>-0.361753027823407</text:p>
          </table:table-cell>
          <table:table-cell table:style-name="ce2" table:formula="of:=[$zc12.A76]" office:value-type="float" office:value="0.678764355772745" calcext:value-type="float">
            <text:p>0.678764355772745</text:p>
          </table:table-cell>
          <table:table-cell table:number-columns-repeated="1022"/>
        </table:table-row>
        <table:table-row table:style-name="ro1">
          <table:table-cell table:style-name="ce2" table:formula="of:=[$zc12.B77]" office:value-type="float" office:value="1.05480558853803" calcext:value-type="float">
            <text:p>1.05480558853803</text:p>
          </table:table-cell>
          <table:table-cell table:style-name="ce2" table:formula="of:=[$zc12.A77]" office:value-type="float" office:value="0.569676399154941" calcext:value-type="float">
            <text:p>0.569676399154941</text:p>
          </table:table-cell>
          <table:table-cell table:number-columns-repeated="1022"/>
        </table:table-row>
        <table:table-row table:style-name="ro1">
          <table:table-cell table:style-name="ce2" table:formula="of:=[$zc12.B78]" office:value-type="float" office:value="-0.229181024425775" calcext:value-type="float">
            <text:p>-0.229181024425775</text:p>
          </table:table-cell>
          <table:table-cell table:style-name="ce2" table:formula="of:=[$zc12.A78]" office:value-type="float" office:value="1.01480406140928" calcext:value-type="float">
            <text:p>1.01480406140928</text:p>
          </table:table-cell>
          <table:table-cell table:number-columns-repeated="1022"/>
        </table:table-row>
        <table:table-row table:style-name="ro1">
          <table:table-cell table:style-name="ce2" table:formula="of:=[$zc12.B79]" office:value-type="float" office:value="-3.33450201433175" calcext:value-type="float">
            <text:p>-3.33450201433175</text:p>
          </table:table-cell>
          <table:table-cell table:style-name="ce2" table:formula="of:=[$zc12.A79]" office:value-type="float" office:value="-4.34925016816047" calcext:value-type="float">
            <text:p>-4.34925016816047</text:p>
          </table:table-cell>
          <table:table-cell table:number-columns-repeated="1022"/>
        </table:table-row>
        <table:table-row table:style-name="ro1">
          <table:table-cell table:style-name="ce2" table:formula="of:=[$zc12.B80]" office:value-type="float" office:value="-0.229566151114609" calcext:value-type="float">
            <text:p>-0.229566151114609</text:p>
          </table:table-cell>
          <table:table-cell table:style-name="ce2" table:formula="of:=[$zc12.A80]" office:value-type="float" office:value="0.641551829474613" calcext:value-type="float">
            <text:p>0.641551829474613</text:p>
          </table:table-cell>
          <table:table-cell table:number-columns-repeated="1022"/>
        </table:table-row>
        <table:table-row table:style-name="ro1">
          <table:table-cell table:style-name="ce2" table:formula="of:=[$zc12.B81]" office:value-type="float" office:value="1.87029315176617" calcext:value-type="float">
            <text:p>1.87029315176617</text:p>
          </table:table-cell>
          <table:table-cell table:style-name="ce2" table:formula="of:=[$zc12.A81]" office:value-type="float" office:value="3.28435275242675" calcext:value-type="float">
            <text:p>3.28435275242675</text:p>
          </table:table-cell>
          <table:table-cell table:number-columns-repeated="1022"/>
        </table:table-row>
        <table:table-row table:style-name="ro1">
          <table:table-cell table:style-name="ce2" table:formula="of:=[$zc12.B82]" office:value-type="float" office:value="0.240659163181651" calcext:value-type="float">
            <text:p>0.240659163181651</text:p>
          </table:table-cell>
          <table:table-cell table:style-name="ce2" table:formula="of:=[$zc12.A82]" office:value-type="float" office:value="0.631872654632107" calcext:value-type="float">
            <text:p>0.631872654632107</text:p>
          </table:table-cell>
          <table:table-cell table:number-columns-repeated="1022"/>
        </table:table-row>
        <table:table-row table:style-name="ro1">
          <table:table-cell table:style-name="ce2" table:formula="of:=[$zc12.B83]" office:value-type="float" office:value="-0.656162023394387" calcext:value-type="float">
            <text:p>-0.656162023394387</text:p>
          </table:table-cell>
          <table:table-cell table:style-name="ce2" table:formula="of:=[$zc12.A83]" office:value-type="float" office:value="0.461823716139827" calcext:value-type="float">
            <text:p>0.461823716139827</text:p>
          </table:table-cell>
          <table:table-cell table:number-columns-repeated="1022"/>
        </table:table-row>
        <table:table-row table:style-name="ro1">
          <table:table-cell table:style-name="ce2" table:formula="of:=[$zc12.B84]" office:value-type="float" office:value="-0.96995480642273" calcext:value-type="float">
            <text:p>-0.96995480642273</text:p>
          </table:table-cell>
          <table:table-cell table:style-name="ce2" table:formula="of:=[$zc12.A84]" office:value-type="float" office:value="-2.55243589478655" calcext:value-type="float">
            <text:p>-2.55243589478655</text:p>
          </table:table-cell>
          <table:table-cell table:number-columns-repeated="1022"/>
        </table:table-row>
        <table:table-row table:style-name="ro1">
          <table:table-cell table:style-name="ce2" table:formula="of:=[$zc12.B85]" office:value-type="float" office:value="0.711385570033347" calcext:value-type="float">
            <text:p>0.711385570033347</text:p>
          </table:table-cell>
          <table:table-cell table:style-name="ce2" table:formula="of:=[$zc12.A85]" office:value-type="float" office:value="1.32663455537595" calcext:value-type="float">
            <text:p>1.32663455537595</text:p>
          </table:table-cell>
          <table:table-cell table:number-columns-repeated="1022"/>
        </table:table-row>
        <table:table-row table:style-name="ro1">
          <table:table-cell table:style-name="ce2" table:formula="of:=[$zc12.B86]" office:value-type="float" office:value="1.12011754074233" calcext:value-type="float">
            <text:p>1.12011754074233</text:p>
          </table:table-cell>
          <table:table-cell table:style-name="ce2" table:formula="of:=[$zc12.A86]" office:value-type="float" office:value="1.42135342377886" calcext:value-type="float">
            <text:p>1.42135342377886</text:p>
          </table:table-cell>
          <table:table-cell table:number-columns-repeated="1022"/>
        </table:table-row>
        <table:table-row table:style-name="ro1">
          <table:table-cell table:style-name="ce2" table:formula="of:=[$zc12.B87]" office:value-type="float" office:value="0.163306727261377" calcext:value-type="float">
            <text:p>0.163306727261377</text:p>
          </table:table-cell>
          <table:table-cell table:style-name="ce2" table:formula="of:=[$zc12.A87]" office:value-type="float" office:value="0.193060558818911" calcext:value-type="float">
            <text:p>0.193060558818911</text:p>
          </table:table-cell>
          <table:table-cell table:number-columns-repeated="1022"/>
        </table:table-row>
        <table:table-row table:style-name="ro1">
          <table:table-cell table:style-name="ce2" table:formula="of:=[$zc12.B88]" office:value-type="float" office:value="1.89053565665088" calcext:value-type="float">
            <text:p>1.89053565665088</text:p>
          </table:table-cell>
          <table:table-cell table:style-name="ce2" table:formula="of:=[$zc12.A88]" office:value-type="float" office:value="3.3852170968589" calcext:value-type="float">
            <text:p>3.3852170968589</text:p>
          </table:table-cell>
          <table:table-cell table:number-columns-repeated="1022"/>
        </table:table-row>
        <table:table-row table:style-name="ro1">
          <table:table-cell table:style-name="ce2" table:formula="of:=[$zc12.B89]" office:value-type="float" office:value="0.390925775938821" calcext:value-type="float">
            <text:p>0.390925775938821</text:p>
          </table:table-cell>
          <table:table-cell table:style-name="ce2" table:formula="of:=[$zc12.A89]" office:value-type="float" office:value="0.0447177493830408" calcext:value-type="float">
            <text:p>0.044717749383041</text:p>
          </table:table-cell>
          <table:table-cell table:number-columns-repeated="1022"/>
        </table:table-row>
        <table:table-row table:style-name="ro1">
          <table:table-cell table:style-name="ce2" table:formula="of:=[$zc12.B90]" office:value-type="float" office:value="-1.54112859824457" calcext:value-type="float">
            <text:p>-1.54112859824457</text:p>
          </table:table-cell>
          <table:table-cell table:style-name="ce2" table:formula="of:=[$zc12.A90]" office:value-type="float" office:value="-0.381061191637607" calcext:value-type="float">
            <text:p>-0.381061191637607</text:p>
          </table:table-cell>
          <table:table-cell table:number-columns-repeated="1022"/>
        </table:table-row>
        <table:table-row table:style-name="ro1">
          <table:table-cell table:style-name="ce2" table:formula="of:=[$zc12.B91]" office:value-type="float" office:value="-1.48170727486113" calcext:value-type="float">
            <text:p>-1.48170727486113</text:p>
          </table:table-cell>
          <table:table-cell table:style-name="ce2" table:formula="of:=[$zc12.A91]" office:value-type="float" office:value="-2.57401102348917" calcext:value-type="float">
            <text:p>-2.57401102348917</text:p>
          </table:table-cell>
          <table:table-cell table:number-columns-repeated="1022"/>
        </table:table-row>
        <table:table-row table:style-name="ro1">
          <table:table-cell table:style-name="ce2" table:formula="of:=[$zc12.B92]" office:value-type="float" office:value="0.517702542337901" calcext:value-type="float">
            <text:p>0.517702542337901</text:p>
          </table:table-cell>
          <table:table-cell table:style-name="ce2" table:formula="of:=[$zc12.A92]" office:value-type="float" office:value="0.327357795280103" calcext:value-type="float">
            <text:p>0.327357795280103</text:p>
          </table:table-cell>
          <table:table-cell table:number-columns-repeated="1022"/>
        </table:table-row>
        <table:table-row table:style-name="ro1">
          <table:table-cell table:style-name="ce2" table:formula="of:=[$zc12.B93]" office:value-type="float" office:value="1.0047686974251" calcext:value-type="float">
            <text:p>1.0047686974251</text:p>
          </table:table-cell>
          <table:table-cell table:style-name="ce2" table:formula="of:=[$zc12.A93]" office:value-type="float" office:value="1.74522216756894" calcext:value-type="float">
            <text:p>1.74522216756894</text:p>
          </table:table-cell>
          <table:table-cell table:number-columns-repeated="1022"/>
        </table:table-row>
        <table:table-row table:style-name="ro1">
          <table:table-cell table:style-name="ce2" table:formula="of:=[$zc12.B94]" office:value-type="float" office:value="1.31167877507482" calcext:value-type="float">
            <text:p>1.31167877507482</text:p>
          </table:table-cell>
          <table:table-cell table:style-name="ce2" table:formula="of:=[$zc12.A94]" office:value-type="float" office:value="1.37360115394029" calcext:value-type="float">
            <text:p>1.37360115394029</text:p>
          </table:table-cell>
          <table:table-cell table:number-columns-repeated="1022"/>
        </table:table-row>
        <table:table-row table:style-name="ro1">
          <table:table-cell table:style-name="ce2" table:formula="of:=[$zc12.B95]" office:value-type="float" office:value="1.08617084219693" calcext:value-type="float">
            <text:p>1.08617084219693</text:p>
          </table:table-cell>
          <table:table-cell table:style-name="ce2" table:formula="of:=[$zc12.A95]" office:value-type="float" office:value="0.80989242903315" calcext:value-type="float">
            <text:p>0.80989242903315</text:p>
          </table:table-cell>
          <table:table-cell table:number-columns-repeated="1022"/>
        </table:table-row>
        <table:table-row table:style-name="ro1">
          <table:table-cell table:style-name="ce2" table:formula="of:=[$zc12.B96]" office:value-type="float" office:value="-1.77210171890944" calcext:value-type="float">
            <text:p>-1.77210171890944</text:p>
          </table:table-cell>
          <table:table-cell table:style-name="ce2" table:formula="of:=[$zc12.A96]" office:value-type="float" office:value="-1.09725585844275" calcext:value-type="float">
            <text:p>-1.09725585844275</text:p>
          </table:table-cell>
          <table:table-cell table:number-columns-repeated="1022"/>
        </table:table-row>
        <table:table-row table:style-name="ro1">
          <table:table-cell table:style-name="ce2" table:formula="of:=[$zc12.B97]" office:value-type="float" office:value="0.199879883682359" calcext:value-type="float">
            <text:p>0.199879883682359</text:p>
          </table:table-cell>
          <table:table-cell table:style-name="ce2" table:formula="of:=[$zc12.A97]" office:value-type="float" office:value="-0.0668166974071688" calcext:value-type="float">
            <text:p>-0.066816697407169</text:p>
          </table:table-cell>
          <table:table-cell table:number-columns-repeated="1022"/>
        </table:table-row>
        <table:table-row table:style-name="ro1">
          <table:table-cell table:style-name="ce2" table:formula="of:=[$zc12.B98]" office:value-type="float" office:value="-0.446228414348553" calcext:value-type="float">
            <text:p>-0.446228414348553</text:p>
          </table:table-cell>
          <table:table-cell table:style-name="ce2" table:formula="of:=[$zc12.A98]" office:value-type="float" office:value="-0.529876296170495" calcext:value-type="float">
            <text:p>-0.529876296170495</text:p>
          </table:table-cell>
          <table:table-cell table:number-columns-repeated="1022"/>
        </table:table-row>
        <table:table-row table:style-name="ro1">
          <table:table-cell table:style-name="ce2" table:formula="of:=[$zc12.B99]" office:value-type="float" office:value="0.611208521346915" calcext:value-type="float">
            <text:p>0.611208521346915</text:p>
          </table:table-cell>
          <table:table-cell table:style-name="ce2" table:formula="of:=[$zc12.A99]" office:value-type="float" office:value="-0.27507474835238" calcext:value-type="float">
            <text:p>-0.27507474835238</text:p>
          </table:table-cell>
          <table:table-cell table:number-columns-repeated="1022"/>
        </table:table-row>
        <table:table-row table:style-name="ro1">
          <table:table-cell table:style-name="ce2" table:formula="of:=[$zc12.B100]" office:value-type="float" office:value="0.60404203523253" calcext:value-type="float">
            <text:p>0.60404203523253</text:p>
          </table:table-cell>
          <table:table-cell table:style-name="ce2" table:formula="of:=[$zc12.A100]" office:value-type="float" office:value="1.86842720058913" calcext:value-type="float">
            <text:p>1.86842720058913</text:p>
          </table:table-cell>
          <table:table-cell table:number-columns-repeated="1022"/>
        </table:table-row>
        <table:table-row table:style-name="ro1">
          <table:table-cell table:style-name="ce2" table:formula="of:=[$zc12.B101]" office:value-type="float" office:value="1.57218107792886" calcext:value-type="float">
            <text:p>1.57218107792886</text:p>
          </table:table-cell>
          <table:table-cell table:style-name="ce2" table:formula="of:=[$zc12.A101]" office:value-type="float" office:value="2.35785839548479" calcext:value-type="float">
            <text:p>2.35785839548479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21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z2</text:p>
          </table:table-cell>
          <table:table-cell table:style-name="ce1" office:value-type="string" calcext:value-type="string">
            <text:p>z1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variance</text:p>
          </table:table-cell>
          <table:table-cell table:number-columns-repeated="1019"/>
        </table:table-row>
        <table:table-row table:style-name="ro1">
          <table:table-cell table:style-name="ce2" table:number-matrix-columns-spanned="2" table:number-matrix-rows-spanned="100" table:formula="of:=MMULT([$zc21.A2:.B101];MINVERSE([$zc21.D7:.E8]))" office:value-type="float" office:value="-1.17762089711125" calcext:value-type="float">
            <text:p>-1.17762089711125</text:p>
          </table:table-cell>
          <table:table-cell table:style-name="ce2" office:value-type="float" office:value="-1.92685237808769" calcext:value-type="float">
            <text:p>-1.92685237808769</text:p>
          </table:table-cell>
          <table:table-cell/>
          <table:table-cell table:style-name="ce2" table:formula="of:=AVERAGE([.A2:.A101])" office:value-type="float" office:value="-0.0932673458922351" calcext:value-type="float">
            <text:p>-0.093267345892235</text:p>
          </table:table-cell>
          <table:table-cell table:style-name="ce2" table:formula="of:=VAR([.A2:.A101])" office:value-type="float" office:value="1.23755845026547" calcext:value-type="float">
            <text:p>1.23755845026547</text:p>
          </table:table-cell>
          <table:table-cell table:number-columns-repeated="1019"/>
        </table:table-row>
        <table:table-row table:style-name="ro1">
          <table:table-cell table:style-name="ce2" office:value-type="float" office:value="-1.06412620235732" calcext:value-type="float">
            <text:p>-1.06412620235732</text:p>
          </table:table-cell>
          <table:table-cell table:style-name="ce2" office:value-type="float" office:value="-1.03500611725807" calcext:value-type="float">
            <text:p>-1.03500611725807</text:p>
          </table:table-cell>
          <table:table-cell/>
          <table:table-cell table:style-name="ce2" table:formula="of:=AVERAGE([.B2:.B10])" office:value-type="float" office:value="-0.525105184660445" calcext:value-type="float">
            <text:p>-0.525105184660445</text:p>
          </table:table-cell>
          <table:table-cell table:style-name="ce2" table:formula="of:=VAR([.B2:.B101])" office:value-type="float" office:value="1.09300126751203" calcext:value-type="float">
            <text:p>1.09300126751203</text:p>
          </table:table-cell>
          <table:table-cell table:number-columns-repeated="1019"/>
        </table:table-row>
        <table:table-row table:style-name="ro1">
          <table:table-cell table:style-name="ce2" office:value-type="float" office:value="-0.134921322394199" calcext:value-type="float">
            <text:p>-0.134921322394199</text:p>
          </table:table-cell>
          <table:table-cell table:style-name="ce2" office:value-type="float" office:value="0.457033358730551" calcext:value-type="float">
            <text:p>0.457033358730551</text:p>
          </table:table-cell>
          <table:table-cell/>
          <table:table-cell table:style-name="ce3" office:value-type="string" calcext:value-type="string">
            <text:p>Correlation Coefficient</text:p>
          </table:table-cell>
          <table:table-cell table:number-columns-repeated="1020"/>
        </table:table-row>
        <table:table-row table:style-name="ro1">
          <table:table-cell table:style-name="ce2" office:value-type="float" office:value="0.098094955080508" calcext:value-type="float">
            <text:p>0.098094955080508</text:p>
          </table:table-cell>
          <table:table-cell table:style-name="ce2" office:value-type="float" office:value="-0.696546537235848" calcext:value-type="float">
            <text:p>-0.696546537235848</text:p>
          </table:table-cell>
          <table:table-cell/>
          <table:table-cell table:style-name="ce2" table:formula="of:=CORREL([.A2:.A101];[.B2:.B101])" office:value-type="float" office:value="0.0700716585701075" calcext:value-type="float">
            <text:p>0.070071658570108</text:p>
          </table:table-cell>
          <table:table-cell/>
          <table:table-cell>
            <draw:frame table:end-cell-address="Z21.M23" table:end-x="27.18pt" table:end-y="8.99pt" draw:z-index="0" draw:name="Chart 3" draw:style-name="gr1" draw:text-style-name="P1" svg:width="449.97pt" svg:height="278.22pt" svg:x="68.26pt" svg:y="14.26pt">
              <draw:object draw:notify-on-update-of-ranges="Z21.B1:Z21.B1 Z21.B2:Z21.B1000 Z21.A2:Z21.A10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float" office:value="0.378033099701684" calcext:value-type="float">
            <text:p>0.378033099701684</text:p>
          </table:table-cell>
          <table:table-cell table:style-name="ce2" office:value-type="float" office:value="1.03970185633259" calcext:value-type="float">
            <text:p>1.03970185633259</text:p>
          </table:table-cell>
          <table:table-cell table:number-columns-repeated="1022"/>
        </table:table-row>
        <table:table-row table:style-name="ro1">
          <table:table-cell table:style-name="ce2" office:value-type="float" office:value="1.26465758761363" calcext:value-type="float">
            <text:p>1.26465758761363</text:p>
          </table:table-cell>
          <table:table-cell table:style-name="ce2" office:value-type="float" office:value="0.349969240821565" calcext:value-type="float">
            <text:p>0.349969240821565</text:p>
          </table:table-cell>
          <table:table-cell table:number-columns-repeated="1022"/>
        </table:table-row>
        <table:table-row table:style-name="ro1">
          <table:table-cell table:style-name="ce2" office:value-type="float" office:value="0.917771808026088" calcext:value-type="float">
            <text:p>0.917771808026088</text:p>
          </table:table-cell>
          <table:table-cell table:style-name="ce2" office:value-type="float" office:value="-2.04952594698372" calcext:value-type="float">
            <text:p>-2.04952594698372</text:p>
          </table:table-cell>
          <table:table-cell table:number-columns-repeated="1022"/>
        </table:table-row>
        <table:table-row table:style-name="ro1">
          <table:table-cell table:style-name="ce2" office:value-type="float" office:value="-1.00002053800383" calcext:value-type="float">
            <text:p>-1.00002053800383</text:p>
          </table:table-cell>
          <table:table-cell table:style-name="ce2" office:value-type="float" office:value="-0.58489259973489" calcext:value-type="float">
            <text:p>-0.58489259973489</text:p>
          </table:table-cell>
          <table:table-cell table:number-columns-repeated="1022"/>
        </table:table-row>
        <table:table-row table:style-name="ro1">
          <table:table-cell table:style-name="ce2" office:value-type="float" office:value="-1.14540169929872" calcext:value-type="float">
            <text:p>-1.14540169929872</text:p>
          </table:table-cell>
          <table:table-cell table:style-name="ce2" office:value-type="float" office:value="-0.279827538528483" calcext:value-type="float">
            <text:p>-0.279827538528483</text:p>
          </table:table-cell>
          <table:table-cell table:number-columns-repeated="1022"/>
        </table:table-row>
        <table:table-row table:style-name="ro1">
          <table:table-cell table:style-name="ce2" office:value-type="float" office:value="-0.720177633427551" calcext:value-type="float">
            <text:p>-0.720177633427551</text:p>
          </table:table-cell>
          <table:table-cell table:style-name="ce2" office:value-type="float" office:value="-0.148851376876445" calcext:value-type="float">
            <text:p>-0.148851376876445</text:p>
          </table:table-cell>
          <table:table-cell table:number-columns-repeated="1022"/>
        </table:table-row>
        <table:table-row table:style-name="ro1">
          <table:table-cell table:style-name="ce2" office:value-type="float" office:value="2.4228255375329" calcext:value-type="float">
            <text:p>2.4228255375329</text:p>
          </table:table-cell>
          <table:table-cell table:style-name="ce2" office:value-type="float" office:value="-0.829303591606433" calcext:value-type="float">
            <text:p>-0.829303591606433</text:p>
          </table:table-cell>
          <table:table-cell table:number-columns-repeated="1022"/>
        </table:table-row>
        <table:table-row table:style-name="ro1">
          <table:table-cell table:style-name="ce2" office:value-type="float" office:value="0.0438615146056269" calcext:value-type="float">
            <text:p>0.043861514605627</text:p>
          </table:table-cell>
          <table:table-cell table:style-name="ce2" office:value-type="float" office:value="2.26051305777357" calcext:value-type="float">
            <text:p>2.26051305777357</text:p>
          </table:table-cell>
          <table:table-cell table:number-columns-repeated="1022"/>
        </table:table-row>
        <table:table-row table:style-name="ro1">
          <table:table-cell table:style-name="ce2" office:value-type="float" office:value="-0.913123139696332" calcext:value-type="float">
            <text:p>-0.913123139696332</text:p>
          </table:table-cell>
          <table:table-cell table:style-name="ce2" office:value-type="float" office:value="-0.0191441644015634" calcext:value-type="float">
            <text:p>-0.019144164401564</text:p>
          </table:table-cell>
          <table:table-cell table:number-columns-repeated="1022"/>
        </table:table-row>
        <table:table-row table:style-name="ro1">
          <table:table-cell table:style-name="ce2" office:value-type="float" office:value="-0.206563374552184" calcext:value-type="float">
            <text:p>-0.206563374552184</text:p>
          </table:table-cell>
          <table:table-cell table:style-name="ce2" office:value-type="float" office:value="-0.361324535638159" calcext:value-type="float">
            <text:p>-0.361324535638159</text:p>
          </table:table-cell>
          <table:table-cell table:number-columns-repeated="1022"/>
        </table:table-row>
        <table:table-row table:style-name="ro1">
          <table:table-cell table:style-name="ce2" office:value-type="float" office:value="0.764491376625081" calcext:value-type="float">
            <text:p>0.764491376625081</text:p>
          </table:table-cell>
          <table:table-cell table:style-name="ce2" office:value-type="float" office:value="1.2201826692615" calcext:value-type="float">
            <text:p>1.2201826692615</text:p>
          </table:table-cell>
          <table:table-cell table:number-columns-repeated="1022"/>
        </table:table-row>
        <table:table-row table:style-name="ro1">
          <table:table-cell table:style-name="ce2" office:value-type="float" office:value="0.596211482113448" calcext:value-type="float">
            <text:p>0.596211482113448</text:p>
          </table:table-cell>
          <table:table-cell table:style-name="ce2" office:value-type="float" office:value="-0.36123939877516" calcext:value-type="float">
            <text:p>-0.36123939877516</text:p>
          </table:table-cell>
          <table:table-cell table:number-columns-repeated="1022"/>
        </table:table-row>
        <table:table-row table:style-name="ro1">
          <table:table-cell table:style-name="ce2" office:value-type="float" office:value="0.989636078140016" calcext:value-type="float">
            <text:p>0.989636078140016</text:p>
          </table:table-cell>
          <table:table-cell table:style-name="ce2" office:value-type="float" office:value="0.589590162576339" calcext:value-type="float">
            <text:p>0.589590162576339</text:p>
          </table:table-cell>
          <table:table-cell table:number-columns-repeated="1022"/>
        </table:table-row>
        <table:table-row table:style-name="ro1">
          <table:table-cell table:style-name="ce2" office:value-type="float" office:value="-2.23725454325117" calcext:value-type="float">
            <text:p>-2.23725454325117</text:p>
          </table:table-cell>
          <table:table-cell table:style-name="ce2" office:value-type="float" office:value="-0.286135683122951" calcext:value-type="float">
            <text:p>-0.286135683122951</text:p>
          </table:table-cell>
          <table:table-cell table:number-columns-repeated="1022"/>
        </table:table-row>
        <table:table-row table:style-name="ro1">
          <table:table-cell table:style-name="ce2" office:value-type="float" office:value="-1.91501237561855" calcext:value-type="float">
            <text:p>-1.91501237561855</text:p>
          </table:table-cell>
          <table:table-cell table:style-name="ce2" office:value-type="float" office:value="2.14936864589675" calcext:value-type="float">
            <text:p>2.14936864589675</text:p>
          </table:table-cell>
          <table:table-cell table:number-columns-repeated="1022"/>
        </table:table-row>
        <table:table-row table:style-name="ro1">
          <table:table-cell table:style-name="ce2" office:value-type="float" office:value="-1.31772465886064" calcext:value-type="float">
            <text:p>-1.31772465886064</text:p>
          </table:table-cell>
          <table:table-cell table:style-name="ce2" office:value-type="float" office:value="-0.894182949073521" calcext:value-type="float">
            <text:p>-0.894182949073521</text:p>
          </table:table-cell>
          <table:table-cell table:number-columns-repeated="1022"/>
        </table:table-row>
        <table:table-row table:style-name="ro1">
          <table:table-cell table:style-name="ce2" office:value-type="float" office:value="0.118274833495045" calcext:value-type="float">
            <text:p>0.118274833495045</text:p>
          </table:table-cell>
          <table:table-cell table:style-name="ce2" office:value-type="float" office:value="0.29413593922119" calcext:value-type="float">
            <text:p>0.29413593922119</text:p>
          </table:table-cell>
          <table:table-cell table:number-columns-repeated="1022"/>
        </table:table-row>
        <table:table-row table:style-name="ro1">
          <table:table-cell table:style-name="ce2" office:value-type="float" office:value="0.10886298168157" calcext:value-type="float">
            <text:p>0.10886298168157</text:p>
          </table:table-cell>
          <table:table-cell table:style-name="ce2" office:value-type="float" office:value="0.689587735119547" calcext:value-type="float">
            <text:p>0.689587735119547</text:p>
          </table:table-cell>
          <table:table-cell table:number-columns-repeated="1022"/>
        </table:table-row>
        <table:table-row table:style-name="ro1">
          <table:table-cell table:style-name="ce2" office:value-type="float" office:value="-0.764212379737492" calcext:value-type="float">
            <text:p>-0.764212379737492</text:p>
          </table:table-cell>
          <table:table-cell table:style-name="ce2" office:value-type="float" office:value="1.88575034167742" calcext:value-type="float">
            <text:p>1.88575034167742</text:p>
          </table:table-cell>
          <table:table-cell table:number-columns-repeated="1022"/>
        </table:table-row>
        <table:table-row table:style-name="ro1">
          <table:table-cell table:style-name="ce2" office:value-type="float" office:value="-0.72250913500327" calcext:value-type="float">
            <text:p>-0.72250913500327</text:p>
          </table:table-cell>
          <table:table-cell table:style-name="ce2" office:value-type="float" office:value="-0.0978084020240043" calcext:value-type="float">
            <text:p>-0.097808402024004</text:p>
          </table:table-cell>
          <table:table-cell table:number-columns-repeated="1022"/>
        </table:table-row>
        <table:table-row table:style-name="ro1">
          <table:table-cell table:style-name="ce2" office:value-type="float" office:value="-0.190926814218764" calcext:value-type="float">
            <text:p>-0.190926814218764</text:p>
          </table:table-cell>
          <table:table-cell table:style-name="ce2" office:value-type="float" office:value="0.581710917410986" calcext:value-type="float">
            <text:p>0.581710917410986</text:p>
          </table:table-cell>
          <table:table-cell table:number-columns-repeated="1022"/>
        </table:table-row>
        <table:table-row table:style-name="ro1">
          <table:table-cell table:style-name="ce2" office:value-type="float" office:value="-1.80206412750893" calcext:value-type="float">
            <text:p>-1.80206412750893</text:p>
          </table:table-cell>
          <table:table-cell table:style-name="ce2" office:value-type="float" office:value="1.80007481017984" calcext:value-type="float">
            <text:p>1.80007481017984</text:p>
          </table:table-cell>
          <table:table-cell table:number-columns-repeated="1022"/>
        </table:table-row>
        <table:table-row table:style-name="ro1">
          <table:table-cell table:style-name="ce2" office:value-type="float" office:value="-0.12014682306724" calcext:value-type="float">
            <text:p>-0.12014682306724</text:p>
          </table:table-cell>
          <table:table-cell table:style-name="ce2" office:value-type="float" office:value="2.01370551795986" calcext:value-type="float">
            <text:p>2.01370551795986</text:p>
          </table:table-cell>
          <table:table-cell table:number-columns-repeated="1022"/>
        </table:table-row>
        <table:table-row table:style-name="ro1">
          <table:table-cell table:style-name="ce2" office:value-type="float" office:value="1.22447806999361" calcext:value-type="float">
            <text:p>1.22447806999361</text:p>
          </table:table-cell>
          <table:table-cell table:style-name="ce2" office:value-type="float" office:value="0.262708988650331" calcext:value-type="float">
            <text:p>0.262708988650331</text:p>
          </table:table-cell>
          <table:table-cell table:number-columns-repeated="1022"/>
        </table:table-row>
        <table:table-row table:style-name="ro1">
          <table:table-cell table:style-name="ce2" office:value-type="float" office:value="-0.141150591583537" calcext:value-type="float">
            <text:p>-0.141150591583537</text:p>
          </table:table-cell>
          <table:table-cell table:style-name="ce2" office:value-type="float" office:value="0.0787136551619302" calcext:value-type="float">
            <text:p>0.07871365516193</text:p>
          </table:table-cell>
          <table:table-cell table:number-columns-repeated="1022"/>
        </table:table-row>
        <table:table-row table:style-name="ro1">
          <table:table-cell table:style-name="ce2" office:value-type="float" office:value="-0.561860187784501" calcext:value-type="float">
            <text:p>-0.561860187784501</text:p>
          </table:table-cell>
          <table:table-cell table:style-name="ce2" office:value-type="float" office:value="-0.588980276289516" calcext:value-type="float">
            <text:p>-0.588980276289516</text:p>
          </table:table-cell>
          <table:table-cell table:number-columns-repeated="1022"/>
        </table:table-row>
        <table:table-row table:style-name="ro1">
          <table:table-cell table:style-name="ce2" office:value-type="float" office:value="0.182039625220717" calcext:value-type="float">
            <text:p>0.182039625220717</text:p>
          </table:table-cell>
          <table:table-cell table:style-name="ce2" office:value-type="float" office:value="1.34631461447991" calcext:value-type="float">
            <text:p>1.34631461447991</text:p>
          </table:table-cell>
          <table:table-cell table:number-columns-repeated="1022"/>
        </table:table-row>
        <table:table-row table:style-name="ro1">
          <table:table-cell table:style-name="ce2" office:value-type="float" office:value="0.325812051471838" calcext:value-type="float">
            <text:p>0.325812051471838</text:p>
          </table:table-cell>
          <table:table-cell table:style-name="ce2" office:value-type="float" office:value="-2.27946690176851" calcext:value-type="float">
            <text:p>-2.27946690176851</text:p>
          </table:table-cell>
          <table:table-cell table:number-columns-repeated="1022"/>
        </table:table-row>
        <table:table-row table:style-name="ro1">
          <table:table-cell table:style-name="ce2" office:value-type="float" office:value="-0.554962702604728" calcext:value-type="float">
            <text:p>-0.554962702604728</text:p>
          </table:table-cell>
          <table:table-cell table:style-name="ce2" office:value-type="float" office:value="-1.50310667126743" calcext:value-type="float">
            <text:p>-1.50310667126743</text:p>
          </table:table-cell>
          <table:table-cell table:number-columns-repeated="1022"/>
        </table:table-row>
        <table:table-row table:style-name="ro1">
          <table:table-cell table:style-name="ce2" office:value-type="float" office:value="-0.783078182643158" calcext:value-type="float">
            <text:p>-0.783078182643158</text:p>
          </table:table-cell>
          <table:table-cell table:style-name="ce2" office:value-type="float" office:value="-1.60017096635618" calcext:value-type="float">
            <text:p>-1.60017096635618</text:p>
          </table:table-cell>
          <table:table-cell table:number-columns-repeated="1022"/>
        </table:table-row>
        <table:table-row table:style-name="ro1">
          <table:table-cell table:style-name="ce2" office:value-type="float" office:value="-0.240942780766338" calcext:value-type="float">
            <text:p>-0.240942780766338</text:p>
          </table:table-cell>
          <table:table-cell table:style-name="ce2" office:value-type="float" office:value="0.826353669246105" calcext:value-type="float">
            <text:p>0.826353669246105</text:p>
          </table:table-cell>
          <table:table-cell table:number-columns-repeated="1022"/>
        </table:table-row>
        <table:table-row table:style-name="ro1">
          <table:table-cell table:style-name="ce2" office:value-type="float" office:value="-1.60105796918373" calcext:value-type="float">
            <text:p>-1.60105796918373</text:p>
          </table:table-cell>
          <table:table-cell table:style-name="ce2" office:value-type="float" office:value="-0.249987237779713" calcext:value-type="float">
            <text:p>-0.249987237779713</text:p>
          </table:table-cell>
          <table:table-cell table:number-columns-repeated="1022"/>
        </table:table-row>
        <table:table-row table:style-name="ro1">
          <table:table-cell table:style-name="ce2" office:value-type="float" office:value="-0.803160289837753" calcext:value-type="float">
            <text:p>-0.803160289837753</text:p>
          </table:table-cell>
          <table:table-cell table:style-name="ce2" office:value-type="float" office:value="0.510629663125884" calcext:value-type="float">
            <text:p>0.510629663125884</text:p>
          </table:table-cell>
          <table:table-cell table:number-columns-repeated="1022"/>
        </table:table-row>
        <table:table-row table:style-name="ro1">
          <table:table-cell table:style-name="ce2" office:value-type="float" office:value="-0.177942349391892" calcext:value-type="float">
            <text:p>-0.177942349391892</text:p>
          </table:table-cell>
          <table:table-cell table:style-name="ce2" office:value-type="float" office:value="-0.220320483492847" calcext:value-type="float">
            <text:p>-0.220320483492847</text:p>
          </table:table-cell>
          <table:table-cell table:number-columns-repeated="1022"/>
        </table:table-row>
        <table:table-row table:style-name="ro1">
          <table:table-cell table:style-name="ce2" office:value-type="float" office:value="-0.925627360712994" calcext:value-type="float">
            <text:p>-0.925627360712994</text:p>
          </table:table-cell>
          <table:table-cell table:style-name="ce2" office:value-type="float" office:value="2.75914900651167" calcext:value-type="float">
            <text:p>2.75914900651167</text:p>
          </table:table-cell>
          <table:table-cell table:number-columns-repeated="1022"/>
        </table:table-row>
        <table:table-row table:style-name="ro1">
          <table:table-cell table:style-name="ce2" office:value-type="float" office:value="1.93877410491445" calcext:value-type="float">
            <text:p>1.93877410491445</text:p>
          </table:table-cell>
          <table:table-cell table:style-name="ce2" office:value-type="float" office:value="1.25673894459352" calcext:value-type="float">
            <text:p>1.25673894459352</text:p>
          </table:table-cell>
          <table:table-cell table:number-columns-repeated="1022"/>
        </table:table-row>
        <table:table-row table:style-name="ro1">
          <table:table-cell table:style-name="ce2" office:value-type="float" office:value="0.558853414042948" calcext:value-type="float">
            <text:p>0.558853414042948</text:p>
          </table:table-cell>
          <table:table-cell table:style-name="ce2" office:value-type="float" office:value="-0.910285721499803" calcext:value-type="float">
            <text:p>-0.910285721499803</text:p>
          </table:table-cell>
          <table:table-cell table:number-columns-repeated="1022"/>
        </table:table-row>
        <table:table-row table:style-name="ro1">
          <table:table-cell table:style-name="ce2" office:value-type="float" office:value="-0.983609745705076" calcext:value-type="float">
            <text:p>-0.983609745705076</text:p>
          </table:table-cell>
          <table:table-cell table:style-name="ce2" office:value-type="float" office:value="1.48411127329065" calcext:value-type="float">
            <text:p>1.48411127329065</text:p>
          </table:table-cell>
          <table:table-cell table:number-columns-repeated="1022"/>
        </table:table-row>
        <table:table-row table:style-name="ro1">
          <table:table-cell table:style-name="ce2" office:value-type="float" office:value="-0.295170263415405" calcext:value-type="float">
            <text:p>-0.295170263415405</text:p>
          </table:table-cell>
          <table:table-cell table:style-name="ce2" office:value-type="float" office:value="0.422726364098789" calcext:value-type="float">
            <text:p>0.422726364098789</text:p>
          </table:table-cell>
          <table:table-cell table:number-columns-repeated="1022"/>
        </table:table-row>
        <table:table-row table:style-name="ro1">
          <table:table-cell table:style-name="ce2" office:value-type="float" office:value="-0.254158816597365" calcext:value-type="float">
            <text:p>-0.254158816597365</text:p>
          </table:table-cell>
          <table:table-cell table:style-name="ce2" office:value-type="float" office:value="-0.897726899947818" calcext:value-type="float">
            <text:p>-0.897726899947818</text:p>
          </table:table-cell>
          <table:table-cell table:number-columns-repeated="1022"/>
        </table:table-row>
        <table:table-row table:style-name="ro1">
          <table:table-cell table:style-name="ce2" office:value-type="float" office:value="-0.493626034881435" calcext:value-type="float">
            <text:p>-0.493626034881435</text:p>
          </table:table-cell>
          <table:table-cell table:style-name="ce2" office:value-type="float" office:value="0.689698532144662" calcext:value-type="float">
            <text:p>0.689698532144662</text:p>
          </table:table-cell>
          <table:table-cell table:number-columns-repeated="1022"/>
        </table:table-row>
        <table:table-row table:style-name="ro1">
          <table:table-cell table:style-name="ce2" office:value-type="float" office:value="-0.937401605837482" calcext:value-type="float">
            <text:p>-0.937401605837482</text:p>
          </table:table-cell>
          <table:table-cell table:style-name="ce2" office:value-type="float" office:value="-2.06539563976255" calcext:value-type="float">
            <text:p>-2.06539563976255</text:p>
          </table:table-cell>
          <table:table-cell table:number-columns-repeated="1022"/>
        </table:table-row>
        <table:table-row table:style-name="ro1">
          <table:table-cell table:style-name="ce2" office:value-type="float" office:value="1.01560715554405" calcext:value-type="float">
            <text:p>1.01560715554405</text:p>
          </table:table-cell>
          <table:table-cell table:style-name="ce2" office:value-type="float" office:value="-0.535618382404888" calcext:value-type="float">
            <text:p>-0.535618382404888</text:p>
          </table:table-cell>
          <table:table-cell table:number-columns-repeated="1022"/>
        </table:table-row>
        <table:table-row table:style-name="ro1">
          <table:table-cell table:style-name="ce2" office:value-type="float" office:value="1.29259716062921" calcext:value-type="float">
            <text:p>1.29259716062921</text:p>
          </table:table-cell>
          <table:table-cell table:style-name="ce2" office:value-type="float" office:value="-0.339013051945333" calcext:value-type="float">
            <text:p>-0.339013051945333</text:p>
          </table:table-cell>
          <table:table-cell table:number-columns-repeated="1022"/>
        </table:table-row>
        <table:table-row table:style-name="ro1">
          <table:table-cell table:style-name="ce2" office:value-type="float" office:value="-0.417103388758593" calcext:value-type="float">
            <text:p>-0.417103388758593</text:p>
          </table:table-cell>
          <table:table-cell table:style-name="ce2" office:value-type="float" office:value="0.00993908238990643" calcext:value-type="float">
            <text:p>0.009939082389906</text:p>
          </table:table-cell>
          <table:table-cell table:number-columns-repeated="1022"/>
        </table:table-row>
        <table:table-row table:style-name="ro1">
          <table:table-cell table:style-name="ce2" office:value-type="float" office:value="1.21033227724932" calcext:value-type="float">
            <text:p>1.21033227724932</text:p>
          </table:table-cell>
          <table:table-cell table:style-name="ce2" office:value-type="float" office:value="-1.72283016691089" calcext:value-type="float">
            <text:p>-1.72283016691089</text:p>
          </table:table-cell>
          <table:table-cell table:number-columns-repeated="1022"/>
        </table:table-row>
        <table:table-row table:style-name="ro1">
          <table:table-cell table:style-name="ce2" office:value-type="float" office:value="-0.214272501170931" calcext:value-type="float">
            <text:p>-0.214272501170931</text:p>
          </table:table-cell>
          <table:table-cell table:style-name="ce2" office:value-type="float" office:value="-0.204564510789603" calcext:value-type="float">
            <text:p>-0.204564510789603</text:p>
          </table:table-cell>
          <table:table-cell table:number-columns-repeated="1022"/>
        </table:table-row>
        <table:table-row table:style-name="ro1">
          <table:table-cell table:style-name="ce2" office:value-type="float" office:value="-0.224563657102622" calcext:value-type="float">
            <text:p>-0.224563657102622</text:p>
          </table:table-cell>
          <table:table-cell table:style-name="ce2" office:value-type="float" office:value="0.250375363673387" calcext:value-type="float">
            <text:p>0.250375363673387</text:p>
          </table:table-cell>
          <table:table-cell table:number-columns-repeated="1022"/>
        </table:table-row>
        <table:table-row table:style-name="ro1">
          <table:table-cell table:style-name="ce2" office:value-type="float" office:value="1.2254467331998" calcext:value-type="float">
            <text:p>1.2254467331998</text:p>
          </table:table-cell>
          <table:table-cell table:style-name="ce2" office:value-type="float" office:value="0.69728159666251" calcext:value-type="float">
            <text:p>0.69728159666251</text:p>
          </table:table-cell>
          <table:table-cell table:number-columns-repeated="1022"/>
        </table:table-row>
        <table:table-row table:style-name="ro1">
          <table:table-cell table:style-name="ce2" office:value-type="float" office:value="0.977859118051835" calcext:value-type="float">
            <text:p>0.977859118051835</text:p>
          </table:table-cell>
          <table:table-cell table:style-name="ce2" office:value-type="float" office:value="-0.724187109497867" calcext:value-type="float">
            <text:p>-0.724187109497867</text:p>
          </table:table-cell>
          <table:table-cell table:number-columns-repeated="1022"/>
        </table:table-row>
        <table:table-row table:style-name="ro1">
          <table:table-cell table:style-name="ce2" office:value-type="float" office:value="1.87125453515035" calcext:value-type="float">
            <text:p>1.87125453515035</text:p>
          </table:table-cell>
          <table:table-cell table:style-name="ce2" office:value-type="float" office:value="1.53881035050726" calcext:value-type="float">
            <text:p>1.53881035050726</text:p>
          </table:table-cell>
          <table:table-cell table:number-columns-repeated="1022"/>
        </table:table-row>
        <table:table-row table:style-name="ro1">
          <table:table-cell table:style-name="ce2" office:value-type="float" office:value="0.634811374511426" calcext:value-type="float">
            <text:p>0.634811374511426</text:p>
          </table:table-cell>
          <table:table-cell table:style-name="ce2" office:value-type="float" office:value="-1.27687223334572" calcext:value-type="float">
            <text:p>-1.27687223334572</text:p>
          </table:table-cell>
          <table:table-cell table:number-columns-repeated="1022"/>
        </table:table-row>
        <table:table-row table:style-name="ro1">
          <table:table-cell table:style-name="ce2" office:value-type="float" office:value="-0.0702710176545355" calcext:value-type="float">
            <text:p>-0.070271017654536</text:p>
          </table:table-cell>
          <table:table-cell table:style-name="ce2" office:value-type="float" office:value="1.30481990438786" calcext:value-type="float">
            <text:p>1.30481990438786</text:p>
          </table:table-cell>
          <table:table-cell table:number-columns-repeated="1022"/>
        </table:table-row>
        <table:table-row table:style-name="ro1">
          <table:table-cell table:style-name="ce2" office:value-type="float" office:value="1.53672287048549" calcext:value-type="float">
            <text:p>1.53672287048549</text:p>
          </table:table-cell>
          <table:table-cell table:style-name="ce2" office:value-type="float" office:value="-0.482774051568094" calcext:value-type="float">
            <text:p>-0.482774051568094</text:p>
          </table:table-cell>
          <table:table-cell table:number-columns-repeated="1022"/>
        </table:table-row>
        <table:table-row table:style-name="ro1">
          <table:table-cell table:style-name="ce2" office:value-type="float" office:value="0.39523725989249" calcext:value-type="float">
            <text:p>0.39523725989249</text:p>
          </table:table-cell>
          <table:table-cell table:style-name="ce2" office:value-type="float" office:value="-0.552297530720639" calcext:value-type="float">
            <text:p>-0.552297530720639</text:p>
          </table:table-cell>
          <table:table-cell table:number-columns-repeated="1022"/>
        </table:table-row>
        <table:table-row table:style-name="ro1">
          <table:table-cell table:style-name="ce2" office:value-type="float" office:value="-0.26187132995092" calcext:value-type="float">
            <text:p>-0.26187132995092</text:p>
          </table:table-cell>
          <table:table-cell table:style-name="ce2" office:value-type="float" office:value="0.13656521454752" calcext:value-type="float">
            <text:p>0.13656521454752</text:p>
          </table:table-cell>
          <table:table-cell table:number-columns-repeated="1022"/>
        </table:table-row>
        <table:table-row table:style-name="ro1">
          <table:table-cell table:style-name="ce2" office:value-type="float" office:value="-1.86616180107394" calcext:value-type="float">
            <text:p>-1.86616180107394</text:p>
          </table:table-cell>
          <table:table-cell table:style-name="ce2" office:value-type="float" office:value="0.725524745541845" calcext:value-type="float">
            <text:p>0.725524745541845</text:p>
          </table:table-cell>
          <table:table-cell table:number-columns-repeated="1022"/>
        </table:table-row>
        <table:table-row table:style-name="ro1">
          <table:table-cell table:style-name="ce2" office:value-type="float" office:value="-1.22467209012051" calcext:value-type="float">
            <text:p>-1.22467209012051</text:p>
          </table:table-cell>
          <table:table-cell table:style-name="ce2" office:value-type="float" office:value="0.0400290648895405" calcext:value-type="float">
            <text:p>0.040029064889541</text:p>
          </table:table-cell>
          <table:table-cell table:number-columns-repeated="1022"/>
        </table:table-row>
        <table:table-row table:style-name="ro1">
          <table:table-cell table:style-name="ce2" office:value-type="float" office:value="0.606067100815168" calcext:value-type="float">
            <text:p>0.606067100815168</text:p>
          </table:table-cell>
          <table:table-cell table:style-name="ce2" office:value-type="float" office:value="1.23549968408461" calcext:value-type="float">
            <text:p>1.23549968408461</text:p>
          </table:table-cell>
          <table:table-cell table:number-columns-repeated="1022"/>
        </table:table-row>
        <table:table-row table:style-name="ro1">
          <table:table-cell table:style-name="ce2" office:value-type="float" office:value="1.09595303851598" calcext:value-type="float">
            <text:p>1.09595303851598</text:p>
          </table:table-cell>
          <table:table-cell table:style-name="ce2" office:value-type="float" office:value="-1.556537672262" calcext:value-type="float">
            <text:p>-1.556537672262</text:p>
          </table:table-cell>
          <table:table-cell table:number-columns-repeated="1022"/>
        </table:table-row>
        <table:table-row table:style-name="ro1">
          <table:table-cell table:style-name="ce2" office:value-type="float" office:value="-1.87541621920659" calcext:value-type="float">
            <text:p>-1.87541621920659</text:p>
          </table:table-cell>
          <table:table-cell table:style-name="ce2" office:value-type="float" office:value="-0.792330513362427" calcext:value-type="float">
            <text:p>-0.792330513362427</text:p>
          </table:table-cell>
          <table:table-cell table:number-columns-repeated="1022"/>
        </table:table-row>
        <table:table-row table:style-name="ro1">
          <table:table-cell table:style-name="ce2" office:value-type="float" office:value="0.485103761707307" calcext:value-type="float">
            <text:p>0.485103761707307</text:p>
          </table:table-cell>
          <table:table-cell table:style-name="ce2" office:value-type="float" office:value="0.440341760839375" calcext:value-type="float">
            <text:p>0.440341760839375</text:p>
          </table:table-cell>
          <table:table-cell table:number-columns-repeated="1022"/>
        </table:table-row>
        <table:table-row table:style-name="ro1">
          <table:table-cell table:style-name="ce2" office:value-type="float" office:value="0.0564715539341307" calcext:value-type="float">
            <text:p>0.056471553934131</text:p>
          </table:table-cell>
          <table:table-cell table:style-name="ce2" office:value-type="float" office:value="-0.0458715267159512" calcext:value-type="float">
            <text:p>-0.045871526715951</text:p>
          </table:table-cell>
          <table:table-cell table:number-columns-repeated="1022"/>
        </table:table-row>
        <table:table-row table:style-name="ro1">
          <table:table-cell table:style-name="ce2" office:value-type="float" office:value="-0.83398815627463" calcext:value-type="float">
            <text:p>-0.83398815627463</text:p>
          </table:table-cell>
          <table:table-cell table:style-name="ce2" office:value-type="float" office:value="-0.179469292427378" calcext:value-type="float">
            <text:p>-0.179469292427378</text:p>
          </table:table-cell>
          <table:table-cell table:number-columns-repeated="1022"/>
        </table:table-row>
        <table:table-row table:style-name="ro1">
          <table:table-cell table:style-name="ce2" office:value-type="float" office:value="-2.10062875969439" calcext:value-type="float">
            <text:p>-2.10062875969439</text:p>
          </table:table-cell>
          <table:table-cell table:style-name="ce2" office:value-type="float" office:value="0.526478712586134" calcext:value-type="float">
            <text:p>0.526478712586134</text:p>
          </table:table-cell>
          <table:table-cell table:number-columns-repeated="1022"/>
        </table:table-row>
        <table:table-row table:style-name="ro1">
          <table:table-cell table:style-name="ce2" office:value-type="float" office:value="-1.14230636682057" calcext:value-type="float">
            <text:p>-1.14230636682057</text:p>
          </table:table-cell>
          <table:table-cell table:style-name="ce2" office:value-type="float" office:value="-0.126570517892267" calcext:value-type="float">
            <text:p>-0.126570517892267</text:p>
          </table:table-cell>
          <table:table-cell table:number-columns-repeated="1022"/>
        </table:table-row>
        <table:table-row table:style-name="ro1">
          <table:table-cell table:style-name="ce2" office:value-type="float" office:value="-1.79609598854257" calcext:value-type="float">
            <text:p>-1.79609598854257</text:p>
          </table:table-cell>
          <table:table-cell table:style-name="ce2" office:value-type="float" office:value="-1.91775193101706" calcext:value-type="float">
            <text:p>-1.91775193101706</text:p>
          </table:table-cell>
          <table:table-cell table:number-columns-repeated="1022"/>
        </table:table-row>
        <table:table-row table:style-name="ro1">
          <table:table-cell table:style-name="ce2" office:value-type="float" office:value="1.32982040007189" calcext:value-type="float">
            <text:p>1.32982040007189</text:p>
          </table:table-cell>
          <table:table-cell table:style-name="ce2" office:value-type="float" office:value="-0.549725540054865" calcext:value-type="float">
            <text:p>-0.549725540054865</text:p>
          </table:table-cell>
          <table:table-cell table:number-columns-repeated="1022"/>
        </table:table-row>
        <table:table-row table:style-name="ro1">
          <table:table-cell table:style-name="ce2" office:value-type="float" office:value="0.167764745173564" calcext:value-type="float">
            <text:p>0.167764745173564</text:p>
          </table:table-cell>
          <table:table-cell table:style-name="ce2" office:value-type="float" office:value="-0.296012928747676" calcext:value-type="float">
            <text:p>-0.296012928747676</text:p>
          </table:table-cell>
          <table:table-cell table:number-columns-repeated="1022"/>
        </table:table-row>
        <table:table-row table:style-name="ro1">
          <table:table-cell table:style-name="ce2" office:value-type="float" office:value="-2.27493286845273" calcext:value-type="float">
            <text:p>-2.27493286845273</text:p>
          </table:table-cell>
          <table:table-cell table:style-name="ce2" office:value-type="float" office:value="-0.635467874494173" calcext:value-type="float">
            <text:p>-0.635467874494173</text:p>
          </table:table-cell>
          <table:table-cell table:number-columns-repeated="1022"/>
        </table:table-row>
        <table:table-row table:style-name="ro1">
          <table:table-cell table:style-name="ce2" office:value-type="float" office:value="-0.361753027823407" calcext:value-type="float">
            <text:p>-0.361753027823407</text:p>
          </table:table-cell>
          <table:table-cell table:style-name="ce2" office:value-type="float" office:value="1.04051738359615" calcext:value-type="float">
            <text:p>1.04051738359615</text:p>
          </table:table-cell>
          <table:table-cell table:number-columns-repeated="1022"/>
        </table:table-row>
        <table:table-row table:style-name="ro1">
          <table:table-cell table:style-name="ce2" office:value-type="float" office:value="1.05480558853803" calcext:value-type="float">
            <text:p>1.05480558853803</text:p>
          </table:table-cell>
          <table:table-cell table:style-name="ce2" office:value-type="float" office:value="-0.485129189383088" calcext:value-type="float">
            <text:p>-0.485129189383088</text:p>
          </table:table-cell>
          <table:table-cell table:number-columns-repeated="1022"/>
        </table:table-row>
        <table:table-row table:style-name="ro1">
          <table:table-cell table:style-name="ce2" office:value-type="float" office:value="-0.229181024425775" calcext:value-type="float">
            <text:p>-0.229181024425775</text:p>
          </table:table-cell>
          <table:table-cell table:style-name="ce2" office:value-type="float" office:value="1.24398508583506" calcext:value-type="float">
            <text:p>1.24398508583506</text:p>
          </table:table-cell>
          <table:table-cell table:number-columns-repeated="1022"/>
        </table:table-row>
        <table:table-row table:style-name="ro1">
          <table:table-cell table:style-name="ce2" office:value-type="float" office:value="-3.33450201433175" calcext:value-type="float">
            <text:p>-3.33450201433175</text:p>
          </table:table-cell>
          <table:table-cell table:style-name="ce2" office:value-type="float" office:value="-1.01474815382872" calcext:value-type="float">
            <text:p>-1.01474815382872</text:p>
          </table:table-cell>
          <table:table-cell table:number-columns-repeated="1022"/>
        </table:table-row>
        <table:table-row table:style-name="ro1">
          <table:table-cell table:style-name="ce2" office:value-type="float" office:value="-0.229566151114609" calcext:value-type="float">
            <text:p>-0.229566151114609</text:p>
          </table:table-cell>
          <table:table-cell table:style-name="ce2" office:value-type="float" office:value="0.871117980589222" calcext:value-type="float">
            <text:p>0.871117980589222</text:p>
          </table:table-cell>
          <table:table-cell table:number-columns-repeated="1022"/>
        </table:table-row>
        <table:table-row table:style-name="ro1">
          <table:table-cell table:style-name="ce2" office:value-type="float" office:value="1.87029315176617" calcext:value-type="float">
            <text:p>1.87029315176617</text:p>
          </table:table-cell>
          <table:table-cell table:style-name="ce2" office:value-type="float" office:value="1.41405960066058" calcext:value-type="float">
            <text:p>1.41405960066058</text:p>
          </table:table-cell>
          <table:table-cell table:number-columns-repeated="1022"/>
        </table:table-row>
        <table:table-row table:style-name="ro1">
          <table:table-cell table:style-name="ce2" office:value-type="float" office:value="0.240659163181651" calcext:value-type="float">
            <text:p>0.240659163181651</text:p>
          </table:table-cell>
          <table:table-cell table:style-name="ce2" office:value-type="float" office:value="0.391213491450456" calcext:value-type="float">
            <text:p>0.391213491450456</text:p>
          </table:table-cell>
          <table:table-cell table:number-columns-repeated="1022"/>
        </table:table-row>
        <table:table-row table:style-name="ro1">
          <table:table-cell table:style-name="ce2" office:value-type="float" office:value="-0.656162023394387" calcext:value-type="float">
            <text:p>-0.656162023394387</text:p>
          </table:table-cell>
          <table:table-cell table:style-name="ce2" office:value-type="float" office:value="1.11798573953421" calcext:value-type="float">
            <text:p>1.11798573953421</text:p>
          </table:table-cell>
          <table:table-cell table:number-columns-repeated="1022"/>
        </table:table-row>
        <table:table-row table:style-name="ro1">
          <table:table-cell table:style-name="ce2" office:value-type="float" office:value="-0.96995480642273" calcext:value-type="float">
            <text:p>-0.96995480642273</text:p>
          </table:table-cell>
          <table:table-cell table:style-name="ce2" office:value-type="float" office:value="-1.58248108836382" calcext:value-type="float">
            <text:p>-1.58248108836382</text:p>
          </table:table-cell>
          <table:table-cell table:number-columns-repeated="1022"/>
        </table:table-row>
        <table:table-row table:style-name="ro1">
          <table:table-cell table:style-name="ce2" office:value-type="float" office:value="0.711385570033347" calcext:value-type="float">
            <text:p>0.711385570033347</text:p>
          </table:table-cell>
          <table:table-cell table:style-name="ce2" office:value-type="float" office:value="0.615248985342605" calcext:value-type="float">
            <text:p>0.615248985342605</text:p>
          </table:table-cell>
          <table:table-cell table:number-columns-repeated="1022"/>
        </table:table-row>
        <table:table-row table:style-name="ro1">
          <table:table-cell table:style-name="ce2" office:value-type="float" office:value="1.12011754074233" calcext:value-type="float">
            <text:p>1.12011754074233</text:p>
          </table:table-cell>
          <table:table-cell table:style-name="ce2" office:value-type="float" office:value="0.301235883036527" calcext:value-type="float">
            <text:p>0.301235883036527</text:p>
          </table:table-cell>
          <table:table-cell table:number-columns-repeated="1022"/>
        </table:table-row>
        <table:table-row table:style-name="ro1">
          <table:table-cell table:style-name="ce2" office:value-type="float" office:value="0.163306727261377" calcext:value-type="float">
            <text:p>0.163306727261377</text:p>
          </table:table-cell>
          <table:table-cell table:style-name="ce2" office:value-type="float" office:value="0.0297538315575347" calcext:value-type="float">
            <text:p>0.029753831557535</text:p>
          </table:table-cell>
          <table:table-cell table:number-columns-repeated="1022"/>
        </table:table-row>
        <table:table-row table:style-name="ro1">
          <table:table-cell table:style-name="ce2" office:value-type="float" office:value="1.89053565665088" calcext:value-type="float">
            <text:p>1.89053565665088</text:p>
          </table:table-cell>
          <table:table-cell table:style-name="ce2" office:value-type="float" office:value="1.49468144020803" calcext:value-type="float">
            <text:p>1.49468144020803</text:p>
          </table:table-cell>
          <table:table-cell table:number-columns-repeated="1022"/>
        </table:table-row>
        <table:table-row table:style-name="ro1">
          <table:table-cell table:style-name="ce2" office:value-type="float" office:value="0.390925775938821" calcext:value-type="float">
            <text:p>0.390925775938821</text:p>
          </table:table-cell>
          <table:table-cell table:style-name="ce2" office:value-type="float" office:value="-0.34620802655578" calcext:value-type="float">
            <text:p>-0.34620802655578</text:p>
          </table:table-cell>
          <table:table-cell table:number-columns-repeated="1022"/>
        </table:table-row>
        <table:table-row table:style-name="ro1">
          <table:table-cell table:style-name="ce2" office:value-type="float" office:value="-1.54112859824457" calcext:value-type="float">
            <text:p>-1.54112859824457</text:p>
          </table:table-cell>
          <table:table-cell table:style-name="ce2" office:value-type="float" office:value="1.16006740660697" calcext:value-type="float">
            <text:p>1.16006740660697</text:p>
          </table:table-cell>
          <table:table-cell table:number-columns-repeated="1022"/>
        </table:table-row>
        <table:table-row table:style-name="ro1">
          <table:table-cell table:style-name="ce2" office:value-type="float" office:value="-1.48170727486113" calcext:value-type="float">
            <text:p>-1.48170727486113</text:p>
          </table:table-cell>
          <table:table-cell table:style-name="ce2" office:value-type="float" office:value="-1.09230374862805" calcext:value-type="float">
            <text:p>-1.09230374862805</text:p>
          </table:table-cell>
          <table:table-cell table:number-columns-repeated="1022"/>
        </table:table-row>
        <table:table-row table:style-name="ro1">
          <table:table-cell table:style-name="ce2" office:value-type="float" office:value="0.517702542337901" calcext:value-type="float">
            <text:p>0.517702542337901</text:p>
          </table:table-cell>
          <table:table-cell table:style-name="ce2" office:value-type="float" office:value="-0.190344747057798" calcext:value-type="float">
            <text:p>-0.190344747057798</text:p>
          </table:table-cell>
          <table:table-cell table:number-columns-repeated="1022"/>
        </table:table-row>
        <table:table-row table:style-name="ro1">
          <table:table-cell table:style-name="ce2" office:value-type="float" office:value="1.0047686974251" calcext:value-type="float">
            <text:p>1.0047686974251</text:p>
          </table:table-cell>
          <table:table-cell table:style-name="ce2" office:value-type="float" office:value="0.740453470143844" calcext:value-type="float">
            <text:p>0.740453470143844</text:p>
          </table:table-cell>
          <table:table-cell table:number-columns-repeated="1022"/>
        </table:table-row>
        <table:table-row table:style-name="ro1">
          <table:table-cell table:style-name="ce2" office:value-type="float" office:value="1.31167877507482" calcext:value-type="float">
            <text:p>1.31167877507482</text:p>
          </table:table-cell>
          <table:table-cell table:style-name="ce2" office:value-type="float" office:value="0.0619223788654704" calcext:value-type="float">
            <text:p>0.06192237886547</text:p>
          </table:table-cell>
          <table:table-cell table:number-columns-repeated="1022"/>
        </table:table-row>
        <table:table-row table:style-name="ro1">
          <table:table-cell table:style-name="ce2" office:value-type="float" office:value="1.08617084219693" calcext:value-type="float">
            <text:p>1.08617084219693</text:p>
          </table:table-cell>
          <table:table-cell table:style-name="ce2" office:value-type="float" office:value="-0.276278413163784" calcext:value-type="float">
            <text:p>-0.276278413163784</text:p>
          </table:table-cell>
          <table:table-cell table:number-columns-repeated="1022"/>
        </table:table-row>
        <table:table-row table:style-name="ro1">
          <table:table-cell table:style-name="ce2" office:value-type="float" office:value="-1.77210171890944" calcext:value-type="float">
            <text:p>-1.77210171890944</text:p>
          </table:table-cell>
          <table:table-cell table:style-name="ce2" office:value-type="float" office:value="0.674845860466695" calcext:value-type="float">
            <text:p>0.674845860466695</text:p>
          </table:table-cell>
          <table:table-cell table:number-columns-repeated="1022"/>
        </table:table-row>
        <table:table-row table:style-name="ro1">
          <table:table-cell table:style-name="ce2" office:value-type="float" office:value="0.199879883682359" calcext:value-type="float">
            <text:p>0.199879883682359</text:p>
          </table:table-cell>
          <table:table-cell table:style-name="ce2" office:value-type="float" office:value="-0.266696581089528" calcext:value-type="float">
            <text:p>-0.266696581089528</text:p>
          </table:table-cell>
          <table:table-cell table:number-columns-repeated="1022"/>
        </table:table-row>
        <table:table-row table:style-name="ro1">
          <table:table-cell table:style-name="ce2" office:value-type="float" office:value="-0.446228414348553" calcext:value-type="float">
            <text:p>-0.446228414348553</text:p>
          </table:table-cell>
          <table:table-cell table:style-name="ce2" office:value-type="float" office:value="-0.0836478818219422" calcext:value-type="float">
            <text:p>-0.083647881821942</text:p>
          </table:table-cell>
          <table:table-cell table:number-columns-repeated="1022"/>
        </table:table-row>
        <table:table-row table:style-name="ro1">
          <table:table-cell table:style-name="ce2" office:value-type="float" office:value="0.611208521346915" calcext:value-type="float">
            <text:p>0.611208521346915</text:p>
          </table:table-cell>
          <table:table-cell table:style-name="ce2" office:value-type="float" office:value="-0.886283269699295" calcext:value-type="float">
            <text:p>-0.886283269699295</text:p>
          </table:table-cell>
          <table:table-cell table:number-columns-repeated="1022"/>
        </table:table-row>
        <table:table-row table:style-name="ro1">
          <table:table-cell table:style-name="ce2" office:value-type="float" office:value="0.60404203523253" calcext:value-type="float">
            <text:p>0.60404203523253</text:p>
          </table:table-cell>
          <table:table-cell table:style-name="ce2" office:value-type="float" office:value="1.2643851653566" calcext:value-type="float">
            <text:p>1.2643851653566</text:p>
          </table:table-cell>
          <table:table-cell table:number-columns-repeated="1022"/>
        </table:table-row>
        <table:table-row table:style-name="ro1">
          <table:table-cell table:style-name="ce2" office:value-type="float" office:value="1.57218107792886" calcext:value-type="float">
            <text:p>1.57218107792886</text:p>
          </table:table-cell>
          <table:table-cell table:style-name="ce2" office:value-type="float" office:value="0.785677317555929" calcext:value-type="float">
            <text:p>0.785677317555929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1" style:display-name="PageStyle_U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12" style:display-name="PageStyle_Z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c12" style:display-name="PageStyle_z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c21" style:display-name="PageStyle_zc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21" style:display-name="PageStyle_Z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052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75cm" svg:y="4.609cm" style:legend-expansion="high" chart:style-name="ch2"/>
        <chart:plot-area chart:style-name="ch3" table:cell-range-address="Z12.A2:Z12.B1000 Z12.B1:Z12.B1" chart:data-source-has-labels="row" svg:x="1.377cm" svg:y="0.196cm" svg:width="13.056cm" svg:height="8.394cm">
          <chartooo:coordinate-region svg:x="1.523cm" svg:y="0.395cm" svg:width="12.816cm" svg:height="7.996cm"/>
          <chart:axis chart:dimension="x" chart:name="primary-x" chart:style-name="ch4">
            <chart:title svg:x="7.656cm" svg:y="8.787cm" chart:style-name="ch5">
              <text:p>z1</text:p>
            </chart:title>
            <chart:grid chart:style-name="ch6" chart:class="major"/>
          </chart:axis>
          <chart:axis chart:dimension="y" chart:name="primary-y" chart:style-name="ch4">
            <chart:title svg:x="0.451cm" svg:y="4.642cm" chart:style-name="ch7">
              <text:p>z2</text:p>
            </chart:title>
            <chart:grid chart:style-name="ch6" chart:class="major"/>
          </chart:axis>
          <chart:series chart:style-name="ch8" chart:values-cell-range-address="Z12.B2:Z12.B1000" chart:label-cell-address="Z12.B1:Z12.B1" chart:class="chart:scatter">
            <chart:domain table:cell-range-address="Z12.A2:Z12.A1000"/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2</text:p>
                <draw:g>
                  <svg:desc>Z12.B1:Z1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19519410548471">
                <text:p>-2.19519410548471</text:p>
                <draw:g>
                  <svg:desc>Z12.A2:Z12.A1000</svg:desc>
                </draw:g>
              </table:table-cell>
              <table:table-cell office:value-type="float" office:value="0.529786661487699">
                <text:p>0.529786661487699</text:p>
                <draw:g>
                  <svg:desc>Z12.B2:Z12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8431069819948">
                <text:p>-1.48431069819948</text:p>
              </table:table-cell>
              <table:table-cell office:value-type="float" office:value="-0.0205910092221853">
                <text:p>-0.0205910092221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7767605255332">
                <text:p>0.227767605255332</text:p>
              </table:table-cell>
              <table:table-cell office:value-type="float" office:value="-0.41857516923489">
                <text:p>-0.41857516923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23169172065499">
                <text:p>-0.423169172065499</text:p>
              </table:table-cell>
              <table:table-cell office:value-type="float" office:value="0.561896387938093">
                <text:p>0.561896387938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49000160152">
                <text:p>1.00249000160152</text:p>
              </table:table-cell>
              <table:table-cell office:value-type="float" office:value="-0.467870464987629">
                <text:p>-0.467870464987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171357977346">
                <text:p>1.14171357977346</text:p>
              </table:table-cell>
              <table:table-cell office:value-type="float" office:value="0.646782332353752">
                <text:p>0.646782332353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0027102650401">
                <text:p>-0.80027102650401</text:p>
              </table:table-cell>
              <table:table-cell office:value-type="float" office:value="2.09819636455349">
                <text:p>2.09819636455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2070282758236">
                <text:p>-1.12070282758236</text:p>
              </table:table-cell>
              <table:table-cell office:value-type="float" office:value="-0.293539779887389">
                <text:p>-0.293539779887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00778925907882">
                <text:p>-1.00778925907882</text:p>
              </table:table-cell>
              <table:table-cell office:value-type="float" office:value="-0.612053358403799">
                <text:p>-0.612053358403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14496306395905">
                <text:p>-0.614496306395905</text:p>
              </table:table-cell>
              <table:table-cell office:value-type="float" office:value="-0.403988670095721">
                <text:p>-0.403988670095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679017423146">
                <text:p>1.12679017423146</text:p>
              </table:table-cell>
              <table:table-cell office:value-type="float" office:value="2.29960256014627">
                <text:p>2.29960256014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2943888695306">
                <text:p>1.62943888695306</text:p>
              </table:table-cell>
              <table:table-cell office:value-type="float" office:value="-1.56740933813274">
                <text:p>-1.56740933813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59212532780036">
                <text:p>-0.659212532780036</text:p>
              </table:table-cell>
              <table:table-cell office:value-type="float" office:value="-0.632138595470652">
                <text:p>-0.632138595470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01557392355387">
                <text:p>-0.401557392355387</text:p>
              </table:table-cell>
              <table:table-cell office:value-type="float" office:value="0.109432666579692">
                <text:p>0.109432666579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337647666158">
                <text:p>1.40337647666158</text:p>
              </table:table-cell>
              <table:table-cell office:value-type="float" office:value="-0.322222403541681">
                <text:p>-0.32222240354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6150353561868">
                <text:p>0.166150353561868</text:p>
              </table:table-cell>
              <table:table-cell office:value-type="float" office:value="0.677020010469493">
                <text:p>0.677020010469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668158413287">
                <text:p>1.11668158413287</text:p>
              </table:table-cell>
              <table:table-cell office:value-type="float" office:value="0.28287517935983">
                <text:p>0.28287517935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78430634111973">
                <text:p>-1.78430634111973</text:p>
              </table:table-cell>
              <table:table-cell office:value-type="float" office:value="-1.3796493763667">
                <text:p>-1.3796493763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714907971024">
                <text:p>0.165714907971024</text:p>
              </table:table-cell>
              <table:table-cell office:value-type="float" office:value="-2.87395138163157">
                <text:p>-2.87395138163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6405486934098">
                <text:p>-1.56405486934098</text:p>
              </table:table-cell>
              <table:table-cell office:value-type="float" office:value="-0.299489214657734">
                <text:p>-0.299489214657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1618454098968">
                <text:p>0.291618454098968</text:p>
              </table:table-cell>
              <table:table-cell office:value-type="float" office:value="-0.124352580486038">
                <text:p>-0.124352580486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4589916442278">
                <text:p>0.564589916442278</text:p>
              </table:table-cell>
              <table:table-cell office:value-type="float" office:value="-0.410634411310758">
                <text:p>-0.410634411310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3047098455084">
                <text:p>0.793047098455084</text:p>
              </table:table-cell>
              <table:table-cell office:value-type="float" office:value="-1.8738066103927">
                <text:p>-1.8738066103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80052093311261">
                <text:p>-0.580052093311261</text:p>
              </table:table-cell>
              <table:table-cell office:value-type="float" office:value="-0.441730124329378">
                <text:p>-0.441730124329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6326089420024">
                <text:p>0.276326089420024</text:p>
              </table:table-cell>
              <table:table-cell office:value-type="float" office:value="-0.546337379503751">
                <text:p>-0.546337379503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140665977370313">
                <text:p>-0.00140665977370313</text:p>
              </table:table-cell>
              <table:table-cell office:value-type="float" office:value="-2.54709686956697">
                <text:p>-2.5470968695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3894819408656">
                <text:p>1.33894819408656</text:p>
              </table:table-cell>
              <table:table-cell office:value-type="float" office:value="-1.50886146074106">
                <text:p>-1.50886146074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160005433744">
                <text:p>1.05160005433744</text:p>
              </table:table-cell>
              <table:table-cell office:value-type="float" office:value="0.680073439043011">
                <text:p>0.680073439043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41495811518791">
                <text:p>-0.0441495811518791</text:p>
              </table:table-cell>
              <table:table-cell office:value-type="float" office:value="-0.155467499798747">
                <text:p>-0.1554674997987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13767096425297">
                <text:p>-0.813767096425297</text:p>
              </table:table-cell>
              <table:table-cell office:value-type="float" office:value="0.0191767987180786">
                <text:p>0.01917679871807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070964723263">
                <text:p>1.08070964723263</text:p>
              </table:table-cell>
              <table:table-cell office:value-type="float" office:value="-0.823266740361076">
                <text:p>-0.823266740361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38144259310721">
                <text:p>-1.38144259310721</text:p>
              </table:table-cell>
              <table:table-cell office:value-type="float" office:value="1.84221041507452">
                <text:p>1.84221041507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45527481080128">
                <text:p>-1.45527481080128</text:p>
              </table:table-cell>
              <table:table-cell office:value-type="float" office:value="0.670439030181381">
                <text:p>0.6704390301813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68521163495909">
                <text:p>-1.68521163495909</text:p>
              </table:table-cell>
              <table:table-cell office:value-type="float" office:value="0.577771848687727">
                <text:p>0.577771848687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3948009133692">
                <text:p>0.413948009133692</text:p>
              </table:table-cell>
              <table:table-cell office:value-type="float" office:value="-0.754692557442852">
                <text:p>-0.754692557442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30888661847202">
                <text:p>-1.30888661847202</text:p>
              </table:table-cell>
              <table:table-cell office:value-type="float" office:value="-0.955351275650066">
                <text:p>-0.955351275650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06850389907284">
                <text:p>-0.206850389907284</text:p>
              </table:table-cell>
              <table:table-cell office:value-type="float" office:value="-0.928989784719164">
                <text:p>-0.928989784719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1614349901659">
                <text:p>-0.281614349901659</text:p>
              </table:table-cell>
              <table:table-cell office:value-type="float" office:value="0.0299658660759004">
                <text:p>0.0299658660759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64955895386">
                <text:p>1.2964955895386</text:p>
              </table:table-cell>
              <table:table-cell office:value-type="float" office:value="-2.60553035673763">
                <text:p>-2.60553035673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5956894727331">
                <text:p>2.25956894727331</text:p>
              </table:table-cell>
              <table:table-cell office:value-type="float" office:value="0.482271686222309">
                <text:p>0.482271686222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48500167796337">
                <text:p>-0.248500167796337</text:p>
              </table:table-cell>
              <table:table-cell office:value-type="float" office:value="1.03883824529934">
                <text:p>1.03883824529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390802424335">
                <text:p>0.35390802424335</text:p>
              </table:table-cell>
              <table:table-cell office:value-type="float" office:value="-1.74494226667536">
                <text:p>-1.74494226667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01957837987304">
                <text:p>0.0901957837987304</text:p>
              </table:table-cell>
              <table:table-cell office:value-type="float" office:value="-0.507629573522094">
                <text:p>-0.507629573522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14506201535906">
                <text:p>-0.814506201535906</text:p>
              </table:table-cell>
              <table:table-cell office:value-type="float" office:value="0.455071356114054">
                <text:p>0.455071356114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8644192455585">
                <text:p>0.138644192455585</text:p>
              </table:table-cell>
              <table:table-cell office:value-type="float" office:value="-0.836736825712085">
                <text:p>-0.836736825712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2329829545224">
                <text:p>-2.12329829545224</text:p>
              </table:table-cell>
              <table:table-cell office:value-type="float" office:value="0.79761223111177">
                <text:p>0.79761223111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9403316469655">
                <text:p>0.339403316469655</text:p>
              </table:table-cell>
              <table:table-cell office:value-type="float" office:value="1.09688209691658">
                <text:p>1.096882096916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4285789859991">
                <text:p>0.674285789859991</text:p>
              </table:table-cell>
              <table:table-cell office:value-type="float" office:value="1.15372264535202">
                <text:p>1.15372264535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87908642166371">
                <text:p>-0.287908642166371</text:p>
              </table:table-cell>
              <table:table-cell office:value-type="float" office:value="-0.301964627116587">
                <text:p>-0.301964627116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62390733219099">
                <text:p>-0.362390733219099</text:p>
              </table:table-cell>
              <table:table-cell office:value-type="float" office:value="2.07405905465044">
                <text:p>2.074059054650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96162491447338">
                <text:p>-0.296162491447338</text:p>
              </table:table-cell>
              <table:table-cell office:value-type="float" office:value="-0.00686458574643324">
                <text:p>-0.00686458574643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82516327550004">
                <text:p>0.0182516327550004</text:p>
              </table:table-cell>
              <table:table-cell office:value-type="float" office:value="-0.335832602239587">
                <text:p>-0.335832602239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5957424078381">
                <text:p>1.35957424078381</text:p>
              </table:table-cell>
              <table:table-cell office:value-type="float" office:value="0.373469149240188">
                <text:p>0.373469149240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9373197493044">
                <text:p>0.179373197493044</text:p>
              </table:table-cell>
              <table:table-cell office:value-type="float" office:value="1.20352842931974">
                <text:p>1.203528429319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1128000557076">
                <text:p>2.41128000557076</text:p>
              </table:table-cell>
              <table:table-cell office:value-type="float" office:value="0.235073536640675">
                <text:p>0.235073536640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4005587335963">
                <text:p>-0.454005587335963</text:p>
              </table:table-cell>
              <table:table-cell office:value-type="float" office:value="1.35176444270165">
                <text:p>1.35176444270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295788974574">
                <text:p>0.87295788974574</text:p>
              </table:table-cell>
              <table:table-cell office:value-type="float" office:value="-0.972336115952652">
                <text:p>-0.9723361159526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5254357076652">
                <text:p>0.745254357076652</text:p>
              </table:table-cell>
              <table:table-cell office:value-type="float" office:value="1.42799996793149">
                <text:p>1.42799996793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11058382586879">
                <text:p>-0.111058382586879</text:p>
              </table:table-cell>
              <table:table-cell office:value-type="float" office:value="0.670008275871385">
                <text:p>0.670008275871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886048039492638">
                <text:p>-0.0886048039492638</text:p>
              </table:table-cell>
              <table:table-cell office:value-type="float" office:value="-0.281737182456962">
                <text:p>-0.281737182456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06552197052181">
                <text:p>-0.806552197052181</text:p>
              </table:table-cell>
              <table:table-cell office:value-type="float" office:value="-1.83259913155897">
                <text:p>-1.832599131558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37669116647158">
                <text:p>-0.837669116647158</text:p>
              </table:table-cell>
              <table:table-cell office:value-type="float" office:value="-0.894278762628125">
                <text:p>-0.894278762628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0218436195408">
                <text:p>1.30218436195408</text:p>
              </table:table-cell>
              <table:table-cell office:value-type="float" office:value="-0.445076048289432">
                <text:p>-0.445076048289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25682517918048">
                <text:p>-0.325682517918048</text:p>
              </table:table-cell>
              <table:table-cell office:value-type="float" office:value="1.87559416868187">
                <text:p>1.875594168681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8638180558547">
                <text:p>-1.88638180558547</text:p>
              </table:table-cell>
              <table:table-cell office:value-type="float" office:value="-0.765857246660505">
                <text:p>-0.765857246660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4388804784126">
                <text:p>0.654388804784126</text:p>
              </table:table-cell>
              <table:table-cell office:value-type="float" office:value="0.0316515141675018">
                <text:p>0.0316515141675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74953511287141">
                <text:p>0.0074953511287141</text:p>
              </table:table-cell>
              <table:table-cell office:value-type="float" office:value="0.0723674863316979">
                <text:p>0.07236748633169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716622634610266">
                <text:p>-0.716622634610266</text:p>
              </table:table-cell>
              <table:table-cell office:value-type="float" office:value="-0.46281472682941">
                <text:p>-0.46281472682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1309217320902">
                <text:p>-1.11309217320902</text:p>
              </table:table-cell>
              <table:table-cell office:value-type="float" office:value="-1.85764550820523">
                <text:p>-1.857645508205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897231449908016">
                <text:p>-0.897231449908016</text:p>
              </table:table-cell>
              <table:table-cell office:value-type="float" office:value="-0.71823370640404">
                <text:p>-0.71823370640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62608704890898">
                <text:p>-2.62608704890898</text:p>
              </table:table-cell>
              <table:table-cell office:value-type="float" office:value="0.0860237426364836">
                <text:p>0.08602374263648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1610365632332">
                <text:p>0.551610365632332</text:p>
              </table:table-cell>
              <table:table-cell office:value-type="float" office:value="1.32903967963397">
                <text:p>1.32903967963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906851603040366">
                <text:p>-0.0906851603040366</text:p>
              </table:table-cell>
              <table:table-cell office:value-type="float" office:value="0.327940338212043">
                <text:p>0.327940338212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05796410185105">
                <text:p>-2.05796410185105</text:p>
              </table:table-cell>
              <table:table-cell office:value-type="float" office:value="-1.15927681414192">
                <text:p>-1.159276814141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9958878921248">
                <text:p>0.479958878921248</text:p>
              </table:table-cell>
              <table:table-cell office:value-type="float" office:value="-0.991554917088909">
                <text:p>-0.991554917088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2822045030665">
                <text:p>0.402822045030665</text:p>
              </table:table-cell>
              <table:table-cell office:value-type="float" office:value="1.08889832391837">
                <text:p>1.08889832391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17574833587463">
                <text:p>0.717574833587463</text:p>
              </table:table-cell>
              <table:table-cell office:value-type="float" office:value="-1.04168574656279">
                <text:p>-1.041685746562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07538428779434">
                <text:p>-3.07538428779434</text:p>
              </table:table-cell>
              <table:table-cell office:value-type="float" office:value="-1.64031368454431">
                <text:p>-1.64031368454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3645649223814">
                <text:p>0.453645649223814</text:p>
              </table:table-cell>
              <table:table-cell office:value-type="float" office:value="-0.778301213585709">
                <text:p>-0.778301213585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2238810366234">
                <text:p>2.32238810366234</text:p>
              </table:table-cell>
              <table:table-cell office:value-type="float" office:value="0.32260583712857">
                <text:p>0.322605837128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6801439054583">
                <text:p>0.446801439054583</text:p>
              </table:table-cell>
              <table:table-cell office:value-type="float" office:value="-0.106457986580207">
                <text:p>-0.106457986580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6558681481395">
                <text:p>0.326558681481395</text:p>
              </table:table-cell>
              <table:table-cell office:value-type="float" office:value="-1.25451191406226">
                <text:p>-1.254511914062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484473022368">
                <text:p>-1.80484473022368</text:p>
              </table:table-cell>
              <table:table-cell office:value-type="float" office:value="0.433121488117779">
                <text:p>0.433121488117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8072290510216">
                <text:p>0.938072290510216</text:p>
              </table:table-cell>
              <table:table-cell office:value-type="float" office:value="0.0679788306883186">
                <text:p>0.0679788306883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50486446819">
                <text:p>1.0050486446819</text:p>
              </table:table-cell>
              <table:table-cell office:value-type="float" office:value="0.579036772857768">
                <text:p>0.579036772857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6514430356531">
                <text:p>0.136514430356531</text:p>
              </table:table-cell>
              <table:table-cell office:value-type="float" office:value="0.0944361581588776">
                <text:p>0.09443615815887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9370996560907">
                <text:p>2.39370996560907</text:p>
              </table:table-cell>
              <table:table-cell office:value-type="float" office:value="0.279911200125655">
                <text:p>0.279911200125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16202238364907">
                <text:p>0.0316202238364907</text:p>
              </table:table-cell>
              <table:table-cell office:value-type="float" office:value="0.521232310366898">
                <text:p>0.5212323103668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69450952725064">
                <text:p>-0.269450952725064</text:p>
              </table:table-cell>
              <table:table-cell office:value-type="float" office:value="-1.91003401223198">
                <text:p>-1.910034012231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8201006500383">
                <text:p>-1.8201006500383</text:p>
              </table:table-cell>
              <table:table-cell office:value-type="float" office:value="-0.275349873497326">
                <text:p>-0.275349873497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1476916977906">
                <text:p>0.231476916977906</text:p>
              </table:table-cell>
              <table:table-cell office:value-type="float" office:value="0.500665039657456">
                <text:p>0.500665039657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3405842969065">
                <text:p>1.23405842969065</text:p>
              </table:table-cell>
              <table:table-cell office:value-type="float" office:value="0.18689908922884">
                <text:p>0.18689908922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1282690853091">
                <text:p>0.971282690853091</text:p>
              </table:table-cell>
              <table:table-cell office:value-type="float" office:value="0.883711222299363">
                <text:p>0.8837112222993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2680428752068">
                <text:p>0.572680428752068</text:p>
              </table:table-cell>
              <table:table-cell office:value-type="float" office:value="0.963397107307819">
                <text:p>0.9633971073078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775877058406225">
                <text:p>-0.775877058406225</text:p>
              </table:table-cell>
              <table:table-cell office:value-type="float" office:value="-1.73025322633251">
                <text:p>-1.73025322633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72465398455632">
                <text:p>-0.0472465398455632</text:p>
              </table:table-cell>
              <table:table-cell office:value-type="float" office:value="0.329919382189334">
                <text:p>0.329919382189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74679122311016">
                <text:p>-0.374679122311016</text:p>
              </table:table-cell>
              <table:table-cell office:value-type="float" office:value="-0.256383153164943">
                <text:p>-0.2563831531649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94507219944465">
                <text:p>-0.194507219944465</text:p>
              </table:table-cell>
              <table:table-cell office:value-type="float" office:value="1.05888660025483">
                <text:p>1.058886600254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2117754403852">
                <text:p>1.32117754403852</text:p>
              </table:table-cell>
              <table:table-cell office:value-type="float" office:value="-0.466933105585484">
                <text:p>-0.466933105585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6725766096478">
                <text:p>1.66725766096478</text:p>
              </table:table-cell>
              <table:table-cell office:value-type="float" office:value="0.556142141906265">
                <text:p>0.556142141906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564cm" svg:y="4.609cm" style:legend-expansion="high" chart:style-name="ch2"/>
        <chart:plot-area chart:style-name="ch3" table:cell-range-address="zc12.A2:zc12.B1000 zc12.B1:zc12.B1" chart:data-source-has-labels="row" svg:x="1.377cm" svg:y="0.196cm" svg:width="12.87cm" svg:height="8.394cm">
          <chartooo:coordinate-region svg:x="1.523cm" svg:y="0.395cm" svg:width="12.63cm" svg:height="7.996cm"/>
          <chart:axis chart:dimension="x" chart:name="primary-x" chart:style-name="ch4">
            <chart:title svg:x="7.47cm" svg:y="8.787cm" chart:style-name="ch5">
              <text:p>zc1</text:p>
            </chart:title>
            <chart:grid chart:style-name="ch6" chart:class="major"/>
          </chart:axis>
          <chart:axis chart:dimension="y" chart:name="primary-y" chart:style-name="ch4">
            <chart:title svg:x="0.451cm" svg:y="4.735cm" chart:style-name="ch7">
              <text:p>zc2</text:p>
            </chart:title>
            <chart:grid chart:style-name="ch6" chart:class="major"/>
          </chart:axis>
          <chart:series chart:style-name="ch8" chart:values-cell-range-address="zc12.B2:zc12.B1000" chart:label-cell-address="zc12.B1:zc12.B1" chart:class="chart:scatter">
            <chart:domain table:cell-range-address="zc12.A2:zc12.A1000"/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c2</text:p>
                <draw:g>
                  <svg:desc>zc12.B1:zc1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0447327519894">
                <text:p>-3.10447327519894</text:p>
                <draw:g>
                  <svg:desc>zc12.A2:zc12.A1000</svg:desc>
                </draw:g>
              </table:table-cell>
              <table:table-cell office:value-type="float" office:value="-1.17762089711125">
                <text:p>-1.17762089711125</text:p>
                <draw:g>
                  <svg:desc>zc12.B2:zc12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09913231961539">
                <text:p>-2.09913231961539</text:p>
              </table:table-cell>
              <table:table-cell office:value-type="float" office:value="-1.06412620235732">
                <text:p>-1.06412620235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2112036336353">
                <text:p>0.322112036336353</text:p>
              </table:table-cell>
              <table:table-cell office:value-type="float" office:value="-0.134921322394199">
                <text:p>-0.134921322394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9845158215534">
                <text:p>-0.59845158215534</text:p>
              </table:table-cell>
              <table:table-cell office:value-type="float" office:value="0.098094955080508">
                <text:p>0.098094955080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773495603427">
                <text:p>1.41773495603427</text:p>
              </table:table-cell>
              <table:table-cell office:value-type="float" office:value="0.378033099701684">
                <text:p>0.378033099701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46268284352">
                <text:p>1.6146268284352</text:p>
              </table:table-cell>
              <table:table-cell office:value-type="float" office:value="1.26465758761363">
                <text:p>1.26465758761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3175413895763">
                <text:p>-1.13175413895763</text:p>
              </table:table-cell>
              <table:table-cell office:value-type="float" office:value="0.917771808026088">
                <text:p>0.917771808026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8491313773872">
                <text:p>-1.58491313773872</text:p>
              </table:table-cell>
              <table:table-cell office:value-type="float" office:value="-1.00002053800383">
                <text:p>-1.00002053800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4252292378272">
                <text:p>-1.4252292378272</text:p>
              </table:table-cell>
              <table:table-cell office:value-type="float" office:value="-1.14540169929872">
                <text:p>-1.14540169929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69029010303996">
                <text:p>-0.869029010303996</text:p>
              </table:table-cell>
              <table:table-cell office:value-type="float" office:value="-0.720177633427551">
                <text:p>-0.720177633427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352194592647">
                <text:p>1.59352194592647</text:p>
              </table:table-cell>
              <table:table-cell office:value-type="float" office:value="2.4228255375329">
                <text:p>2.4228255375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043745723792">
                <text:p>2.3043745723792</text:p>
              </table:table-cell>
              <table:table-cell office:value-type="float" office:value="0.0438615146056269">
                <text:p>0.0438615146056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32267304097896">
                <text:p>-0.932267304097896</text:p>
              </table:table-cell>
              <table:table-cell office:value-type="float" office:value="-0.913123139696332">
                <text:p>-0.913123139696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67887910190343">
                <text:p>-0.567887910190343</text:p>
              </table:table-cell>
              <table:table-cell office:value-type="float" office:value="-0.206563374552184">
                <text:p>-0.206563374552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8467404588658">
                <text:p>1.98467404588658</text:p>
              </table:table-cell>
              <table:table-cell office:value-type="float" office:value="0.764491376625081">
                <text:p>0.764491376625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4972083338288">
                <text:p>0.234972083338288</text:p>
              </table:table-cell>
              <table:table-cell office:value-type="float" office:value="0.596211482113448">
                <text:p>0.596211482113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922624071635">
                <text:p>1.57922624071635</text:p>
              </table:table-cell>
              <table:table-cell office:value-type="float" office:value="0.989636078140016">
                <text:p>0.98963607814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52339022637412">
                <text:p>-2.52339022637412</text:p>
              </table:table-cell>
              <table:table-cell office:value-type="float" office:value="-2.23725454325117">
                <text:p>-2.23725454325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4356270278204">
                <text:p>0.234356270278204</text:p>
              </table:table-cell>
              <table:table-cell office:value-type="float" office:value="-1.91501237561855">
                <text:p>-1.91501237561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21190760793416">
                <text:p>-2.21190760793416</text:p>
              </table:table-cell>
              <table:table-cell office:value-type="float" office:value="-1.31772465886064">
                <text:p>-1.3177246588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2410772716235">
                <text:p>0.412410772716235</text:p>
              </table:table-cell>
              <table:table-cell office:value-type="float" office:value="0.118274833495045">
                <text:p>0.118274833495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8450716801117">
                <text:p>0.798450716801117</text:p>
              </table:table-cell>
              <table:table-cell office:value-type="float" office:value="0.10886298168157">
                <text:p>0.10886298168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153796193993">
                <text:p>1.12153796193993</text:p>
              </table:table-cell>
              <table:table-cell office:value-type="float" office:value="-0.764212379737492">
                <text:p>-0.764212379737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20317537027275">
                <text:p>-0.820317537027275</text:p>
              </table:table-cell>
              <table:table-cell office:value-type="float" office:value="-0.72250913500327">
                <text:p>-0.72250913500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784103192222">
                <text:p>0.390784103192222</text:p>
              </table:table-cell>
              <table:table-cell office:value-type="float" office:value="-0.190926814218764">
                <text:p>-0.190926814218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198931732909082">
                <text:p>-0.00198931732909082</text:p>
              </table:table-cell>
              <table:table-cell office:value-type="float" office:value="-1.80206412750893">
                <text:p>-1.80206412750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9355869489262">
                <text:p>1.89355869489262</text:p>
              </table:table-cell>
              <table:table-cell office:value-type="float" office:value="-0.12014682306724">
                <text:p>-0.12014682306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718705864394">
                <text:p>1.48718705864394</text:p>
              </table:table-cell>
              <table:table-cell office:value-type="float" office:value="1.22447806999361">
                <text:p>1.22447806999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62436936421607">
                <text:p>-0.062436936421607</text:p>
              </table:table-cell>
              <table:table-cell office:value-type="float" office:value="-0.141150591583537">
                <text:p>-0.141150591583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5084046407402">
                <text:p>-1.15084046407402</text:p>
              </table:table-cell>
              <table:table-cell office:value-type="float" office:value="-0.561860187784501">
                <text:p>-0.56186018778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2835423970062">
                <text:p>1.52835423970062</text:p>
              </table:table-cell>
              <table:table-cell office:value-type="float" office:value="0.182039625220717">
                <text:p>0.182039625220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5365485029667">
                <text:p>-1.95365485029667</text:p>
              </table:table-cell>
              <table:table-cell office:value-type="float" office:value="0.325812051471838">
                <text:p>0.325812051471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05806937387216">
                <text:p>-2.05806937387216</text:p>
              </table:table-cell>
              <table:table-cell office:value-type="float" office:value="-0.554962702604728">
                <text:p>-0.554962702604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38324914899934">
                <text:p>-2.38324914899934</text:p>
              </table:table-cell>
              <table:table-cell office:value-type="float" office:value="-0.783078182643158">
                <text:p>-0.783078182643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5410888479767">
                <text:p>0.585410888479767</text:p>
              </table:table-cell>
              <table:table-cell office:value-type="float" office:value="-0.240942780766338">
                <text:p>-0.24094278076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85104520696344">
                <text:p>-1.85104520696344</text:p>
              </table:table-cell>
              <table:table-cell office:value-type="float" office:value="-1.60105796918373">
                <text:p>-1.60105796918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92530626711869">
                <text:p>-0.292530626711869</text:p>
              </table:table-cell>
              <table:table-cell office:value-type="float" office:value="-0.803160289837753">
                <text:p>-0.8031602898377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9826283288474">
                <text:p>-0.39826283288474</text:p>
              </table:table-cell>
              <table:table-cell office:value-type="float" office:value="-0.177942349391892">
                <text:p>-0.177942349391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3352164579867">
                <text:p>1.83352164579867</text:p>
              </table:table-cell>
              <table:table-cell office:value-type="float" office:value="-0.925627360712994">
                <text:p>-0.925627360712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9551304950797">
                <text:p>3.19551304950797</text:p>
              </table:table-cell>
              <table:table-cell office:value-type="float" office:value="1.93877410491445">
                <text:p>1.93877410491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51432307456855">
                <text:p>-0.351432307456855</text:p>
              </table:table-cell>
              <table:table-cell office:value-type="float" office:value="0.558853414042948">
                <text:p>0.558853414042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050152758557">
                <text:p>0.50050152758557</text:p>
              </table:table-cell>
              <table:table-cell office:value-type="float" office:value="-0.983609745705076">
                <text:p>-0.983609745705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7556100683384">
                <text:p>0.127556100683384</text:p>
              </table:table-cell>
              <table:table-cell office:value-type="float" office:value="-0.295170263415405">
                <text:p>-0.295170263415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5188571654518">
                <text:p>-1.15188571654518</text:p>
              </table:table-cell>
              <table:table-cell office:value-type="float" office:value="-0.254158816597365">
                <text:p>-0.2541588165973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6072497263227">
                <text:p>0.196072497263227</text:p>
              </table:table-cell>
              <table:table-cell office:value-type="float" office:value="-0.493626034881435">
                <text:p>-0.493626034881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00279724560003">
                <text:p>-3.00279724560003</text:p>
              </table:table-cell>
              <table:table-cell office:value-type="float" office:value="-0.937401605837482">
                <text:p>-0.9374016058374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9988773139164">
                <text:p>0.479988773139164</text:p>
              </table:table-cell>
              <table:table-cell office:value-type="float" office:value="1.01560715554405">
                <text:p>1.01560715554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3584108683881">
                <text:p>0.953584108683881</text:p>
              </table:table-cell>
              <table:table-cell office:value-type="float" office:value="1.29259716062921">
                <text:p>1.29259716062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07164306368686">
                <text:p>-0.407164306368686</text:p>
              </table:table-cell>
              <table:table-cell office:value-type="float" office:value="-0.417103388758593">
                <text:p>-0.417103388758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2497889661574">
                <text:p>-0.512497889661574</text:p>
              </table:table-cell>
              <table:table-cell office:value-type="float" office:value="1.21033227724932">
                <text:p>1.21033227724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18837011960534">
                <text:p>-0.418837011960534</text:p>
              </table:table-cell>
              <table:table-cell office:value-type="float" office:value="-0.214272501170931">
                <text:p>-0.214272501170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5811706570765">
                <text:p>0.025811706570765</text:p>
              </table:table-cell>
              <table:table-cell office:value-type="float" office:value="-0.224563657102622">
                <text:p>-0.2245636571026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272832986231">
                <text:p>1.92272832986231</text:p>
              </table:table-cell>
              <table:table-cell office:value-type="float" office:value="1.2254467331998">
                <text:p>1.2254467331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3672008553967">
                <text:p>0.253672008553967</text:p>
              </table:table-cell>
              <table:table-cell office:value-type="float" office:value="0.977859118051835">
                <text:p>0.977859118051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1006488565761">
                <text:p>3.41006488565761</text:p>
              </table:table-cell>
              <table:table-cell office:value-type="float" office:value="1.87125453515035">
                <text:p>1.87125453515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42060858834295">
                <text:p>-0.642060858834295</text:p>
              </table:table-cell>
              <table:table-cell office:value-type="float" office:value="0.634811374511426">
                <text:p>0.6348113745114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3454888673333">
                <text:p>1.23454888673333</text:p>
              </table:table-cell>
              <table:table-cell office:value-type="float" office:value="-0.0702710176545355">
                <text:p>-0.0702710176545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5394881891739">
                <text:p>1.05394881891739</text:p>
              </table:table-cell>
              <table:table-cell office:value-type="float" office:value="1.53672287048549">
                <text:p>1.536722870485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57060270828149">
                <text:p>-0.157060270828149</text:p>
              </table:table-cell>
              <table:table-cell office:value-type="float" office:value="0.39523725989249">
                <text:p>0.3952372598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253061154034">
                <text:p>-0.1253061154034</text:p>
              </table:table-cell>
              <table:table-cell office:value-type="float" office:value="-0.26187132995092">
                <text:p>-0.26187132995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14063705553209">
                <text:p>-1.14063705553209</text:p>
              </table:table-cell>
              <table:table-cell office:value-type="float" office:value="-1.86616180107394">
                <text:p>-1.86616180107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8464302523097">
                <text:p>-1.18464302523097</text:p>
              </table:table-cell>
              <table:table-cell office:value-type="float" office:value="-1.22467209012051">
                <text:p>-1.224672090120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4156678489977">
                <text:p>1.84156678489977</text:p>
              </table:table-cell>
              <table:table-cell office:value-type="float" office:value="0.606067100815168">
                <text:p>0.606067100815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60584633746011">
                <text:p>-0.460584633746011</text:p>
              </table:table-cell>
              <table:table-cell office:value-type="float" office:value="1.09595303851598">
                <text:p>1.095953038515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66774673256902">
                <text:p>-2.66774673256902</text:p>
              </table:table-cell>
              <table:table-cell office:value-type="float" office:value="-1.87541621920659">
                <text:p>-1.875416219206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5445522546682">
                <text:p>0.925445522546682</text:p>
              </table:table-cell>
              <table:table-cell office:value-type="float" office:value="0.485103761707307">
                <text:p>0.485103761707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6000272181795">
                <text:p>0.0106000272181795</text:p>
              </table:table-cell>
              <table:table-cell office:value-type="float" office:value="0.0564715539341307">
                <text:p>0.05647155393413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01345744870201">
                <text:p>-1.01345744870201</text:p>
              </table:table-cell>
              <table:table-cell office:value-type="float" office:value="-0.83398815627463">
                <text:p>-0.83398815627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7415004710825">
                <text:p>-1.57415004710825</text:p>
              </table:table-cell>
              <table:table-cell office:value-type="float" office:value="-2.10062875969439">
                <text:p>-2.100628759694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26887688471284">
                <text:p>-1.26887688471284</text:p>
              </table:table-cell>
              <table:table-cell office:value-type="float" office:value="-1.14230636682057">
                <text:p>-1.142306366820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71384791955964">
                <text:p>-3.71384791955964</text:p>
              </table:table-cell>
              <table:table-cell office:value-type="float" office:value="-1.79609598854257">
                <text:p>-1.79609598854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80094860017022">
                <text:p>0.780094860017022</text:p>
              </table:table-cell>
              <table:table-cell office:value-type="float" office:value="1.32982040007189">
                <text:p>1.32982040007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28248183574113">
                <text:p>-0.128248183574113</text:p>
              </table:table-cell>
              <table:table-cell office:value-type="float" office:value="0.167764745173564">
                <text:p>0.1677647451735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9104007429469">
                <text:p>-2.9104007429469</text:p>
              </table:table-cell>
              <table:table-cell office:value-type="float" office:value="-2.27493286845273">
                <text:p>-2.27493286845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8764355772745">
                <text:p>0.678764355772745</text:p>
              </table:table-cell>
              <table:table-cell office:value-type="float" office:value="-0.361753027823407">
                <text:p>-0.361753027823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9676399154941">
                <text:p>0.569676399154941</text:p>
              </table:table-cell>
              <table:table-cell office:value-type="float" office:value="1.05480558853803">
                <text:p>1.05480558853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480406140928">
                <text:p>1.01480406140928</text:p>
              </table:table-cell>
              <table:table-cell office:value-type="float" office:value="-0.229181024425775">
                <text:p>-0.229181024425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34925016816047">
                <text:p>-4.34925016816047</text:p>
              </table:table-cell>
              <table:table-cell office:value-type="float" office:value="-3.33450201433175">
                <text:p>-3.33450201433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1551829474613">
                <text:p>0.641551829474613</text:p>
              </table:table-cell>
              <table:table-cell office:value-type="float" office:value="-0.229566151114609">
                <text:p>-0.229566151114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8435275242675">
                <text:p>3.28435275242675</text:p>
              </table:table-cell>
              <table:table-cell office:value-type="float" office:value="1.87029315176617">
                <text:p>1.87029315176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1872654632107">
                <text:p>0.631872654632107</text:p>
              </table:table-cell>
              <table:table-cell office:value-type="float" office:value="0.240659163181651">
                <text:p>0.240659163181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1823716139827">
                <text:p>0.461823716139827</text:p>
              </table:table-cell>
              <table:table-cell office:value-type="float" office:value="-0.656162023394387">
                <text:p>-0.6561620233943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55243589478655">
                <text:p>-2.55243589478655</text:p>
              </table:table-cell>
              <table:table-cell office:value-type="float" office:value="-0.96995480642273">
                <text:p>-0.969954806422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2663455537595">
                <text:p>1.32663455537595</text:p>
              </table:table-cell>
              <table:table-cell office:value-type="float" office:value="0.711385570033347">
                <text:p>0.7113855700333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2135342377886">
                <text:p>1.42135342377886</text:p>
              </table:table-cell>
              <table:table-cell office:value-type="float" office:value="1.12011754074233">
                <text:p>1.12011754074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3060558818911">
                <text:p>0.193060558818911</text:p>
              </table:table-cell>
              <table:table-cell office:value-type="float" office:value="0.163306727261377">
                <text:p>0.1633067272613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852170968589">
                <text:p>3.3852170968589</text:p>
              </table:table-cell>
              <table:table-cell office:value-type="float" office:value="1.89053565665088">
                <text:p>1.89053565665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7177493830408">
                <text:p>0.0447177493830408</text:p>
              </table:table-cell>
              <table:table-cell office:value-type="float" office:value="0.390925775938821">
                <text:p>0.390925775938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81061191637607">
                <text:p>-0.381061191637607</text:p>
              </table:table-cell>
              <table:table-cell office:value-type="float" office:value="-1.54112859824457">
                <text:p>-1.541128598244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57401102348917">
                <text:p>-2.57401102348917</text:p>
              </table:table-cell>
              <table:table-cell office:value-type="float" office:value="-1.48170727486113">
                <text:p>-1.48170727486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7357795280103">
                <text:p>0.327357795280103</text:p>
              </table:table-cell>
              <table:table-cell office:value-type="float" office:value="0.517702542337901">
                <text:p>0.517702542337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4522216756894">
                <text:p>1.74522216756894</text:p>
              </table:table-cell>
              <table:table-cell office:value-type="float" office:value="1.0047686974251">
                <text:p>1.00476869742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7360115394029">
                <text:p>1.37360115394029</text:p>
              </table:table-cell>
              <table:table-cell office:value-type="float" office:value="1.31167877507482">
                <text:p>1.31167877507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989242903315">
                <text:p>0.80989242903315</text:p>
              </table:table-cell>
              <table:table-cell office:value-type="float" office:value="1.08617084219693">
                <text:p>1.08617084219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09725585844275">
                <text:p>-1.09725585844275</text:p>
              </table:table-cell>
              <table:table-cell office:value-type="float" office:value="-1.77210171890944">
                <text:p>-1.772101718909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668166974071688">
                <text:p>-0.0668166974071688</text:p>
              </table:table-cell>
              <table:table-cell office:value-type="float" office:value="0.199879883682359">
                <text:p>0.1998798836823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29876296170495">
                <text:p>-0.529876296170495</text:p>
              </table:table-cell>
              <table:table-cell office:value-type="float" office:value="-0.446228414348553">
                <text:p>-0.4462284143485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507474835238">
                <text:p>-0.27507474835238</text:p>
              </table:table-cell>
              <table:table-cell office:value-type="float" office:value="0.611208521346915">
                <text:p>0.6112085213469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6842720058913">
                <text:p>1.86842720058913</text:p>
              </table:table-cell>
              <table:table-cell office:value-type="float" office:value="0.60404203523253">
                <text:p>0.60404203523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5785839548479">
                <text:p>2.35785839548479</text:p>
              </table:table-cell>
              <table:table-cell office:value-type="float" office:value="1.57218107792886">
                <text:p>1.572181077928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75cm" svg:y="4.609cm" style:legend-expansion="high" chart:style-name="ch2"/>
        <chart:plot-area chart:style-name="ch3" table:cell-range-address="Z21.A2:Z21.B1000 Z21.B1:Z21.B1" chart:data-source-has-labels="row" svg:x="1.377cm" svg:y="0.196cm" svg:width="13.056cm" svg:height="8.394cm">
          <chartooo:coordinate-region svg:x="1.523cm" svg:y="0.395cm" svg:width="12.816cm" svg:height="7.996cm"/>
          <chart:axis chart:dimension="x" chart:name="primary-x" chart:style-name="ch4">
            <chart:title svg:x="7.563cm" svg:y="8.787cm" chart:style-name="ch5">
              <text:p>zc2</text:p>
            </chart:title>
            <chart:grid chart:style-name="ch6" chart:class="major"/>
          </chart:axis>
          <chart:axis chart:dimension="y" chart:name="primary-y" chart:style-name="ch4">
            <chart:title svg:x="0.451cm" svg:y="4.735cm" chart:style-name="ch7">
              <text:p>zc1</text:p>
            </chart:title>
            <chart:grid chart:style-name="ch6" chart:class="major"/>
          </chart:axis>
          <chart:series chart:style-name="ch8" chart:values-cell-range-address="Z21.B2:Z21.B1000" chart:label-cell-address="Z21.B1:Z21.B1" chart:class="chart:scatter">
            <chart:domain table:cell-range-address="Z21.A2:Z21.A1000"/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1</text:p>
                <draw:g>
                  <svg:desc>Z21.B1:Z2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7762089711125">
                <text:p>-1.17762089711125</text:p>
                <draw:g>
                  <svg:desc>Z21.A2:Z21.A1000</svg:desc>
                </draw:g>
              </table:table-cell>
              <table:table-cell office:value-type="float" office:value="-1.92685237808769">
                <text:p>-1.92685237808769</text:p>
                <draw:g>
                  <svg:desc>Z21.B2:Z2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6412620235732">
                <text:p>-1.06412620235732</text:p>
              </table:table-cell>
              <table:table-cell office:value-type="float" office:value="-1.03500611725807">
                <text:p>-1.03500611725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34921322394199">
                <text:p>-0.134921322394199</text:p>
              </table:table-cell>
              <table:table-cell office:value-type="float" office:value="0.457033358730551">
                <text:p>0.457033358730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094955080508">
                <text:p>0.098094955080508</text:p>
              </table:table-cell>
              <table:table-cell office:value-type="float" office:value="-0.696546537235848">
                <text:p>-0.696546537235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8033099701684">
                <text:p>0.378033099701684</text:p>
              </table:table-cell>
              <table:table-cell office:value-type="float" office:value="1.03970185633259">
                <text:p>1.03970185633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465758761363">
                <text:p>1.26465758761363</text:p>
              </table:table-cell>
              <table:table-cell office:value-type="float" office:value="0.349969240821565">
                <text:p>0.349969240821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7771808026088">
                <text:p>0.917771808026088</text:p>
              </table:table-cell>
              <table:table-cell office:value-type="float" office:value="-2.04952594698372">
                <text:p>-2.04952594698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0002053800383">
                <text:p>-1.00002053800383</text:p>
              </table:table-cell>
              <table:table-cell office:value-type="float" office:value="-0.58489259973489">
                <text:p>-0.58489259973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4540169929872">
                <text:p>-1.14540169929872</text:p>
              </table:table-cell>
              <table:table-cell office:value-type="float" office:value="-0.279827538528483">
                <text:p>-0.279827538528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20177633427551">
                <text:p>-0.720177633427551</text:p>
              </table:table-cell>
              <table:table-cell office:value-type="float" office:value="-0.148851376876445">
                <text:p>-0.148851376876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228255375329">
                <text:p>2.4228255375329</text:p>
              </table:table-cell>
              <table:table-cell office:value-type="float" office:value="-0.829303591606433">
                <text:p>-0.829303591606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8615146056269">
                <text:p>0.0438615146056269</text:p>
              </table:table-cell>
              <table:table-cell office:value-type="float" office:value="2.26051305777357">
                <text:p>2.26051305777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13123139696332">
                <text:p>-0.913123139696332</text:p>
              </table:table-cell>
              <table:table-cell office:value-type="float" office:value="-0.0191441644015634">
                <text:p>-0.0191441644015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06563374552184">
                <text:p>-0.206563374552184</text:p>
              </table:table-cell>
              <table:table-cell office:value-type="float" office:value="-0.361324535638159">
                <text:p>-0.361324535638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4491376625081">
                <text:p>0.764491376625081</text:p>
              </table:table-cell>
              <table:table-cell office:value-type="float" office:value="1.2201826692615">
                <text:p>1.2201826692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6211482113448">
                <text:p>0.596211482113448</text:p>
              </table:table-cell>
              <table:table-cell office:value-type="float" office:value="-0.36123939877516">
                <text:p>-0.36123939877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636078140016">
                <text:p>0.989636078140016</text:p>
              </table:table-cell>
              <table:table-cell office:value-type="float" office:value="0.589590162576339">
                <text:p>0.589590162576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23725454325117">
                <text:p>-2.23725454325117</text:p>
              </table:table-cell>
              <table:table-cell office:value-type="float" office:value="-0.286135683122951">
                <text:p>-0.286135683122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91501237561855">
                <text:p>-1.91501237561855</text:p>
              </table:table-cell>
              <table:table-cell office:value-type="float" office:value="2.14936864589675">
                <text:p>2.14936864589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31772465886064">
                <text:p>-1.31772465886064</text:p>
              </table:table-cell>
              <table:table-cell office:value-type="float" office:value="-0.894182949073521">
                <text:p>-0.894182949073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8274833495045">
                <text:p>0.118274833495045</text:p>
              </table:table-cell>
              <table:table-cell office:value-type="float" office:value="0.29413593922119">
                <text:p>0.29413593922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886298168157">
                <text:p>0.10886298168157</text:p>
              </table:table-cell>
              <table:table-cell office:value-type="float" office:value="0.689587735119547">
                <text:p>0.6895877351195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64212379737492">
                <text:p>-0.764212379737492</text:p>
              </table:table-cell>
              <table:table-cell office:value-type="float" office:value="1.88575034167742">
                <text:p>1.88575034167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2250913500327">
                <text:p>-0.72250913500327</text:p>
              </table:table-cell>
              <table:table-cell office:value-type="float" office:value="-0.0978084020240043">
                <text:p>-0.09780840202400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90926814218764">
                <text:p>-0.190926814218764</text:p>
              </table:table-cell>
              <table:table-cell office:value-type="float" office:value="0.581710917410986">
                <text:p>0.581710917410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0206412750893">
                <text:p>-1.80206412750893</text:p>
              </table:table-cell>
              <table:table-cell office:value-type="float" office:value="1.80007481017984">
                <text:p>1.80007481017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2014682306724">
                <text:p>-0.12014682306724</text:p>
              </table:table-cell>
              <table:table-cell office:value-type="float" office:value="2.01370551795986">
                <text:p>2.01370551795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2447806999361">
                <text:p>1.22447806999361</text:p>
              </table:table-cell>
              <table:table-cell office:value-type="float" office:value="0.262708988650331">
                <text:p>0.262708988650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41150591583537">
                <text:p>-0.141150591583537</text:p>
              </table:table-cell>
              <table:table-cell office:value-type="float" office:value="0.0787136551619302">
                <text:p>0.0787136551619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61860187784501">
                <text:p>-0.561860187784501</text:p>
              </table:table-cell>
              <table:table-cell office:value-type="float" office:value="-0.588980276289516">
                <text:p>-0.5889802762895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2039625220717">
                <text:p>0.182039625220717</text:p>
              </table:table-cell>
              <table:table-cell office:value-type="float" office:value="1.34631461447991">
                <text:p>1.34631461447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5812051471838">
                <text:p>0.325812051471838</text:p>
              </table:table-cell>
              <table:table-cell office:value-type="float" office:value="-2.27946690176851">
                <text:p>-2.27946690176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554962702604728">
                <text:p>-0.554962702604728</text:p>
              </table:table-cell>
              <table:table-cell office:value-type="float" office:value="-1.50310667126743">
                <text:p>-1.50310667126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83078182643158">
                <text:p>-0.783078182643158</text:p>
              </table:table-cell>
              <table:table-cell office:value-type="float" office:value="-1.60017096635618">
                <text:p>-1.600170966356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40942780766338">
                <text:p>-0.240942780766338</text:p>
              </table:table-cell>
              <table:table-cell office:value-type="float" office:value="0.826353669246105">
                <text:p>0.826353669246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05796918373">
                <text:p>-1.60105796918373</text:p>
              </table:table-cell>
              <table:table-cell office:value-type="float" office:value="-0.249987237779713">
                <text:p>-0.249987237779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03160289837753">
                <text:p>-0.803160289837753</text:p>
              </table:table-cell>
              <table:table-cell office:value-type="float" office:value="0.510629663125884">
                <text:p>0.510629663125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77942349391892">
                <text:p>-0.177942349391892</text:p>
              </table:table-cell>
              <table:table-cell office:value-type="float" office:value="-0.220320483492847">
                <text:p>-0.220320483492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25627360712994">
                <text:p>-0.925627360712994</text:p>
              </table:table-cell>
              <table:table-cell office:value-type="float" office:value="2.75914900651167">
                <text:p>2.75914900651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3877410491445">
                <text:p>1.93877410491445</text:p>
              </table:table-cell>
              <table:table-cell office:value-type="float" office:value="1.25673894459352">
                <text:p>1.25673894459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8853414042948">
                <text:p>0.558853414042948</text:p>
              </table:table-cell>
              <table:table-cell office:value-type="float" office:value="-0.910285721499803">
                <text:p>-0.910285721499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83609745705076">
                <text:p>-0.983609745705076</text:p>
              </table:table-cell>
              <table:table-cell office:value-type="float" office:value="1.48411127329065">
                <text:p>1.48411127329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95170263415405">
                <text:p>-0.295170263415405</text:p>
              </table:table-cell>
              <table:table-cell office:value-type="float" office:value="0.422726364098789">
                <text:p>0.422726364098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54158816597365">
                <text:p>-0.254158816597365</text:p>
              </table:table-cell>
              <table:table-cell office:value-type="float" office:value="-0.897726899947818">
                <text:p>-0.897726899947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93626034881435">
                <text:p>-0.493626034881435</text:p>
              </table:table-cell>
              <table:table-cell office:value-type="float" office:value="0.689698532144662">
                <text:p>0.689698532144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37401605837482">
                <text:p>-0.937401605837482</text:p>
              </table:table-cell>
              <table:table-cell office:value-type="float" office:value="-2.06539563976255">
                <text:p>-2.06539563976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560715554405">
                <text:p>1.01560715554405</text:p>
              </table:table-cell>
              <table:table-cell office:value-type="float" office:value="-0.535618382404888">
                <text:p>-0.535618382404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9259716062921">
                <text:p>1.29259716062921</text:p>
              </table:table-cell>
              <table:table-cell office:value-type="float" office:value="-0.339013051945333">
                <text:p>-0.339013051945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17103388758593">
                <text:p>-0.417103388758593</text:p>
              </table:table-cell>
              <table:table-cell office:value-type="float" office:value="0.00993908238990643">
                <text:p>0.00993908238990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1033227724932">
                <text:p>1.21033227724932</text:p>
              </table:table-cell>
              <table:table-cell office:value-type="float" office:value="-1.72283016691089">
                <text:p>-1.72283016691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14272501170931">
                <text:p>-0.214272501170931</text:p>
              </table:table-cell>
              <table:table-cell office:value-type="float" office:value="-0.204564510789603">
                <text:p>-0.204564510789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24563657102622">
                <text:p>-0.224563657102622</text:p>
              </table:table-cell>
              <table:table-cell office:value-type="float" office:value="0.250375363673387">
                <text:p>0.25037536367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254467331998">
                <text:p>1.2254467331998</text:p>
              </table:table-cell>
              <table:table-cell office:value-type="float" office:value="0.69728159666251">
                <text:p>0.69728159666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7859118051835">
                <text:p>0.977859118051835</text:p>
              </table:table-cell>
              <table:table-cell office:value-type="float" office:value="-0.724187109497867">
                <text:p>-0.724187109497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7125453515035">
                <text:p>1.87125453515035</text:p>
              </table:table-cell>
              <table:table-cell office:value-type="float" office:value="1.53881035050726">
                <text:p>1.53881035050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4811374511426">
                <text:p>0.634811374511426</text:p>
              </table:table-cell>
              <table:table-cell office:value-type="float" office:value="-1.27687223334572">
                <text:p>-1.276872233345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702710176545355">
                <text:p>-0.0702710176545355</text:p>
              </table:table-cell>
              <table:table-cell office:value-type="float" office:value="1.30481990438786">
                <text:p>1.304819904387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3672287048549">
                <text:p>1.53672287048549</text:p>
              </table:table-cell>
              <table:table-cell office:value-type="float" office:value="-0.482774051568094">
                <text:p>-0.482774051568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523725989249">
                <text:p>0.39523725989249</text:p>
              </table:table-cell>
              <table:table-cell office:value-type="float" office:value="-0.552297530720639">
                <text:p>-0.552297530720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6187132995092">
                <text:p>-0.26187132995092</text:p>
              </table:table-cell>
              <table:table-cell office:value-type="float" office:value="0.13656521454752">
                <text:p>0.13656521454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86616180107394">
                <text:p>-1.86616180107394</text:p>
              </table:table-cell>
              <table:table-cell office:value-type="float" office:value="0.725524745541845">
                <text:p>0.725524745541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22467209012051">
                <text:p>-1.22467209012051</text:p>
              </table:table-cell>
              <table:table-cell office:value-type="float" office:value="0.0400290648895405">
                <text:p>0.04002906488954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6067100815168">
                <text:p>0.606067100815168</text:p>
              </table:table-cell>
              <table:table-cell office:value-type="float" office:value="1.23549968408461">
                <text:p>1.23549968408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9595303851598">
                <text:p>1.09595303851598</text:p>
              </table:table-cell>
              <table:table-cell office:value-type="float" office:value="-1.556537672262">
                <text:p>-1.556537672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7541621920659">
                <text:p>-1.87541621920659</text:p>
              </table:table-cell>
              <table:table-cell office:value-type="float" office:value="-0.792330513362427">
                <text:p>-0.792330513362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5103761707307">
                <text:p>0.485103761707307</text:p>
              </table:table-cell>
              <table:table-cell office:value-type="float" office:value="0.440341760839375">
                <text:p>0.44034176083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4715539341307">
                <text:p>0.0564715539341307</text:p>
              </table:table-cell>
              <table:table-cell office:value-type="float" office:value="-0.0458715267159512">
                <text:p>-0.0458715267159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3398815627463">
                <text:p>-0.83398815627463</text:p>
              </table:table-cell>
              <table:table-cell office:value-type="float" office:value="-0.179469292427378">
                <text:p>-0.179469292427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10062875969439">
                <text:p>-2.10062875969439</text:p>
              </table:table-cell>
              <table:table-cell office:value-type="float" office:value="0.526478712586134">
                <text:p>0.526478712586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4230636682057">
                <text:p>-1.14230636682057</text:p>
              </table:table-cell>
              <table:table-cell office:value-type="float" office:value="-0.126570517892267">
                <text:p>-0.1265705178922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79609598854257">
                <text:p>-1.79609598854257</text:p>
              </table:table-cell>
              <table:table-cell office:value-type="float" office:value="-1.91775193101706">
                <text:p>-1.917751931017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2982040007189">
                <text:p>1.32982040007189</text:p>
              </table:table-cell>
              <table:table-cell office:value-type="float" office:value="-0.549725540054865">
                <text:p>-0.549725540054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7764745173564">
                <text:p>0.167764745173564</text:p>
              </table:table-cell>
              <table:table-cell office:value-type="float" office:value="-0.296012928747676">
                <text:p>-0.2960129287476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27493286845273">
                <text:p>-2.27493286845273</text:p>
              </table:table-cell>
              <table:table-cell office:value-type="float" office:value="-0.635467874494173">
                <text:p>-0.635467874494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61753027823407">
                <text:p>-0.361753027823407</text:p>
              </table:table-cell>
              <table:table-cell office:value-type="float" office:value="1.04051738359615">
                <text:p>1.04051738359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5480558853803">
                <text:p>1.05480558853803</text:p>
              </table:table-cell>
              <table:table-cell office:value-type="float" office:value="-0.485129189383088">
                <text:p>-0.4851291893830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9181024425775">
                <text:p>-0.229181024425775</text:p>
              </table:table-cell>
              <table:table-cell office:value-type="float" office:value="1.24398508583506">
                <text:p>1.24398508583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33450201433175">
                <text:p>-3.33450201433175</text:p>
              </table:table-cell>
              <table:table-cell office:value-type="float" office:value="-1.01474815382872">
                <text:p>-1.01474815382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9566151114609">
                <text:p>-0.229566151114609</text:p>
              </table:table-cell>
              <table:table-cell office:value-type="float" office:value="0.871117980589222">
                <text:p>0.871117980589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7029315176617">
                <text:p>1.87029315176617</text:p>
              </table:table-cell>
              <table:table-cell office:value-type="float" office:value="1.41405960066058">
                <text:p>1.41405960066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0659163181651">
                <text:p>0.240659163181651</text:p>
              </table:table-cell>
              <table:table-cell office:value-type="float" office:value="0.391213491450456">
                <text:p>0.391213491450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656162023394387">
                <text:p>-0.656162023394387</text:p>
              </table:table-cell>
              <table:table-cell office:value-type="float" office:value="1.11798573953421">
                <text:p>1.117985739534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6995480642273">
                <text:p>-0.96995480642273</text:p>
              </table:table-cell>
              <table:table-cell office:value-type="float" office:value="-1.58248108836382">
                <text:p>-1.58248108836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1385570033347">
                <text:p>0.711385570033347</text:p>
              </table:table-cell>
              <table:table-cell office:value-type="float" office:value="0.615248985342605">
                <text:p>0.615248985342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2011754074233">
                <text:p>1.12011754074233</text:p>
              </table:table-cell>
              <table:table-cell office:value-type="float" office:value="0.301235883036527">
                <text:p>0.301235883036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3306727261377">
                <text:p>0.163306727261377</text:p>
              </table:table-cell>
              <table:table-cell office:value-type="float" office:value="0.0297538315575347">
                <text:p>0.02975383155753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9053565665088">
                <text:p>1.89053565665088</text:p>
              </table:table-cell>
              <table:table-cell office:value-type="float" office:value="1.49468144020803">
                <text:p>1.49468144020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90925775938821">
                <text:p>0.390925775938821</text:p>
              </table:table-cell>
              <table:table-cell office:value-type="float" office:value="-0.34620802655578">
                <text:p>-0.346208026555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54112859824457">
                <text:p>-1.54112859824457</text:p>
              </table:table-cell>
              <table:table-cell office:value-type="float" office:value="1.16006740660697">
                <text:p>1.160067406606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48170727486113">
                <text:p>-1.48170727486113</text:p>
              </table:table-cell>
              <table:table-cell office:value-type="float" office:value="-1.09230374862805">
                <text:p>-1.0923037486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7702542337901">
                <text:p>0.517702542337901</text:p>
              </table:table-cell>
              <table:table-cell office:value-type="float" office:value="-0.190344747057798">
                <text:p>-0.1903447470577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47686974251">
                <text:p>1.0047686974251</text:p>
              </table:table-cell>
              <table:table-cell office:value-type="float" office:value="0.740453470143844">
                <text:p>0.740453470143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1167877507482">
                <text:p>1.31167877507482</text:p>
              </table:table-cell>
              <table:table-cell office:value-type="float" office:value="0.0619223788654704">
                <text:p>0.0619223788654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617084219693">
                <text:p>1.08617084219693</text:p>
              </table:table-cell>
              <table:table-cell office:value-type="float" office:value="-0.276278413163784">
                <text:p>-0.276278413163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77210171890944">
                <text:p>-1.77210171890944</text:p>
              </table:table-cell>
              <table:table-cell office:value-type="float" office:value="0.674845860466695">
                <text:p>0.67484586046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9879883682359">
                <text:p>0.199879883682359</text:p>
              </table:table-cell>
              <table:table-cell office:value-type="float" office:value="-0.266696581089528">
                <text:p>-0.266696581089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46228414348553">
                <text:p>-0.446228414348553</text:p>
              </table:table-cell>
              <table:table-cell office:value-type="float" office:value="-0.0836478818219422">
                <text:p>-0.0836478818219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1208521346915">
                <text:p>0.611208521346915</text:p>
              </table:table-cell>
              <table:table-cell office:value-type="float" office:value="-0.886283269699295">
                <text:p>-0.886283269699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404203523253">
                <text:p>0.60404203523253</text:p>
              </table:table-cell>
              <table:table-cell office:value-type="float" office:value="1.2643851653566">
                <text:p>1.2643851653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7218107792886">
                <text:p>1.57218107792886</text:p>
              </table:table-cell>
              <table:table-cell office:value-type="float" office:value="0.785677317555929">
                <text:p>0.7856773175559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